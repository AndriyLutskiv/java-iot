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Text_20_body" style:list-style-name="L25">
      <style:paragraph-properties fo:margin-top="0in" fo:margin-bottom="0in"/>
    </style:style>
    <style:style style:name="P58" style:family="paragraph" style:parent-style-name="Text_20_body" style:list-style-name="L26">
      <style:paragraph-properties fo:margin-top="0in" fo:margin-bottom="0in"/>
    </style:style>
    <style:style style:name="P59" style:family="paragraph" style:parent-style-name="Text_20_body" style:list-style-name="L27">
      <style:paragraph-properties fo:margin-top="0in" fo:margin-bottom="0in"/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Text_20_body" style:list-style-name="L28">
      <style:paragraph-properties fo:margin-top="0in" fo:margin-bottom="0in"/>
    </style:style>
    <style:style style:name="P98" style:family="paragraph" style:parent-style-name="Text_20_body" style:list-style-name="L29">
      <style:paragraph-properties fo:margin-top="0in" fo:margin-bottom="0in"/>
    </style:style>
    <style:style style:name="P99" style:family="paragraph" style:parent-style-name="Text_20_body" style:list-style-name="L30">
      <style:paragraph-properties fo:margin-top="0in" fo:margin-bottom="0in"/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Text_20_body" style:list-style-name="L31">
      <style:paragraph-properties fo:margin-top="0in" fo:margin-bottom="0in"/>
    </style:style>
    <style:style style:name="P187" style:family="paragraph" style:parent-style-name="Text_20_body" style:list-style-name="L32">
      <style:paragraph-properties fo:margin-top="0in" fo:margin-bottom="0in"/>
    </style:style>
    <style:style style:name="P188" style:family="paragraph" style:parent-style-name="Text_20_body" style:list-style-name="L33">
      <style:paragraph-properties fo:margin-top="0in" fo:margin-bottom="0in"/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Text_20_body" style:list-style-name="L34">
      <style:paragraph-properties fo:margin-top="0in" fo:margin-bottom="0in"/>
    </style:style>
    <style:style style:name="P240" style:family="paragraph" style:parent-style-name="Text_20_body" style:list-style-name="L35">
      <style:paragraph-properties fo:margin-top="0in" fo:margin-bottom="0in"/>
    </style:style>
    <style:style style:name="P241" style:family="paragraph" style:parent-style-name="Text_20_body" style:list-style-name="L36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37">
      <style:paragraph-properties fo:margin-top="0in" fo:margin-bottom="0in"/>
    </style:style>
    <style:style style:name="P300" style:family="paragraph" style:parent-style-name="Text_20_body" style:list-style-name="L38">
      <style:paragraph-properties fo:margin-top="0in" fo:margin-bottom="0in"/>
    </style:style>
    <style:style style:name="P301" style:family="paragraph" style:parent-style-name="Text_20_body" style:list-style-name="L39">
      <style:paragraph-properties fo:margin-top="0in" fo:margin-bottom="0in"/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Text_20_body" style:list-style-name="L40">
      <style:paragraph-properties fo:margin-top="0in" fo:margin-bottom="0in"/>
    </style:style>
    <style:style style:name="P378" style:family="paragraph" style:parent-style-name="Text_20_body" style:list-style-name="L41">
      <style:paragraph-properties fo:margin-top="0in" fo:margin-bottom="0in"/>
    </style:style>
    <style:style style:name="P379" style:family="paragraph" style:parent-style-name="Text_20_body" style:list-style-name="L42">
      <style:paragraph-properties fo:margin-top="0in" fo:margin-bottom="0in"/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Text_20_body" style:list-style-name="L43">
      <style:paragraph-properties fo:margin-top="0in" fo:margin-bottom="0in"/>
    </style:style>
    <style:style style:name="P442" style:family="paragraph" style:parent-style-name="Text_20_body" style:list-style-name="L44">
      <style:paragraph-properties fo:margin-top="0in" fo:margin-bottom="0in"/>
    </style:style>
    <style:style style:name="P443" style:family="paragraph" style:parent-style-name="Text_20_body" style:list-style-name="L45">
      <style:paragraph-properties fo:margin-top="0in" fo:margin-bottom="0in"/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46">
      <style:paragraph-properties fo:margin-top="0in" fo:margin-bottom="0in"/>
    </style:style>
    <style:style style:name="P537" style:family="paragraph" style:parent-style-name="Text_20_body" style:list-style-name="L47">
      <style:paragraph-properties fo:margin-top="0in" fo:margin-bottom="0in"/>
    </style:style>
    <style:style style:name="P538" style:family="paragraph" style:parent-style-name="Text_20_body" style:list-style-name="L48">
      <style:paragraph-properties fo:margin-top="0in" fo:margin-bottom="0in"/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Text_20_body" style:list-style-name="L49">
      <style:paragraph-properties fo:margin-top="0in" fo:margin-bottom="0in"/>
    </style:style>
    <style:style style:name="P622" style:family="paragraph" style:parent-style-name="Text_20_body" style:list-style-name="L50">
      <style:paragraph-properties fo:margin-top="0in" fo:margin-bottom="0in"/>
    </style:style>
    <style:style style:name="P623" style:family="paragraph" style:parent-style-name="Text_20_body" style:list-style-name="L51">
      <style:paragraph-properties fo:margin-top="0in" fo:margin-bottom="0in"/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Preformatted_20_Text"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Text_20_body" style:list-style-name="L52">
      <style:paragraph-properties fo:margin-top="0in" fo:margin-bottom="0in"/>
    </style:style>
    <style:style style:name="P729" style:family="paragraph" style:parent-style-name="Text_20_body" style:list-style-name="L53">
      <style:paragraph-properties fo:margin-top="0in" fo:margin-bottom="0in"/>
    </style:style>
    <style:style style:name="P730" style:family="paragraph" style:parent-style-name="Text_20_body" style:list-style-name="L5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21845*"/>
    </style:style>
    <style:style style:name="Table1.B" style:family="table-column">
      <style:table-column-properties style:rel-column-width="23665*"/>
    </style:style>
    <style:style style:name="Table1.C" style:family="table-column">
      <style:table-column-properties style:rel-column-width="20024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9362*"/>
    </style:style>
    <style:style style:name="Table2.B" style:family="table-column">
      <style:table-column-properties style:rel-column-width="18724*"/>
    </style:style>
    <style:style style:name="Table2.C" style:family="table-column">
      <style:table-column-properties style:rel-column-width="18724*"/>
    </style:style>
    <style:style style:name="Table2.D" style:family="table-column">
      <style:table-column-properties style:rel-column-width="18724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 style:rel-width="100%"/>
    </style:style>
    <style:style style:name="Table5.A" style:family="table-column">
      <style:table-column-properties style:rel-column-width="20596*"/>
    </style:style>
    <style:style style:name="Table5.B" style:family="table-column">
      <style:table-column-properties style:rel-column-width="20596*"/>
    </style:style>
    <style:style style:name="Table5.C" style:family="table-column">
      <style:table-column-properties style:rel-column-width="24341*"/>
    </style:style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36157*"/>
    </style:style>
    <style:style style:name="Table8.B" style:family="table-column">
      <style:table-column-properties style:rel-column-width="29377*"/>
    </style:style>
  </office:automatic-styles>
  <office:body>
    <office:text>
      <text:p text:style-name="Title">������������������ ���������������� ���� ������������������ ������������������������ ���������� �� �������������������� ���������������������������� ���������� Java��</text:p>
      <text:p text:style-name="Author">������������ ��. ��., �������������������� ��.��.</text:p>
      <text:p text:style-name="Date">2025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міністерство-освіти-і-науки-україни"/>МІНІСТЕРСТВО ОСВІТИ І НАУКИ УКРАЇНИ<text:bookmark-end text:name="міністерство-освіти-і-науки-україни"/></text:h>
      <text:p text:style-name="First_20_paragraph">Тернопільський національний технічний університет імені Івана Пулюя</text:p>
      <text:p text:style-name="Text_20_body">Кафедра комп’ютерних систем та мереж</text:p>
      <text:p text:style-name="Horizontal_20_Line"/>
      <text:h text:style-name="Heading_20_2" text:outline-level="2"><text:bookmark-start text:name="методичні-вказівки"/>МЕТОДИЧНІ ВКАЗІВКИ<text:bookmark-end text:name="методичні-вказівки"/></text:h>
      <text:p text:style-name="First_20_paragraph">до виконання лабораторних робіт</text:p>
      <text:p text:style-name="Text_20_body">з дисципліни</text:p>
      <text:p text:style-name="Text_20_body"><text:span text:style-name="T1">«Програмування мовою Java»</text:span></text:p>
      <text:p text:style-name="Text_20_body">для студентів денної та заочної форм навчання</text:p>
      <text:p text:style-name="Text_20_body">спеціальності F7 «Комп’ютерна інженерія»</text:p>
      <text:p text:style-name="Horizontal_20_Line"/>
      <text:p text:style-name="First_20_paragraph">Тернопіль – 2025</text:p>
      <text:p text:style-name="Horizontal_20_Line"/>
      <text:p text:style-name="First_20_paragraph"><text:span text:style-name="T1">Укладачі:</text:span> к.т.н. Луцків А. М., к.т.н. Осухівська Г.М.</text:p>
      <text:p text:style-name="Text_20_body"><text:span text:style-name="T1">Рецензент:</text:span> Яцишин В. В., к.т.н., завідувач кафедри систем штучного інтелекту та аналізу даних, ТНТУ ім. І. Пулюя</text:p>
      <text:p text:style-name="Text_20_body"><text:span text:style-name="T1">Відповідальний за випуск:</text:span> зав. каф. комп’ютерних систем та мереж, проф., д.т.н., Лупенко С. А.</text:p>
      <text:p text:style-name="Text_20_body">Затверджено на засіданні кафедри «Комп’ютерної інженерії»</text:p>
      <text:p text:style-name="Text_20_body">Протокол № ___ від ____________ 2025 р.</text:p>
      <text:p text:style-name="Text_20_body">Схвалено та рекомендовано до друку методичною комісією факультету комп’ютерно-інформаційних систем і програмної інженерії ТНТУ ім. Івана Пулюя.</text:p>
      <text:p text:style-name="Text_20_body">Протокол № ___ від ____________ 2025 р.</text:p>
      <text:h text:style-name="Heading_20_1" text:outline-level="1"><text:bookmark-start text:name="перелік-використаних-скорочень"/>Перелік використаних скорочень<text:bookmark-end text:name="перелік-використаних-скорочень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Скорочення</text:p>
            </table:table-cell>
            <table:table-cell table:style-name="TableHeaderRowCell" office:value-type="string">
              <text:p text:style-name="Table_20_Heading">Повна назва</text:p>
            </table:table-cell>
            <table:table-cell table:style-name="TableHeaderRowCell" office:value-type="string">
              <text:p text:style-name="Table_20_Heading">Пояснення</text:p>
            </table:table-cell>
          </table:table-row>
        </table:table-header-rows>
        <table:table-row>
          <table:table-cell table:style-name="TableRowCell" office:value-type="string">
            <text:p text:style-name="Table_20_Contents">API</text:p>
          </table:table-cell>
          <table:table-cell table:style-name="TableRowCell" office:value-type="string">
            <text:p text:style-name="Table_20_Contents">Application Programming Interface</text:p>
          </table:table-cell>
          <table:table-cell table:style-name="TableRowCell" office:value-type="string">
            <text:p text:style-name="Table_20_Contents">Інтерфейс програмування застосунків; набір класів, методів та протоколів для взаємодії між програмними компонентами</text:p>
          </table:table-cell>
        </table:table-row>
        <table:table-row>
          <table:table-cell table:style-name="TableRowCell" office:value-type="string">
            <text:p text:style-name="Table_20_Contents">CLI</text:p>
          </table:table-cell>
          <table:table-cell table:style-name="TableRowCell" office:value-type="string">
            <text:p text:style-name="Table_20_Contents">Command Line Interface</text:p>
          </table:table-cell>
          <table:table-cell table:style-name="TableRowCell" office:value-type="string">
            <text:p text:style-name="Table_20_Contents">Інтерфейс командного рядка; спосіб взаємодії з програмою через текстові команди</text:p>
          </table:table-cell>
        </table:table-row>
        <table:table-row>
          <table:table-cell table:style-name="TableRowCell" office:value-type="string">
            <text:p text:style-name="Table_20_Contents">CSV</text:p>
          </table:table-cell>
          <table:table-cell table:style-name="TableRowCell" office:value-type="string">
            <text:p text:style-name="Table_20_Contents">Comma-Separated Values</text:p>
          </table:table-cell>
          <table:table-cell table:style-name="TableRowCell" office:value-type="string">
            <text:p text:style-name="Table_20_Contents">Формат зберігання табличних даних у текстовому вигляді з роздільником-комою</text:p>
          </table:table-cell>
        </table:table-row>
        <table:table-row>
          <table:table-cell table:style-name="TableRowCell" office:value-type="string">
            <text:p text:style-name="Table_20_Contents">DB</text:p>
          </table:table-cell>
          <table:table-cell table:style-name="TableRowCell" office:value-type="string">
            <text:p text:style-name="Table_20_Contents">Database</text:p>
          </table:table-cell>
          <table:table-cell table:style-name="TableRowCell" office:value-type="string">
            <text:p text:style-name="Table_20_Contents">База даних; організована структура для зберігання, пошуку та обробки даних</text:p>
          </table:table-cell>
        </table:table-row>
        <table:table-row>
          <table:table-cell table:style-name="TableRowCell" office:value-type="string">
            <text:p text:style-name="Table_20_Contents">FSM</text:p>
          </table:table-cell>
          <table:table-cell table:style-name="TableRowCell" office:value-type="string">
            <text:p text:style-name="Table_20_Contents">Finite State Machine</text:p>
          </table:table-cell>
          <table:table-cell table:style-name="TableRowCell" office:value-type="string">
            <text:p text:style-name="Table_20_Contents">Скінченний автомат; обчислювальна модель з кінцевою множиною станів та переходів між ними</text:p>
          </table:table-cell>
        </table:table-row>
        <table:table-row>
          <table:table-cell table:style-name="TableRowCell" office:value-type="string">
            <text:p text:style-name="Table_20_Contents">GUI</text:p>
          </table:table-cell>
          <table:table-cell table:style-name="TableRowCell" office:value-type="string">
            <text:p text:style-name="Table_20_Contents">Graphical User Interface</text:p>
          </table:table-cell>
          <table:table-cell table:style-name="TableRowCell" office:value-type="string">
            <text:p text:style-name="Table_20_Contents">Графічний інтерфейс користувача; спосіб взаємодії з програмою через графічні елементи</text:p>
          </table:table-cell>
        </table:table-row>
        <table:table-row>
          <table:table-cell table:style-name="TableRowCell" office:value-type="string">
            <text:p text:style-name="Table_20_Contents">HTML</text:p>
          </table:table-cell>
          <table:table-cell table:style-name="TableRowCell" office:value-type="string">
            <text:p text:style-name="Table_20_Contents">HyperText Markup Language</text:p>
          </table:table-cell>
          <table:table-cell table:style-name="TableRowCell" office:value-type="string">
            <text:p text:style-name="Table_20_Contents">Мова розмітки гіпертексту; стандартна мова для створення веб-сторінок</text:p>
          </table:table-cell>
        </table:table-row>
        <table:table-row>
          <table:table-cell table:style-name="TableRowCell" office:value-type="string">
            <text:p text:style-name="Table_20_Contents">HTTP</text:p>
          </table:table-cell>
          <table:table-cell table:style-name="TableRowCell" office:value-type="string">
            <text:p text:style-name="Table_20_Contents">HyperText Transfer Protocol</text:p>
          </table:table-cell>
          <table:table-cell table:style-name="TableRowCell" office:value-type="string">
            <text:p text:style-name="Table_20_Contents">Протокол передачі гіпертексту; протокол прикладного рівня для обміну даними у мережі</text:p>
          </table:table-cell>
        </table:table-row>
        <table:table-row>
          <table:table-cell table:style-name="TableRowCell" office:value-type="string">
            <text:p text:style-name="Table_20_Contents">I/O</text:p>
          </table:table-cell>
          <table:table-cell table:style-name="TableRowCell" office:value-type="string">
            <text:p text:style-name="Table_20_Contents">Input/Output</text:p>
          </table:table-cell>
          <table:table-cell table:style-name="TableRowCell" office:value-type="string">
            <text:p text:style-name="Table_20_Contents">Введення/виведення; механізми читання та запису даних</text:p>
          </table:table-cell>
        </table:table-row>
        <table:table-row>
          <table:table-cell table:style-name="TableRowCell" office:value-type="string">
            <text:p text:style-name="Table_20_Contents">IDE</text:p>
          </table:table-cell>
          <table:table-cell table:style-name="TableRowCell" office:value-type="string">
            <text:p text:style-name="Table_20_Contents">Integrated Development Environment</text:p>
          </table:table-cell>
          <table:table-cell table:style-name="TableRowCell" office:value-type="string">
            <text:p text:style-name="Table_20_Contents">Інтегроване середовище розробки; комплексний інструмент для написання, налагодження та тестування коду</text:p>
          </table:table-cell>
        </table:table-row>
        <table:table-row>
          <table:table-cell table:style-name="TableRowCell" office:value-type="string">
            <text:p text:style-name="Table_20_Contents">JDBC</text:p>
          </table:table-cell>
          <table:table-cell table:style-name="TableRowCell" office:value-type="string">
            <text:p text:style-name="Table_20_Contents">Java Database Connectivity</text:p>
          </table:table-cell>
          <table:table-cell table:style-name="TableRowCell" office:value-type="string">
            <text:p text:style-name="Table_20_Contents">Стандартний API мови Java для взаємодії з реляційними базами даних</text:p>
          </table:table-cell>
        </table:table-row>
        <table:table-row>
          <table:table-cell table:style-name="TableRowCell" office:value-type="string">
            <text:p text:style-name="Table_20_Contents">JDK</text:p>
          </table:table-cell>
          <table:table-cell table:style-name="TableRowCell" office:value-type="string">
            <text:p text:style-name="Table_20_Contents">Java Development Kit</text:p>
          </table:table-cell>
          <table:table-cell table:style-name="TableRowCell" office:value-type="string">
            <text:p text:style-name="Table_20_Contents">Набір засобів розробки Java; включає компілятор, JVM, JRE та стандартну бібліотеку</text:p>
          </table:table-cell>
        </table:table-row>
        <table:table-row>
          <table:table-cell table:style-name="TableRowCell" office:value-type="string">
            <text:p text:style-name="Table_20_Contents">JRE</text:p>
          </table:table-cell>
          <table:table-cell table:style-name="TableRowCell" office:value-type="string">
            <text:p text:style-name="Table_20_Contents">Java Runtime Environment</text:p>
          </table:table-cell>
          <table:table-cell table:style-name="TableRowCell" office:value-type="string">
            <text:p text:style-name="Table_20_Contents">Середовище виконання Java; мінімальний набір для запуску Java-застосунків</text:p>
          </table:table-cell>
        </table:table-row>
        <table:table-row>
          <table:table-cell table:style-name="TableRowCell" office:value-type="string">
            <text:p text:style-name="Table_20_Contents">JSON</text:p>
          </table:table-cell>
          <table:table-cell table:style-name="TableRowCell" office:value-type="string">
            <text:p text:style-name="Table_20_Contents">JavaScript Object Notation</text:p>
          </table:table-cell>
          <table:table-cell table:style-name="TableRowCell" office:value-type="string">
            <text:p text:style-name="Table_20_Contents">Текстовий формат обміну даними, що базується на парах «ключ — значення»</text:p>
          </table:table-cell>
        </table:table-row>
        <table:table-row>
          <table:table-cell table:style-name="TableRowCell" office:value-type="string">
            <text:p text:style-name="Table_20_Contents">JUnit</text:p>
          </table:table-cell>
          <table:table-cell table:style-name="TableRowCell" office:value-type="string">
            <text:p text:style-name="Table_20_Contents">Java Unit Testing Framework</text:p>
          </table:table-cell>
          <table:table-cell table:style-name="TableRowCell" office:value-type="string">
            <text:p text:style-name="Table_20_Contents">Фреймворк для написання та виконання модульних тестів у Java</text:p>
          </table:table-cell>
        </table:table-row>
        <table:table-row>
          <table:table-cell table:style-name="TableRowCell" office:value-type="string">
            <text:p text:style-name="Table_20_Contents">JVM</text:p>
          </table:table-cell>
          <table:table-cell table:style-name="TableRowCell" office:value-type="string">
            <text:p text:style-name="Table_20_Contents">Java Virtual Machine</text:p>
          </table:table-cell>
          <table:table-cell table:style-name="TableRowCell" office:value-type="string">
            <text:p text:style-name="Table_20_Contents">Віртуальна машина Java; програмне середовище для виконання байт-коду</text:p>
          </table:table-cell>
        </table:table-row>
        <table:table-row>
          <table:table-cell table:style-name="TableRowCell" office:value-type="string">
            <text:p text:style-name="Table_20_Contents">LTS</text:p>
          </table:table-cell>
          <table:table-cell table:style-name="TableRowCell" office:value-type="string">
            <text:p text:style-name="Table_20_Contents">Long-Term Support</text:p>
          </table:table-cell>
          <table:table-cell table:style-name="TableRowCell" office:value-type="string">
            <text:p text:style-name="Table_20_Contents">Версія програмного забезпечення з тривалою підтримкою безпеки та виправлень</text:p>
          </table:table-cell>
        </table:table-row>
        <table:table-row>
          <table:table-cell table:style-name="TableRowCell" office:value-type="string">
            <text:p text:style-name="Table_20_Contents">OOP</text:p>
          </table:table-cell>
          <table:table-cell table:style-name="TableRowCell" office:value-type="string">
            <text:p text:style-name="Table_20_Contents">Object-Oriented Programming</text:p>
          </table:table-cell>
          <table:table-cell table:style-name="TableRowCell" office:value-type="string">
            <text:p text:style-name="Table_20_Contents">Об’єктно-орієнтоване програмування; парадигма, що базується на поняттях класів та об’єктів</text:p>
          </table:table-cell>
        </table:table-row>
        <table:table-row>
          <table:table-cell table:style-name="TableRowCell" office:value-type="string">
            <text:p text:style-name="Table_20_Contents">SDK</text:p>
          </table:table-cell>
          <table:table-cell table:style-name="TableRowCell" office:value-type="string">
            <text:p text:style-name="Table_20_Contents">Software Development Kit</text:p>
          </table:table-cell>
          <table:table-cell table:style-name="TableRowCell" office:value-type="string">
            <text:p text:style-name="Table_20_Contents">Набір засобів розробки програмного забезпечення для конкретної платформи або технології</text:p>
          </table:table-cell>
        </table:table-row>
        <table:table-row>
          <table:table-cell table:style-name="TableRowCell" office:value-type="string">
            <text:p text:style-name="Table_20_Contents">SQL</text:p>
          </table:table-cell>
          <table:table-cell table:style-name="TableRowCell" office:value-type="string">
            <text:p text:style-name="Table_20_Contents">Structured Query Language</text:p>
          </table:table-cell>
          <table:table-cell table:style-name="TableRowCell" office:value-type="string">
            <text:p text:style-name="Table_20_Contents">Мова структурованих запитів; стандартна мова для роботи з реляційними базами даних</text:p>
          </table:table-cell>
        </table:table-row>
        <table:table-row>
          <table:table-cell table:style-name="TableRowCell" office:value-type="string">
            <text:p text:style-name="Table_20_Contents">TCP</text:p>
          </table:table-cell>
          <table:table-cell table:style-name="TableRowCell" office:value-type="string">
            <text:p text:style-name="Table_20_Contents">Transmission Control Protocol</text:p>
          </table:table-cell>
          <table:table-cell table:style-name="TableRowCell" office:value-type="string">
            <text:p text:style-name="Table_20_Contents">Протокол управління передачею; надійний протокол транспортного рівня з гарантованою доставкою</text:p>
          </table:table-cell>
        </table:table-row>
        <table:table-row>
          <table:table-cell table:style-name="TableRowCell" office:value-type="string">
            <text:p text:style-name="Table_20_Contents">TCP/IP</text:p>
          </table:table-cell>
          <table:table-cell table:style-name="TableRowCell" office:value-type="string">
            <text:p text:style-name="Table_20_Contents">Transmission Control Protocol / Internet Protocol</text:p>
          </table:table-cell>
          <table:table-cell table:style-name="TableRowCell" office:value-type="string">
            <text:p text:style-name="Table_20_Contents">Стек мережевих протоколів, що є основою сучасного Інтернету</text:p>
          </table:table-cell>
        </table:table-row>
        <table:table-row>
          <table:table-cell table:style-name="TableRowCell" office:value-type="string">
            <text:p text:style-name="Table_20_Contents">UDP</text:p>
          </table:table-cell>
          <table:table-cell table:style-name="TableRowCell" office:value-type="string">
            <text:p text:style-name="Table_20_Contents">User Datagram Protocol</text:p>
          </table:table-cell>
          <table:table-cell table:style-name="TableRowCell" office:value-type="string">
            <text:p text:style-name="Table_20_Contents">Протокол датаграм користувача; ненадійний, але швидкий протокол транспортного рівня</text:p>
          </table:table-cell>
        </table:table-row>
        <table:table-row>
          <table:table-cell table:style-name="TableRowCell" office:value-type="string">
            <text:p text:style-name="Table_20_Contents">URL</text:p>
          </table:table-cell>
          <table:table-cell table:style-name="TableRowCell" office:value-type="string">
            <text:p text:style-name="Table_20_Contents">Uniform Resource Locator</text:p>
          </table:table-cell>
          <table:table-cell table:style-name="TableRowCell" office:value-type="string">
            <text:p text:style-name="Table_20_Contents">Уніфікований вказівник ресурсу; стандартний спосіб адресації ресурсів у мережі</text:p>
          </table:table-cell>
        </table:table-row>
        <table:table-row>
          <table:table-cell table:style-name="TableRowCell" office:value-type="string">
            <text:p text:style-name="Table_20_Contents">UTF</text:p>
          </table:table-cell>
          <table:table-cell table:style-name="TableRowCell" office:value-type="string">
            <text:p text:style-name="Table_20_Contents">Unicode Transformation Format</text:p>
          </table:table-cell>
          <table:table-cell table:style-name="TableRowCell" office:value-type="string">
            <text:p text:style-name="Table_20_Contents">Формат перетворення Unicode; стандарт кодування символів (UTF-8, UTF-16)</text:p>
          </table:table-cell>
        </table:table-row>
      </table:table>
      <text:h text:style-name="Heading_20_1" text:outline-level="1"><text:bookmark-start text:name="вступ"/>Вступ<text:bookmark-end text:name="вступ"/></text:h>
      <text:p text:style-name="First_20_paragraph">Мова програмування Java займає одне з провідних місць серед технологій розробки програмного забезпечення у світі. Завдяки принципу «напиши один раз — запускай будь-де» (<text:span text:style-name="T2">Write Once, Run Anywhere</text:span>), реалізованому через платформу JVM (Java Virtual Machine), Java широко застосовується у корпоративних застосунках, системах Інтернету речей (IoT), мобільних платформах (Android), хмарних сервісах та наукових обчисленнях. Станом на 2025 рік JDK 25 містить широкий спектр сучасних можливостей: записи (<text:span text:style-name="T2">records</text:span>), запечатані класи (<text:span text:style-name="T2">sealed classes</text:span>), розпізнавання зразків (<text:span text:style-name="T2">pattern matching</text:span>), текстові блоки (<text:span text:style-name="T2">text blocks</text:span>), віртуальні потоки (<text:span text:style-name="T2">virtual threads</text:span>) та структуровану паралельність (<text:span text:style-name="T2">structured concurrency</text:span>).</text:p>
      <text:p text:style-name="Text_20_body">Метою дисципліни <text:span text:style-name="T1">«Програмування мовою Java»</text:span> є формування у студентів практичних навичок розробки програмного забезпечення з використанням мови Java, включаючи об’єктно-орієнтоване проєктування, роботу з колекціями та файловою системою, побудову мережевих застосунків, багатопотокове програмування та взаємодію з базами даних через JDBC.</text:p>
      <text:p text:style-name="Text_20_body">Цей комплект методичних вказівок охоплює десять лабораторних робіт загальним обсягом 36 академічних годин та розрахований на студентів 2-го курсу спеціальності «Комп’ютерна інженерія» (F7). Передбачається, що студенти мають базові знання з алгоритмізації, можуть складати прості алгоритми та мають уявлення про структуру програм (мова C або подібні). Знання мови Java на початку дисципліни не обов’язкове.</text:p>
      <text:h text:style-name="Heading_20_2" text:outline-level="2"><text:bookmark-start text:name="структура-методичних-вказівок"/>Структура методичних вказівок<text:bookmark-end text:name="структура-методичних-вказівок"/></text:h>
      <text:p text:style-name="First_20_paragraph">Методичні вказівки складаються з таких розділів:</text:p>
      <text:list text:style-name="L1">
        <text:list-item>
          <text:p text:style-name="P1"><text:span text:style-name="T1">Перелік використаних скорочень</text:span> — довідковий розділ із поясненням усіх абревіатур.</text:p>
        </text:list-item>
        <text:list-item>
          <text:p text:style-name="P1"><text:span text:style-name="T1">Вступ</text:span> (цей розділ) — мета дисципліни, структура та вимоги до оформлення.</text:p>
        </text:list-item>
        <text:list-item>
          <text:p text:style-name="P1"><text:span text:style-name="T1">Зміст</text:span> — навігаційний перелік усіх розділів.</text:p>
        </text:list-item>
        <text:list-item>
          <text:p text:style-name="P1"><text:span text:style-name="T1">Лабораторні роботи №1–10</text:span> — основна частина, кожна містить: тему, мету, теоретичні відомості, хід виконання, індивідуальні завдання (15 варіантів), контрольні запитання та перелік літератури.</text:p>
        </text:list-item>
      </text:list>
      <text:p text:style-name="First_20_paragraph">Практичні приклади у методичних вказівках пов’язані з відкритим навчальним репозиторієм <text:span text:style-name="Source_20_Text">java-iot</text:span> (GitHub: <text:span text:style-name="Source_20_Text">https://github.com/AndriyLutskiv/java-iot</text:span>), що містить реальні Java-проєкти для одноплатного комп’ютера CrowPi/Raspberry Pi. Студентам рекомендується переглядати вихідний код цих проєктів як зразок організації коду перед виконанням власних завдань.</text:p>
      <text:h text:style-name="Heading_20_2" text:outline-level="2"><text:bookmark-start text:name="вимоги-до-оформлення-звіту"/>Вимоги до оформлення звіту<text:bookmark-end text:name="вимоги-до-оформлення-звіту"/></text:h>
      <text:p text:style-name="First_20_paragraph">Звіт з кожної лабораторної роботи оформляється у вигляді текстового документа (формат ODT або PDF) і повинен містити:</text:p>
      <text:list text:style-name="L2">
        <text:list-item>
          <text:p text:style-name="P2"><text:span text:style-name="T1">Титульний аркуш</text:span> — назва університету, кафедра, дисципліна, номер та тема лабораторної роботи, прізвище та ім’я студента, номер групи, рік.</text:p>
        </text:list-item>
        <text:list-item>
          <text:p text:style-name="P2"><text:span text:style-name="T1">Мета роботи</text:span> — одне речення відповідно до методичних вказівок.</text:p>
        </text:list-item>
        <text:list-item>
          <text:p text:style-name="P2"><text:span text:style-name="T1">Теоретична частина</text:span> — стислий конспект (3–5 абзаців) опрацьованого матеріалу; не переписування тексту методичних вказівок, а власне розуміння.</text:p>
        </text:list-item>
        <text:list-item>
          <text:p text:style-name="P2"><text:span text:style-name="T1">Хід виконання</text:span> — опис кожного кроку з поясненням прийнятих рішень.</text:p>
        </text:list-item>
        <text:list-item>
          <text:p text:style-name="P2"><text:span text:style-name="T1">Вихідний код програми</text:span> — повний текст написаних класів у форматі моноширинного шрифту (Courier New, 10 pt).</text:p>
        </text:list-item>
        <text:list-item>
          <text:p text:style-name="P2"><text:span text:style-name="T1">Результати виконання</text:span> — знімки екрану або текстовий вивід програми, що підтверджують коректність роботи.</text:p>
        </text:list-item>
        <text:list-item>
          <text:p text:style-name="P2"><text:span text:style-name="T1">Відповіді на контрольні запитання</text:span> — розгорнуті відповіді (по 3–5 речень) на обрані 5 запитань із переліку.</text:p>
        </text:list-item>
        <text:list-item>
          <text:p text:style-name="P2"><text:span text:style-name="T1">Висновки</text:span> — 3–5 речень щодо набутих навичок та результатів роботи.</text:p>
        </text:list-item>
      </text:list>
      <text:p text:style-name="First_20_paragraph">Код оформляється відповідно до стандарту Google Java Style Guide: відступ 2 пробіли, відкриваюча дужка на тому ж рядку, коментарі документації (<text:span text:style-name="Source_20_Text">/** */</text:span>) для публічних класів та методів.</text:p>
      <text:h text:style-name="Heading_20_1" text:outline-level="1"><text:bookmark-start text:name="зміст"/>Зміст<text:bookmark-end text:name="зміст"/></text:h>
      <text:list text:style-name="L3">
        <text:list-item>
          <text:p text:style-name="P3"><text:a xlink:type="simple" xlink:href="../00_abbreviations.md" office:name=""><text:span text:style-name="Definition">Перелік використаних скорочень</text:span></text:a></text:p>
        </text:list-item>
        <text:list-item>
          <text:p text:style-name="P3"><text:a xlink:type="simple" xlink:href="../00_intro.md" office:name=""><text:span text:style-name="Definition">Вступ</text:span></text:a></text:p>
        </text:list-item>
      </text:list>
      <text:p text:style-name="Horizontal_20_Line"/>
      <text:h text:style-name="Heading_20_2" text:outline-level="2"><text:bookmark-start text:name="лабораторні-роботи"/>Лабораторні роботи<text:bookmark-end text:name="лабораторні-роботи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HeaderRowCell" office:value-type="string">
              <text:p text:style-name="Table_20_Heading">№</text:p>
            </table:table-cell>
            <table:table-cell table:style-name="TableHeaderRowCell" office:value-type="string">
              <text:p text:style-name="Table_20_Heading">Тема</text:p>
            </table:table-cell>
            <table:table-cell table:style-name="TableHeaderRowCell" office:value-type="string">
              <text:p text:style-name="Table_20_Heading">Год.</text:p>
            </table:table-cell>
            <table:table-cell table:style-name="TableHeaderRowCell" office:value-type="string">
              <text:p text:style-name="Table_20_Heading">Файл</text:p>
            </table:table-cell>
          </table:table-row>
        </table:table-header-rows>
        <table:table-row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Ознайомлення з компонентами Java SDK. Перша програма: компіляція і виконання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<text:a xlink:type="simple" xlink:href="../lab_01.md" office:name=""><text:span text:style-name="Definition">lab_01.md</text:span></text:a>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Операції з примітивними типами даних та операторами. Операції з масивами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<text:a xlink:type="simple" xlink:href="../lab_02.md" office:name=""><text:span text:style-name="Definition">lab_02.md</text:span></text:a>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Об’єктно-орієнтоване програмування на Java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<text:a xlink:type="simple" xlink:href="../lab_03.md" office:name=""><text:span text:style-name="Definition">lab_03.md</text:span></text:a>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Операції зі стрічками</text:p>
          </table:table-cell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<text:a xlink:type="simple" xlink:href="../lab_04.md" office:name=""><text:span text:style-name="Definition">lab_04.md</text:span></text:a>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Файли. Потоки введення/виведення</text:p>
          </table:table-cell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<text:a xlink:type="simple" xlink:href="../lab_05.md" office:name=""><text:span text:style-name="Definition">lab_05.md</text:span></text:a>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Застосування класів-колекцій і класів утиліт. Створення автоматизованих тестів</text:p>
          </table:table-cell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<text:a xlink:type="simple" xlink:href="../lab_06.md" office:name=""><text:span text:style-name="Definition">lab_06.md</text:span></text:a>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Створення програм з графічним інтерфейсом користувача</text:p>
          </table:table-cell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<text:a xlink:type="simple" xlink:href="../lab_07.md" office:name=""><text:span text:style-name="Definition">lab_07.md</text:span></text:a>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Використання Java для створення мережевих програм</text:p>
          </table:table-cell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<text:a xlink:type="simple" xlink:href="../lab_08.md" office:name=""><text:span text:style-name="Definition">lab_08.md</text:span></text:a>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Створення програм з кількома підпроцесами</text:p>
          </table:table-cell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<text:a xlink:type="simple" xlink:href="../lab_09.md" office:name=""><text:span text:style-name="Definition">lab_09.md</text:span></text:a></text:p>
      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Робота з базами даних</text:p>
          </table:table-cell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<text:a xlink:type="simple" xlink:href="../lab_10.md" office:name=""><text:span text:style-name="Definition">lab_10.md</text:span></text:a>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<text:span text:style-name="T1">Усього</text:span></text:p>
          </table:table-cell>
          <table:table-cell table:style-name="TableRowCell" office:value-type="string">
            <text:p text:style-name="Table_20_Contents"><text:span text:style-name="T1">36</text:span></text:p>
          </table:table-cell>
          <table:table-cell table:style-name="TableRowCell" office:value-type="string">
    </table:table-cell>
        </table:table-row>
      </table:table>
      <text:p text:style-name="Horizontal_20_Line"/>
      <text:h text:style-name="Heading_20_2" text:outline-level="2"><text:bookmark-start text:name="детальний-зміст"/>Детальний зміст<text:bookmark-end text:name="детальний-зміст"/></text:h>
      <text:h text:style-name="Heading_20_3" text:outline-level="3"><text:bookmark-start text:name="лабораторна-робота-1"/><text:a xlink:type="simple" xlink:href="../lab_01.md" office:name=""><text:span text:style-name="Definition">Лабораторна робота №1</text:span></text:a><text:bookmark-end text:name="лабораторна-робота-1"/></text:h>
      <text:list text:style-name="L4">
        <text:list-item>
          <text:p text:style-name="P4">Тема</text:p>
        </text:list-item>
        <text:list-item>
          <text:p text:style-name="P4">Мета</text:p>
        </text:list-item>
        <text:list-item>
          <text:p text:style-name="P4">Теоретичні відомості</text:p>
          <text:list text:style-name="L5">
            <text:list-item>
              <text:p text:style-name="P5">Архітектура платформи Java</text:p>
            </text:list-item>
            <text:list-item>
              <text:p text:style-name="P5">Модель компіляції та виконання</text:p>
            </text:list-item>
            <text:list-item>
              <text:p text:style-name="P5">Структура програми Java</text:p>
            </text:list-item>
            <text:list-item>
              <text:p text:style-name="P5">Компіляція та запуск у командному рядку</text:p>
            </text:list-item>
            <text:list-item>
              <text:p text:style-name="P5">Стандартна бібліотека та модульна система</text:p>
            </text:list-item>
            <text:list-item>
              <text:p text:style-name="P5">Типи даних та оператор <text:span text:style-name="Source_20_Text">var</text:span></text:p>
            </text:list-item>
            <text:list-item>
              <text:p text:style-name="P5">Безіменні класи (JDK 25)</text:p>
            </text:list-item>
          </text:list>
        </text:list-item>
        <text:list-item>
          <text:p text:style-name="P4">Хід виконання роботи</text:p>
        </text:list-item>
        <text:list-item>
          <text:p text:style-name="P4">Індивідуальні завдання (варіанти 1–15)</text:p>
        </text:list-item>
        <text:list-item>
          <text:p text:style-name="P4">Контрольні запитання (15 запитань)</text:p>
        </text:list-item>
        <text:list-item>
          <text:p text:style-name="P4">Перелік посилань</text:p>
        </text:list-item>
      </text:list>
      <text:h text:style-name="Heading_20_3" text:outline-level="3"><text:bookmark-start text:name="лабораторна-робота-2"/><text:a xlink:type="simple" xlink:href="../lab_02.md" office:name=""><text:span text:style-name="Definition">Лабораторна робота №2</text:span></text:a><text:bookmark-end text:name="лабораторна-робота-2"/></text:h>
      <text:list text:style-name="L6">
        <text:list-item>
          <text:p text:style-name="P6">Тема</text:p>
        </text:list-item>
        <text:list-item>
          <text:p text:style-name="P6">Мета</text:p>
        </text:list-item>
        <text:list-item>
          <text:p text:style-name="P6">Теоретичні відомості</text:p>
          <text:list text:style-name="L7">
            <text:list-item>
              <text:p text:style-name="P7">Примітивні типи даних</text:p>
            </text:list-item>
            <text:list-item>
              <text:p text:style-name="P7">Класи-обгортки (Wrapper classes)</text:p>
            </text:list-item>
            <text:list-item>
              <text:p text:style-name="P7">Оператори</text:p>
            </text:list-item>
            <text:list-item>
              <text:p text:style-name="P7">Одновимірні масиви</text:p>
            </text:list-item>
            <text:list-item>
              <text:p text:style-name="P7">Двовимірні масиви</text:p>
            </text:list-item>
            <text:list-item>
              <text:p text:style-name="P7">Приклад з репозиторію java-iot</text:p>
            </text:list-item>
          </text:list>
        </text:list-item>
        <text:list-item>
          <text:p text:style-name="P6">Хід виконання роботи</text:p>
        </text:list-item>
        <text:list-item>
          <text:p text:style-name="P6">Індивідуальні завдання (варіанти 1–15)</text:p>
        </text:list-item>
        <text:list-item>
          <text:p text:style-name="P6">Контрольні запитання (15 запитань)</text:p>
        </text:list-item>
        <text:list-item>
          <text:p text:style-name="P6">Перелік посилань</text:p>
        </text:list-item>
      </text:list>
      <text:h text:style-name="Heading_20_3" text:outline-level="3"><text:bookmark-start text:name="лабораторна-робота-3"/><text:a xlink:type="simple" xlink:href="../lab_03.md" office:name=""><text:span text:style-name="Definition">Лабораторна робота №3</text:span></text:a><text:bookmark-end text:name="лабораторна-робота-3"/></text:h>
      <text:list text:style-name="L8">
        <text:list-item>
          <text:p text:style-name="P8">Тема</text:p>
        </text:list-item>
        <text:list-item>
          <text:p text:style-name="P8">Мета</text:p>
        </text:list-item>
        <text:list-item>
          <text:p text:style-name="P8">Теоретичні відомості</text:p>
          <text:list text:style-name="L9">
            <text:list-item>
              <text:p text:style-name="P9">Класи та об’єкти</text:p>
            </text:list-item>
            <text:list-item>
              <text:p text:style-name="P9">Інкапсуляція</text:p>
            </text:list-item>
            <text:list-item>
              <text:p text:style-name="P9">Наслідування</text:p>
            </text:list-item>
            <text:list-item>
              <text:p text:style-name="P9">Інтерфейси</text:p>
            </text:list-item>
            <text:list-item>
              <text:p text:style-name="P9">Поліморфізм</text:p>
            </text:list-item>
            <text:list-item>
              <text:p text:style-name="P9">Записи (records)</text:p>
            </text:list-item>
            <text:list-item>
              <text:p text:style-name="P9">Запечатані класи (sealed classes)</text:p>
            </text:list-item>
            <text:list-item>
              <text:p text:style-name="P9">Приклад з репозиторію java-iot</text:p>
            </text:list-item>
          </text:list>
        </text:list-item>
        <text:list-item>
          <text:p text:style-name="P8">Хід виконання роботи</text:p>
        </text:list-item>
        <text:list-item>
          <text:p text:style-name="P8">Індивідуальні завдання (варіанти 1–15)</text:p>
        </text:list-item>
        <text:list-item>
          <text:p text:style-name="P8">Контрольні запитання (15 запитань)</text:p>
        </text:list-item>
        <text:list-item>
          <text:p text:style-name="P8">Перелік посилань</text:p>
        </text:list-item>
      </text:list>
      <text:h text:style-name="Heading_20_3" text:outline-level="3"><text:bookmark-start text:name="лабораторна-робота-4"/><text:a xlink:type="simple" xlink:href="../lab_04.md" office:name=""><text:span text:style-name="Definition">Лабораторна робота №4</text:span></text:a><text:bookmark-end text:name="лабораторна-робота-4"/></text:h>
      <text:list text:style-name="L10">
        <text:list-item>
          <text:p text:style-name="P10">Тема</text:p>
        </text:list-item>
        <text:list-item>
          <text:p text:style-name="P10">Мета</text:p>
        </text:list-item>
        <text:list-item>
          <text:p text:style-name="P10">Теоретичні відомості</text:p>
          <text:list text:style-name="L11">
            <text:list-item>
              <text:p text:style-name="P11">Клас <text:span text:style-name="Source_20_Text">String</text:span></text:p>
            </text:list-item>
            <text:list-item>
              <text:p text:style-name="P11">Пул рядків (String Pool)</text:p>
            </text:list-item>
            <text:list-item>
              <text:p text:style-name="P11">Текстові блоки (Text Blocks)</text:p>
            </text:list-item>
            <text:list-item>
              <text:p text:style-name="P11"><text:span text:style-name="Source_20_Text">StringBuilder</text:span> та <text:span text:style-name="Source_20_Text">StringBuffer</text:span></text:p>
            </text:list-item>
            <text:list-item>
              <text:p text:style-name="P11">Форматування</text:p>
            </text:list-item>
            <text:list-item>
              <text:p text:style-name="P11"><text:span text:style-name="Source_20_Text">StringJoiner</text:span> та <text:span text:style-name="Source_20_Text">String.join</text:span></text:p>
            </text:list-item>
            <text:list-item>
              <text:p text:style-name="P11">Регулярні вирази</text:p>
            </text:list-item>
            <text:list-item>
              <text:p text:style-name="P11">Приклад з репозиторію java-iot</text:p>
            </text:list-item>
          </text:list>
        </text:list-item>
        <text:list-item>
          <text:p text:style-name="P10">Хід виконання роботи</text:p>
        </text:list-item>
        <text:list-item>
          <text:p text:style-name="P10">Індивідуальні завдання (варіанти 1–15)</text:p>
        </text:list-item>
        <text:list-item>
          <text:p text:style-name="P10">Контрольні запитання (15 запитань)</text:p>
        </text:list-item>
        <text:list-item>
          <text:p text:style-name="P10">Перелік посилань</text:p>
        </text:list-item>
      </text:list>
      <text:h text:style-name="Heading_20_3" text:outline-level="3"><text:bookmark-start text:name="лабораторна-робота-5"/><text:a xlink:type="simple" xlink:href="../lab_05.md" office:name=""><text:span text:style-name="Definition">Лабораторна робота №5</text:span></text:a><text:bookmark-end text:name="лабораторна-робота-5"/></text:h>
      <text:list text:style-name="L12">
        <text:list-item>
          <text:p text:style-name="P12">Тема</text:p>
        </text:list-item>
        <text:list-item>
          <text:p text:style-name="P12">Мета</text:p>
        </text:list-item>
        <text:list-item>
          <text:p text:style-name="P12">Теоретичні відомості</text:p>
          <text:list text:style-name="L13">
            <text:list-item>
              <text:p text:style-name="P13">Ієрархія потоків у <text:span text:style-name="Source_20_Text">java.io</text:span></text:p>
            </text:list-item>
            <text:list-item>
              <text:p text:style-name="P13"><text:span text:style-name="Source_20_Text">java.nio.file</text:span> — сучасний API</text:p>
            </text:list-item>
            <text:list-item>
              <text:p text:style-name="P13"><text:span text:style-name="Source_20_Text">BufferedReader</text:span> з <text:span text:style-name="Source_20_Text">try-with-resources</text:span></text:p>
            </text:list-item>
            <text:list-item>
              <text:p text:style-name="P13">Файлова система: <text:span text:style-name="Source_20_Text">Path</text:span> та <text:span text:style-name="Source_20_Text">Files</text:span></text:p>
            </text:list-item>
            <text:list-item>
              <text:p text:style-name="P13">Серіалізація об’єктів</text:p>
            </text:list-item>
            <text:list-item>
              <text:p text:style-name="P13">Формат CSV</text:p>
            </text:list-item>
            <text:list-item>
              <text:p text:style-name="P13">Приклад з репозиторію java-iot</text:p>
            </text:list-item>
          </text:list>
        </text:list-item>
        <text:list-item>
          <text:p text:style-name="P12">Хід виконання роботи</text:p>
        </text:list-item>
        <text:list-item>
          <text:p text:style-name="P12">Індивідуальні завдання (варіанти 1–15)</text:p>
        </text:list-item>
        <text:list-item>
          <text:p text:style-name="P12">Контрольні запитання (15 запитань)</text:p>
        </text:list-item>
        <text:list-item>
          <text:p text:style-name="P12">Перелік посилань</text:p>
        </text:list-item>
      </text:list>
      <text:h text:style-name="Heading_20_3" text:outline-level="3"><text:bookmark-start text:name="лабораторна-робота-6"/><text:a xlink:type="simple" xlink:href="../lab_06.md" office:name=""><text:span text:style-name="Definition">Лабораторна робота №6</text:span></text:a><text:bookmark-end text:name="лабораторна-робота-6"/></text:h>
      <text:list text:style-name="L14">
        <text:list-item>
          <text:p text:style-name="P14">Тема</text:p>
        </text:list-item>
        <text:list-item>
          <text:p text:style-name="P14">Мета</text:p>
        </text:list-item>
        <text:list-item>
          <text:p text:style-name="P14">Теоретичні відомості</text:p>
          <text:list text:style-name="L15">
            <text:list-item>
              <text:p text:style-name="P15">Java Collections Framework</text:p>
            </text:list-item>
            <text:list-item>
              <text:p text:style-name="P15">Клас <text:span text:style-name="Source_20_Text">Collections</text:span></text:p>
            </text:list-item>
            <text:list-item>
              <text:p text:style-name="P15">Stream API</text:p>
            </text:list-item>
            <text:list-item>
              <text:p text:style-name="P15">JUnit 5 — структура тестів</text:p>
            </text:list-item>
            <text:list-item>
              <text:p text:style-name="P15">Приклад з репозиторію java-iot</text:p>
            </text:list-item>
          </text:list>
        </text:list-item>
        <text:list-item>
          <text:p text:style-name="P14">Хід виконання роботи</text:p>
        </text:list-item>
        <text:list-item>
          <text:p text:style-name="P14">Індивідуальні завдання (варіанти 1–15)</text:p>
        </text:list-item>
        <text:list-item>
          <text:p text:style-name="P14">Контрольні запитання (15 запитань)</text:p>
        </text:list-item>
        <text:list-item>
          <text:p text:style-name="P14">Перелік посилань</text:p>
        </text:list-item>
      </text:list>
      <text:h text:style-name="Heading_20_3" text:outline-level="3"><text:bookmark-start text:name="лабораторна-робота-7"/><text:a xlink:type="simple" xlink:href="../lab_07.md" office:name=""><text:span text:style-name="Definition">Лабораторна робота №7</text:span></text:a><text:bookmark-end text:name="лабораторна-робота-7"/></text:h>
      <text:list text:style-name="L16">
        <text:list-item>
          <text:p text:style-name="P16">Тема</text:p>
        </text:list-item>
        <text:list-item>
          <text:p text:style-name="P16">Мета</text:p>
        </text:list-item>
        <text:list-item>
          <text:p text:style-name="P16">Теоретичні відомості</text:p>
          <text:list text:style-name="L17">
            <text:list-item>
              <text:p text:style-name="P17">Огляд GUI-бібліотек Java</text:p>
            </text:list-item>
            <text:list-item>
              <text:p text:style-name="P17">Основні компоненти Swing</text:p>
            </text:list-item>
            <text:list-item>
              <text:p text:style-name="P17">Структура Swing-застосунку</text:p>
            </text:list-item>
            <text:list-item>
              <text:p text:style-name="P17">Менеджери розміщення</text:p>
            </text:list-item>
            <text:list-item>
              <text:p text:style-name="P17">Подієва модель</text:p>
            </text:list-item>
            <text:list-item>
              <text:p text:style-name="P17">Look and Feel</text:p>
            </text:list-item>
            <text:list-item>
              <text:p text:style-name="P17">Приклад з репозиторію java-iot</text:p>
            </text:list-item>
          </text:list>
        </text:list-item>
        <text:list-item>
          <text:p text:style-name="P16">Хід виконання роботи</text:p>
        </text:list-item>
        <text:list-item>
          <text:p text:style-name="P16">Індивідуальні завдання (варіанти 1–15)</text:p>
        </text:list-item>
        <text:list-item>
          <text:p text:style-name="P16">Контрольні запитання (15 запитань)</text:p>
        </text:list-item>
        <text:list-item>
          <text:p text:style-name="P16">Перелік посилань</text:p>
        </text:list-item>
      </text:list>
      <text:h text:style-name="Heading_20_3" text:outline-level="3"><text:bookmark-start text:name="лабораторна-робота-8"/><text:a xlink:type="simple" xlink:href="../lab_08.md" office:name=""><text:span text:style-name="Definition">Лабораторна робота №8</text:span></text:a><text:bookmark-end text:name="лабораторна-робота-8"/></text:h>
      <text:list text:style-name="L18">
        <text:list-item>
          <text:p text:style-name="P18">Тема</text:p>
        </text:list-item>
        <text:list-item>
          <text:p text:style-name="P18">Мета</text:p>
        </text:list-item>
        <text:list-item>
          <text:p text:style-name="P18">Теоретичні відомості</text:p>
          <text:list text:style-name="L19">
            <text:list-item>
              <text:p text:style-name="P19">Основи мережевої моделі</text:p>
            </text:list-item>
            <text:list-item>
              <text:p text:style-name="P19">TCP-сервер (<text:span text:style-name="Source_20_Text">ServerSocket</text:span>)</text:p>
            </text:list-item>
            <text:list-item>
              <text:p text:style-name="P19">TCP-клієнт (<text:span text:style-name="Source_20_Text">Socket</text:span>)</text:p>
            </text:list-item>
            <text:list-item>
              <text:p text:style-name="P19">HTTP-клієнт (<text:span text:style-name="Source_20_Text">java.net.http</text:span>)</text:p>
            </text:list-item>
            <text:list-item>
              <text:p text:style-name="P19">Асинхронний HTTP (sendAsync)</text:p>
            </text:list-item>
            <text:list-item>
              <text:p text:style-name="P19">UDP (датаграми)</text:p>
            </text:list-item>
            <text:list-item>
              <text:p text:style-name="P19">Приклад з репозиторію java-iot</text:p>
            </text:list-item>
          </text:list>
        </text:list-item>
        <text:list-item>
          <text:p text:style-name="P18">Хід виконання роботи</text:p>
        </text:list-item>
        <text:list-item>
          <text:p text:style-name="P18">Індивідуальні завдання (варіанти 1–15)</text:p>
        </text:list-item>
        <text:list-item>
          <text:p text:style-name="P18">Контрольні запитання (15 запитань)</text:p>
        </text:list-item>
        <text:list-item>
          <text:p text:style-name="P18">Перелік посилань</text:p>
        </text:list-item>
      </text:list>
      <text:h text:style-name="Heading_20_3" text:outline-level="3"><text:bookmark-start text:name="лабораторна-робота-9"/><text:a xlink:type="simple" xlink:href="../lab_09.md" office:name=""><text:span text:style-name="Definition">Лабораторна робота №9</text:span></text:a><text:bookmark-end text:name="лабораторна-робота-9"/></text:h>
      <text:list text:style-name="L20">
        <text:list-item>
          <text:p text:style-name="P20">Тема</text:p>
        </text:list-item>
        <text:list-item>
          <text:p text:style-name="P20">Мета</text:p>
        </text:list-item>
        <text:list-item>
          <text:p text:style-name="P20">Теоретичні відомості</text:p>
          <text:list text:style-name="L21">
            <text:list-item>
              <text:p text:style-name="P21">Потоки виконання (Threads)</text:p>
            </text:list-item>
            <text:list-item>
              <text:p text:style-name="P21">Стани потоку</text:p>
            </text:list-item>
            <text:list-item>
              <text:p text:style-name="P21"><text:span text:style-name="Source_20_Text">ExecutorService</text:span> — пул потоків</text:p>
            </text:list-item>
            <text:list-item>
              <text:p text:style-name="P21"><text:span text:style-name="Source_20_Text">Callable</text:span> та <text:span text:style-name="Source_20_Text">Future</text:span></text:p>
            </text:list-item>
            <text:list-item>
              <text:p text:style-name="P21"><text:span text:style-name="Source_20_Text">CompletableFuture</text:span></text:p>
            </text:list-item>
            <text:list-item>
              <text:p text:style-name="P21">Синхронізація: <text:span text:style-name="Source_20_Text">synchronized</text:span></text:p>
            </text:list-item>
            <text:list-item>
              <text:p text:style-name="P21"><text:span text:style-name="Source_20_Text">volatile</text:span></text:p>
            </text:list-item>
            <text:list-item>
              <text:p text:style-name="P21">Атомарні класи</text:p>
            </text:list-item>
            <text:list-item>
              <text:p text:style-name="P21">Блокування: <text:span text:style-name="Source_20_Text">Lock</text:span> та <text:span text:style-name="Source_20_Text">ReentrantLock</text:span></text:p>
            </text:list-item>
            <text:list-item>
              <text:p text:style-name="P21">Віртуальні потоки (Java 21+)</text:p>
            </text:list-item>
            <text:list-item>
              <text:p text:style-name="P21">Приклад з репозиторію java-iot</text:p>
            </text:list-item>
          </text:list>
        </text:list-item>
        <text:list-item>
          <text:p text:style-name="P20">Хід виконання роботи</text:p>
        </text:list-item>
        <text:list-item>
          <text:p text:style-name="P20">Індивідуальні завдання (варіанти 1–15)</text:p>
        </text:list-item>
        <text:list-item>
          <text:p text:style-name="P20">Контрольні запитання (15 запитань)</text:p>
        </text:list-item>
        <text:list-item>
          <text:p text:style-name="P20">Перелік посилань</text:p>
        </text:list-item>
      </text:list>
      <text:h text:style-name="Heading_20_3" text:outline-level="3"><text:bookmark-start text:name="лабораторна-робота-10"/><text:a xlink:type="simple" xlink:href="../lab_10.md" office:name=""><text:span text:style-name="Definition">Лабораторна робота №10</text:span></text:a><text:bookmark-end text:name="лабораторна-робота-10"/></text:h>
      <text:list text:style-name="L22">
        <text:list-item>
          <text:p text:style-name="P22">Тема</text:p>
        </text:list-item>
        <text:list-item>
          <text:p text:style-name="P22">Мета</text:p>
        </text:list-item>
        <text:list-item>
          <text:p text:style-name="P22">Теоретичні відомості</text:p>
          <text:list text:style-name="L23">
            <text:list-item>
              <text:p text:style-name="P23">Архітектура JDBC</text:p>
            </text:list-item>
            <text:list-item>
              <text:p text:style-name="P23">SQLite як навчальна база даних</text:p>
            </text:list-item>
            <text:list-item>
              <text:p text:style-name="P23">Підключення та базові операції</text:p>
            </text:list-item>
            <text:list-item>
              <text:p text:style-name="P23">Транзакції</text:p>
            </text:list-item>
            <text:list-item>
              <text:p text:style-name="P23">Патерн репозиторію (Repository Pattern)</text:p>
            </text:list-item>
            <text:list-item>
              <text:p text:style-name="P23">Запобігання SQL-ін’єкціям</text:p>
            </text:list-item>
            <text:list-item>
              <text:p text:style-name="P23">Приклад з репозиторію java-iot</text:p>
            </text:list-item>
          </text:list>
        </text:list-item>
        <text:list-item>
          <text:p text:style-name="P22">Хід виконання роботи</text:p>
        </text:list-item>
        <text:list-item>
          <text:p text:style-name="P22">Індивідуальні завдання (варіанти 1–15)</text:p>
        </text:list-item>
        <text:list-item>
          <text:p text:style-name="P22">Контрольні запитання (15 запитань)</text:p>
        </text:list-item>
        <text:list-item>
          <text:p text:style-name="P22">Перелік посилань</text:p>
        </text:list-item>
      </text:list>
      <text:h text:style-name="Heading_20_1" text:outline-level="1"><text:bookmark-start text:name="лабораторна-робота-1-1"/>Лабораторна робота №1<text:bookmark-end text:name="лабораторна-робота-1-1"/></text:h>
      <text:h text:style-name="Heading_20_2" text:outline-level="2"><text:bookmark-start text:name="ознайомлення-з-компонентами-java-sdk.-перша-програма-компіляція-і-виконання"/>Ознайомлення з компонентами Java SDK. Перша програма: компіляція і виконання<text:bookmark-end text:name="ознайомлення-з-компонентами-java-sdk.-перша-програма-компіляція-і-виконання"/></text:h>
      <text:p text:style-name="Horizontal_20_Line"/>
      <text:h text:style-name="Heading_20_3" text:outline-level="3"><text:bookmark-start text:name="тема"/>Тема<text:bookmark-end text:name="тема"/></text:h>
      <text:p text:style-name="First_20_paragraph">Ознайомлення з компонентами Java Development Kit (JDK), засобами компіляції та виконання Java-програм у командному рядку.</text:p>
      <text:p text:style-name="Horizontal_20_Line"/>
      <text:h text:style-name="Heading_20_3" text:outline-level="3"><text:bookmark-start text:name="мета"/>Мета<text:bookmark-end text:name="мета"/></text:h>
      <text:p text:style-name="First_20_paragraph">Набути практичних навичок встановлення та налаштування JDK 25, написання, компіляції та запуску першої програми мовою Java шляхом безпосередньої роботи з інструментами командного рядка <text:span text:style-name="Source_20_Text">javac</text:span> та <text:span text:style-name="Source_20_Text">java</text:span>.</text:p>
      <text:p text:style-name="Horizontal_20_Line"/>
      <text:h text:style-name="Heading_20_3" text:outline-level="3"><text:bookmark-start text:name="теоретичні-відомості"/>Теоретичні відомості<text:bookmark-end text:name="теоретичні-відомості"/></text:h>
      <text:h text:style-name="Heading_20_4" text:outline-level="4"><text:bookmark-start text:name="архітектура-платформи-java"/>Архітектура платформи Java<text:bookmark-end text:name="архітектура-платформи-java"/></text:h>
      <text:p text:style-name="First_20_paragraph">Платформа Java складається з трьох ключових компонентів:</text:p>
      <text:list text:style-name="L24">
        <text:list-item>
          <text:p text:style-name="P24"><text:span text:style-name="T1">JDK (Java Development Kit)</text:span> — повний набір засобів для розробки: включає компілятор <text:span text:style-name="Source_20_Text">javac</text:span>, інструмент документування <text:span text:style-name="Source_20_Text">javadoc</text:span>, налагоджувач <text:span text:style-name="Source_20_Text">jdb</text:span>, засоби профілювання та JRE.</text:p>
        </text:list-item>
        <text:list-item>
          <text:p text:style-name="P24"><text:span text:style-name="T1">JRE (Java Runtime Environment)</text:span> — середовище виконання: містить JVM та стандартну бібліотеку класів. Починаючи з JDK 11, окремий дистрибутив JRE більше не поставляється — JDK використовується безпосередньо.</text:p>
        </text:list-item>
        <text:list-item>
          <text:p text:style-name="P24"><text:span text:style-name="T1">JVM (Java Virtual Machine)</text:span> — віртуальна машина, що виконує байт-код. Саме JVM забезпечує незалежність від платформи.</text:p>
        </text:list-item>
      </text:list>
      <text:h text:style-name="Heading_20_4" text:outline-level="4"><text:bookmark-start text:name="модель-компіляції-та-виконання"/>Модель компіляції та виконання<text:bookmark-end text:name="модель-компіляції-та-виконання"/></text:h>
      <text:p text:style-name="P25">Вихідний код (.java)</text:p>
      <text:p text:style-name="P26"><text:s text:c="8"/>↓ <text:s text:c="1"/>javac (компілятор)</text:p>
      <text:p text:style-name="P27">Байт-код (.class)</text:p>
      <text:p text:style-name="P28"><text:s text:c="8"/>↓ <text:s text:c="1"/>java (JVM)</text:p>
      <text:p text:style-name="P29">Виконання програми</text:p>
      <text:p text:style-name="First_20_paragraph">Компілятор <text:span text:style-name="Source_20_Text">javac</text:span> перетворює текст програми (<text:span text:style-name="Source_20_Text">.java</text:span>) на платформо-незалежний байт-код (<text:span text:style-name="Source_20_Text">.class</text:span>). Інтерпретатор JVM виконує байт-код, перетворюючи його на машинні інструкції цільової системи (JIT-компіляція).</text:p>
      <text:h text:style-name="Heading_20_4" text:outline-level="4"><text:bookmark-start text:name="структура-програми-java"/>Структура програми Java<text:bookmark-end text:name="структура-програми-java"/></text:h>
      <text:p text:style-name="P30">// Ім'я файлу: HelloWorld.java</text:p>
      <text:p text:style-name="P31">package ua.edu.example; // необов'язковий оголошувач пакету</text:p>
      <text:p text:style-name="P32"/>
      <text:p text:style-name="P33">// Клас — основна структурна одиниця Java</text:p>
      <text:p text:style-name="P34">public class HelloWorld {</text:p>
      <text:p text:style-name="P35"/>
      <text:p text:style-name="P36"><text:s text:c="4"/>// Точка входу: метод main</text:p>
      <text:p text:style-name="P37"><text:s text:c="4"/>public static void main(String[] args) {</text:p>
      <text:p text:style-name="P38"><text:s text:c="8"/>// Виведення рядка на стандартний вихід</text:p>
      <text:p text:style-name="P39"><text:s text:c="8"/>System.out.println("Привіт, Java 25!");</text:p>
      <text:p text:style-name="P40"><text:s text:c="4"/>}</text:p>
      <text:p text:style-name="P41">}</text:p>
      <text:p text:style-name="First_20_paragraph"><text:span text:style-name="T1">Ключові правила:</text:span> - Ім’я публічного класу повинно збігатися з іменем файлу (без розширення). - Метод <text:span text:style-name="Source_20_Text">main</text:span> з сигнатурою <text:span text:style-name="Source_20_Text">public static void main(String[] args)</text:span> є стандартною точкою входу; у JDK 25 допускаються також «безіменні» класи (unnamed classes) для коротких програм. - Пакет (<text:span text:style-name="Source_20_Text">package</text:span>) — простір імен для організації класів; відповідає структурі директорій.</text:p>
      <text:h text:style-name="Heading_20_4" text:outline-level="4"><text:bookmark-start text:name="компіляція-та-запуск-у-командному-рядку"/>Компіляція та запуск у командному рядку<text:bookmark-end text:name="компіляція-та-запуск-у-командному-рядку"/></text:h>
      <text:p text:style-name="P42"># Компіляція</text:p>
      <text:p text:style-name="P43">javac HelloWorld.java</text:p>
      <text:p text:style-name="P44"/>
      <text:p text:style-name="P45"># Запуск (вказувати .class НЕ потрібно)</text:p>
      <text:p text:style-name="P46">java HelloWorld</text:p>
      <text:p text:style-name="P47"/>
      <text:p text:style-name="P48"># З пакетом</text:p>
      <text:p text:style-name="P49">javac -d out src/ua/edu/example/HelloWorld.java</text:p>
      <text:p text:style-name="P50">java -cp out ua.edu.example.HelloWorld</text:p>
      <text:h text:style-name="Heading_20_4" text:outline-level="4"><text:bookmark-start text:name="стандартна-бібліотека-та-модульна-система"/>Стандартна бібліотека та модульна система<text:bookmark-end text:name="стандартна-бібліотека-та-модульна-система"/></text:h>
      <text:p text:style-name="First_20_paragraph">JDK 25 організований за модульною системою (JPMS, введеною у JDK 9). Модуль <text:span text:style-name="Source_20_Text">java.base</text:span> завантажується автоматично і містить пакети <text:span text:style-name="Source_20_Text">java.lang</text:span>, <text:span text:style-name="Source_20_Text">java.util</text:span>, <text:span text:style-name="Source_20_Text">java.io</text:span> та ін. Клас <text:span text:style-name="Source_20_Text">java.lang.System</text:span> надає поля <text:span text:style-name="Source_20_Text">in</text:span>, <text:span text:style-name="Source_20_Text">out</text:span>, <text:span text:style-name="Source_20_Text">err</text:span> для стандартного I/O.</text:p>
      <text:h text:style-name="Heading_20_4" text:outline-level="4"><text:bookmark-start text:name="типи-даних-та-оператор-var"/>Типи даних та оператор <text:span text:style-name="Source_20_Text">var</text:span><text:bookmark-end text:name="типи-даних-та-оператор-var"/></text:h>
      <text:p text:style-name="First_20_paragraph">Для локальних змінних з Java 10 підтримується виведення типу через <text:span text:style-name="Source_20_Text">var</text:span>:</text:p>
      <text:p text:style-name="P51">var message = "Привіт!"; // тип String виводиться автоматично</text:p>
      <text:p text:style-name="P52">var count = 42; <text:s text:c="10"/>// тип int</text:p>
      <text:h text:style-name="Heading_20_4" text:outline-level="4"><text:bookmark-start text:name="безіменні-класи-jdk-25"/>Безіменні класи (JDK 25)<text:bookmark-end text:name="безіменні-класи-jdk-25"/></text:h>
      <text:p text:style-name="First_20_paragraph">У JDK 25 стабілізовано можливість запускати програми без явного оголошення класу та методу <text:span text:style-name="Source_20_Text">main</text:span>:</text:p>
      <text:p text:style-name="P53">// Файл: Hello.java — запускається командою: java Hello.java</text:p>
      <text:p text:style-name="P54">void main() {</text:p>
      <text:p text:style-name="P55"><text:s text:c="4"/>System.out.println("Безіменний клас у JDK 25!");</text:p>
      <text:p text:style-name="P56">}</text:p>
      <text:p text:style-name="First_20_paragraph">Це зручно для навчальних прикладів; у продуктивному коді слід використовувати повну форму.</text:p>
      <text:p text:style-name="Horizontal_20_Line"/>
      <text:h text:style-name="Heading_20_3" text:outline-level="3"><text:bookmark-start text:name="хід-виконання-роботи"/>Хід виконання роботи<text:bookmark-end text:name="хід-виконання-роботи"/></text:h>
      <text:list text:style-name="L25">
        <text:list-item>
          <text:p text:style-name="P57">Перевірити встановлення JDK: виконати команду <text:span text:style-name="Source_20_Text">java -version</text:span> та <text:span text:style-name="Source_20_Text">javac -version</text:span> у терміналі. Переконатися, що версія відповідає JDK 25.</text:p>
        </text:list-item>
        <text:list-item>
          <text:p text:style-name="P57">Ознайомитися зі структурою директорії JDK: переглянути вміст <text:span text:style-name="Source_20_Text">JAVA_HOME/bin</text:span>, <text:span text:style-name="Source_20_Text">JAVA_HOME/lib</text:span>. Визначити призначення ключових інструментів (<text:span text:style-name="Source_20_Text">javac</text:span>, <text:span text:style-name="Source_20_Text">java</text:span>, <text:span text:style-name="Source_20_Text">jar</text:span>, <text:span text:style-name="Source_20_Text">javadoc</text:span>).</text:p>
        </text:list-item>
        <text:list-item>
          <text:p text:style-name="P57">Ознайомитися з навчальним репозиторієм <text:span text:style-name="Source_20_Text">java-iot</text:span>: клонувати або відкрити у браузері файл <text:a xlink:type="simple" xlink:href="https://github.com/AndriyLutskiv/java-iot/blob/main/core/src/main/java/ua/crowpi/core/launcher/Launcher.java" office:name=""><text:span text:style-name="Definition"><text:span text:style-name="Source_20_Text">core/src/main/java/ua/crowpi/core/launcher/Launcher.java</text:span></text:span></text:a>. Проаналізувати структуру класу, точку входу <text:span text:style-name="Source_20_Text">main</text:span>, аргументи командного рядка.</text:p>
        </text:list-item>
        <text:list-item>
          <text:p text:style-name="P57">Переглянути інтерфейс <text:a xlink:type="simple" xlink:href="https://github.com/AndriyLutskiv/java-iot/blob/main/core/src/main/java/ua/crowpi/core/CrowPiProject.java" office:name=""><text:span text:style-name="Definition"><text:span text:style-name="Source_20_Text">CrowPiProject.java</text:span></text:span></text:a> — звернути увагу на оголошення інтерфейсу, методів та їхні типи повернення.</text:p>
        </text:list-item>
        <text:list-item>
          <text:p text:style-name="P57">Налаштувати IDE (IntelliJ IDEA або VSCode з розширенням Extension Pack for Java): створити новий Java-проєкт, вказати JDK 25 як SDK.</text:p>
        </text:list-item>
        <text:list-item>
          <text:p text:style-name="P57">Створити файл відповідно до свого варіанту індивідуального завдання. Дотримуватися структури: оголошення пакету, оголошення класу, метод <text:span text:style-name="Source_20_Text">main</text:span>.</text:p>
        </text:list-item>
        <text:list-item>
          <text:p text:style-name="P57">Скомпілювати програму через IDE або командою <text:span text:style-name="Source_20_Text">javac &lt;ім'я файлу&gt;.java</text:span> у терміналі. Проаналізувати повідомлення про помилки, якщо вони виникнуть.</text:p>
        </text:list-item>
        <text:list-item>
          <text:p text:style-name="P57">Запустити програму та перевірити відповідність виводу умові завдання.</text:p>
        </text:list-item>
        <text:list-item>
          <text:p text:style-name="P57">Навмисно внести синтаксичну помилку (наприклад, пропустити крапку з комою) та проаналізувати повідомлення компілятора.</text:p>
        </text:list-item>
        <text:list-item>
          <text:p text:style-name="P57">Виконати програму з аргументами командного рядка (<text:span text:style-name="Source_20_Text">java &lt;Клас&gt; arg1 arg2</text:span>), якщо передбачено варіантом. Переконатися, що <text:span text:style-name="Source_20_Text">args[0]</text:span>, <text:span text:style-name="Source_20_Text">args[1]</text:span> обробляються коректно.</text:p>
        </text:list-item>
        <text:list-item>
          <text:p text:style-name="P57">Згенерувати документацію Javadoc командою <text:span text:style-name="Source_20_Text">javadoc -d doc &lt;ім'я файлу&gt;.java</text:span>. Переглянути результат у браузері.</text:p>
        </text:list-item>
        <text:list-item>
          <text:p text:style-name="P57">Оформити звіт: зафіксувати результати компіляції та запуску (знімки екрану або текстовий вивід).</text:p>
        </text:list-item>
      </text:list>
      <text:p text:style-name="Horizontal_20_Line"/>
      <text:h text:style-name="Heading_20_3" text:outline-level="3"><text:bookmark-start text:name="індивідуальні-завдання"/>Індивідуальні завдання<text:bookmark-end text:name="індивідуальні-завдання"/></text:h>
      <text:p text:style-name="First_20_paragraph">Розробити програму мовою Java відповідно до варіанту. Кожна програма: один клас, точка входу <text:span text:style-name="Source_20_Text">main</text:span>, коректно компілюється та виконується у JDK 25.</text:p>
      <text:p text:style-name="Text_20_body"><text:span text:style-name="T1">Варіант 1.</text:span> Написати програму, що виводить інформацію про студента (прізвище, ім’я, група, рік вступу) у вигляді форматованої таблиці за допомогою <text:span text:style-name="Source_20_Text">System.out.printf</text:span>. Дані задати константами у методі <text:span text:style-name="Source_20_Text">main</text:span>.</text:p>
      <text:p text:style-name="Text_20_body"><text:span text:style-name="T1">Варіант 2.</text:span> Написати програму, що приймає з командного рядка два цілих числа (аргументи <text:span text:style-name="Source_20_Text">args[0]</text:span> та <text:span text:style-name="Source_20_Text">args[1]</text:span>) і виводить їх суму, різницю, добуток та частку. Передбачити перевірку кількості аргументів.</text:p>
      <text:p text:style-name="Text_20_body"><text:span text:style-name="T1">Варіант 3.</text:span> Написати програму-калькулятор температур: приймає значення у градусах Цельсія з командного рядка (<text:span text:style-name="Source_20_Text">args[0]</text:span>), виводить відповідне значення у Фаренгейтах та Кельвінах з поясненнями.</text:p>
      <text:p text:style-name="Text_20_body"><text:span text:style-name="T1">Варіант 4.</text:span> Написати програму, що виводить таблицю множення (10×10) у форматі сітки за допомогою вкладених циклів <text:span text:style-name="Source_20_Text">for</text:span> та <text:span text:style-name="Source_20_Text">System.out.printf</text:span> для вирівнювання стовпців.</text:p>
      <text:p text:style-name="Text_20_body"><text:span text:style-name="T1">Варіант 5.</text:span> Написати програму, що виводить ASCII-арт прямокутника задaних розмірів (рядки та стовпці приймаються з <text:span text:style-name="Source_20_Text">args[0]</text:span> та <text:span text:style-name="Source_20_Text">args[1]</text:span>) із символу <text:span text:style-name="Source_20_Text">*</text:span>. Межі — <text:span text:style-name="Source_20_Text">*</text:span>, внутрішня частина — пробіли.</text:p>
      <text:p text:style-name="Text_20_body"><text:span text:style-name="T1">Варіант 6.</text:span> Написати програму, що обчислює та виводить перші 20 чисел Фібоначчі. Використати цикл <text:span text:style-name="Source_20_Text">for</text:span> та дві змінні для зберігання попередніх значень. Форматувати вивід: кожне число з порядковим номером.</text:p>
      <text:p text:style-name="Text_20_body"><text:span text:style-name="T1">Варіант 7.</text:span> Написати програму, що приймає рядок з <text:span text:style-name="Source_20_Text">args[0]</text:span> і визначає, чи є він паліндромом (читається однаково в обох напрямках). Ігнорувати регістр символів. Вивести результат з поясненням.</text:p>
      <text:p text:style-name="Text_20_body"><text:span text:style-name="T1">Варіант 8.</text:span> Написати програму-лічильник: виводить числа від 1 до 100, але замість чисел, кратних 3, виводить «Fizz», кратних 5 — «Buzz», кратних 15 — «FizzBuzz» (класична задача FizzBuzz).</text:p>
      <text:p text:style-name="Text_20_body"><text:span text:style-name="T1">Варіант 9.</text:span> Написати програму, що обчислює факторіал числа, отриманого з <text:span text:style-name="Source_20_Text">args[0]</text:span>. Передбачити перевірку діапазону (0–20) та повідомлення про помилку при некоректному вводі. Використати тип <text:span text:style-name="Source_20_Text">long</text:span>.</text:p>
      <text:p text:style-name="Text_20_body"><text:span text:style-name="T1">Варіант 10.</text:span> Написати програму, що виводить просте зображення будиночка символами ASCII: дах (<text:span text:style-name="Source_20_Text">/\</text:span>), стіни (<text:span text:style-name="Source_20_Text">|</text:span>), вікно (<text:span text:style-name="Source_20_Text">[]</text:span>), двері (<text:span text:style-name="Source_20_Text">||</text:span>). Розміри фіксовані, оголошені як константи (<text:span text:style-name="Source_20_Text">static final int</text:span>).</text:p>
      <text:p text:style-name="Text_20_body"><text:span text:style-name="T1">Варіант 11.</text:span> Написати програму, що приймає три числа з аргументів командного рядка і знаходить найбільше з них без використання методу <text:span text:style-name="Source_20_Text">Math.max</text:span>. Вивести результат з поясненням порівнянь.</text:p>
      <text:p text:style-name="Text_20_body"><text:span text:style-name="T1">Варіант 12.</text:span> Написати програму, що перевіряє, чи є число, передане у <text:span text:style-name="Source_20_Text">args[0]</text:span>, простим (має ділитися лише на 1 та на себе). Вивести повідомлення та обґрунтування перевірки.</text:p>
      <text:p text:style-name="Text_20_body"><text:span text:style-name="T1">Варіант 13.</text:span> Написати програму-конвертор одиниць: приймає відстань у кілометрах (<text:span text:style-name="Source_20_Text">args[0]</text:span>) і виводить її у милях, морських милях та метрах. Коефіцієнти оголосити як <text:span text:style-name="Source_20_Text">static final double</text:span>.</text:p>
      <text:p text:style-name="Text_20_body"><text:span text:style-name="T1">Варіант 14.</text:span> Написати програму, що виводить діагональний хрест <text:span text:style-name="Source_20_Text">X</text:span> розміром N×N (N приймається з <text:span text:style-name="Source_20_Text">args[0]</text:span>, непарне ціле від 3 до 15). Клітини діагоналей — <text:span text:style-name="Source_20_Text">*</text:span>, решта — пробіли.</text:p>
      <text:p text:style-name="Text_20_body"><text:span text:style-name="T1">Варіант 15.</text:span> Написати програму, що читає ціле число з <text:span text:style-name="Source_20_Text">args[0]</text:span> і виводить всі його дільники, а також визначає, чи є число «досконалим» (сума дільників, крім самого числа, дорівнює числу). Приклад: 6 = 1+2+3.</text:p>
      <text:p text:style-name="Horizontal_20_Line"/>
      <text:h text:style-name="Heading_20_3" text:outline-level="3"><text:bookmark-start text:name="контрольні-запитання"/>Контрольні запитання<text:bookmark-end text:name="контрольні-запитання"/></text:h>
      <text:list text:style-name="L26">
        <text:list-item>
          <text:p text:style-name="P58">Що таке JDK, JRE та JVM? Чим вони відрізняються та яке відношення мають одне до одного?</text:p>
        </text:list-item>
        <text:list-item>
          <text:p text:style-name="P58">Що означає принцип «Write Once, Run Anywhere»? За рахунок чого він реалізується у Java?</text:p>
        </text:list-item>
        <text:list-item>
          <text:p text:style-name="P58">Яку роль відіграє компілятор <text:span text:style-name="Source_20_Text">javac</text:span>? Що є результатом його роботи?</text:p>
        </text:list-item>
        <text:list-item>
          <text:p text:style-name="P58">Що таке байт-код? Чому він не є машинним кодом конкретного процесора?</text:p>
        </text:list-item>
        <text:list-item>
          <text:p text:style-name="P58">Що таке JIT-компілятор і як він підвищує швидкодію Java-програм?</text:p>
        </text:list-item>
        <text:list-item>
          <text:p text:style-name="P58">Які обов’язкові елементи має містити будь-яка виконувана Java-програма? Опишіть сигнатуру методу <text:span text:style-name="Source_20_Text">main</text:span>.</text:p>
        </text:list-item>
        <text:list-item>
          <text:p text:style-name="P58">Навіщо в Java використовується система пакетів? Яка конвенція назв пакетів прийнята у галузі?</text:p>
        </text:list-item>
        <text:list-item>
          <text:p text:style-name="P58">Що відбудеться, якщо ім’я публічного класу не збігається з іменем файлу?</text:p>
        </text:list-item>
        <text:list-item>
          <text:p text:style-name="P58">Що таке classpath та як його налаштувати при компіляції та запуску програми?</text:p>
        </text:list-item>
        <text:list-item>
          <text:p text:style-name="P58">Що таке модульна система JPMS (Project Jigsaw)? У чому її перевага порівняно з classpath?</text:p>
        </text:list-item>
        <text:list-item>
          <text:p text:style-name="P58">Яке призначення інструменту <text:span text:style-name="Source_20_Text">javadoc</text:span>? Які теги підтримує формат Javadoc-коментарів?</text:p>
        </text:list-item>
        <text:list-item>
          <text:p text:style-name="P58">Що таке «безіменні класи» (unnamed classes) у JDK 25? У яких сценаріях вони є доречними?</text:p>
        </text:list-item>
        <text:list-item>
          <text:p text:style-name="P58">Чим відрізняється оператор <text:span text:style-name="Source_20_Text">var</text:span> від слабкої типізації? Чи є Java з <text:span text:style-name="Source_20_Text">var</text:span> нестрого типізованою мовою?</text:p>
        </text:list-item>
        <text:list-item>
          <text:p text:style-name="P58">Що означає модифікатор <text:span text:style-name="Source_20_Text">static</text:span> у контексті методу <text:span text:style-name="Source_20_Text">main</text:span>?</text:p>
        </text:list-item>
        <text:list-item>
          <text:p text:style-name="P58">Яке значення повертає JVM операційній системі при нормальному завершенні програми? Як явно задати код завершення?</text:p>
        </text:list-item>
      </text:list>
      <text:p text:style-name="Horizontal_20_Line"/>
      <text:h text:style-name="Heading_20_3" text:outline-level="3"><text:bookmark-start text:name="перелік-посилань"/>Перелік посилань<text:bookmark-end text:name="перелік-посилань"/></text:h>
      <text:list text:style-name="L27">
        <text:list-item>
          <text:p text:style-name="P59">Schildt, H. <text:span text:style-name="T2">Java: The Complete Reference</text:span> (12th ed.). New York : McGraw-Hill, 2021. 1248 p.</text:p>
        </text:list-item>
        <text:list-item>
          <text:p text:style-name="P59">Horstmann, C. S. <text:span text:style-name="T2">Core Java, Volume I — Fundamentals</text:span> (12th ed.). Hoboken : Pearson, 2022. 928 p.</text:p>
        </text:list-item>
        <text:list-item>
          <text:p text:style-name="P59">Oracle Corporation. <text:span text:style-name="T2">Java SE 25 Documentation</text:span> [Електронний ресурс]. URL: https://docs.oracle.com/en/java/javase/25/ (дата звернення: 2025-09-01).</text:p>
        </text:list-item>
        <text:list-item>
          <text:p text:style-name="P59">Oracle Corporation. <text:span text:style-name="T2">Java SE 25 API Specification</text:span> [Електронний ресурс]. URL: https://docs.oracle.com/en/java/javase/25/docs/api/ (дата звернення: 2025-09-01).</text:p>
        </text:list-item>
        <text:list-item>
          <text:p text:style-name="P59">Oracle Corporation. <text:span text:style-name="T2">The Java™ Tutorials</text:span> [Електронний ресурс]. URL: https://docs.oracle.com/javase/tutorial/ (дата звернення: 2025-09-01).</text:p>
        </text:list-item>
        <text:list-item>
          <text:p text:style-name="P59">Bloch, J. <text:span text:style-name="T2">Effective Java</text:span> (3rd ed.). Boston : Addison-Wesley, 2018. 412 p.</text:p>
        </text:list-item>
        <text:list-item>
          <text:p text:style-name="P59">Eckel, B. <text:span text:style-name="T2">Thinking in Java</text:span> (4th ed.). Upper Saddle River : Prentice Hall, 2006. 1150 p.</text:p>
        </text:list-item>
      </text:list>
      <text:h text:style-name="Heading_20_1" text:outline-level="1"><text:bookmark-start text:name="лабораторна-робота-2-1"/>Лабораторна робота №2<text:bookmark-end text:name="лабораторна-робота-2-1"/></text:h>
      <text:h text:style-name="Heading_20_2" text:outline-level="2"><text:bookmark-start text:name="операції-з-примітивними-типами-даних-та-операторами.-операції-з-масивами"/>Операції з примітивними типами даних та операторами. Операції з масивами<text:bookmark-end text:name="операції-з-примітивними-типами-даних-та-операторами.-операції-з-масивами"/></text:h>
      <text:p text:style-name="Horizontal_20_Line"/>
      <text:h text:style-name="Heading_20_3" text:outline-level="3"><text:bookmark-start text:name="тема-1"/>Тема<text:bookmark-end text:name="тема-1"/></text:h>
      <text:p text:style-name="First_20_paragraph">Операції з примітивними типами даних та операторами; операції з одновимірними та двовимірними масивами мови Java.</text:p>
      <text:p text:style-name="Horizontal_20_Line"/>
      <text:h text:style-name="Heading_20_3" text:outline-level="3"><text:bookmark-start text:name="мета-1"/>Мета<text:bookmark-end text:name="мета-1"/></text:h>
      <text:p text:style-name="First_20_paragraph">Набути практичних навичок використання примітивних типів даних, арифметичних, логічних та побітових операторів, а також одновимірних і двовимірних масивів мови Java шляхом написання та налагодження навчальних програм.</text:p>
      <text:p text:style-name="Horizontal_20_Line"/>
      <text:h text:style-name="Heading_20_3" text:outline-level="3"><text:bookmark-start text:name="теоретичні-відомості-1"/>Теоретичні відомості<text:bookmark-end text:name="теоретичні-відомості-1"/></text:h>
      <text:h text:style-name="Heading_20_4" text:outline-level="4"><text:bookmark-start text:name="примітивні-типи-даних"/>Примітивні типи даних<text:bookmark-end text:name="примітивні-типи-даних"/></text:h>
      <text:p text:style-name="First_20_paragraph">Java має вісім примітивних типів, що зберігаються безпосередньо у стеку (на відміну від об’єктів)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HeaderRowCell" office:value-type="string">
              <text:p text:style-name="Table_20_Heading">Тип</text:p>
            </table:table-cell>
            <table:table-cell table:style-name="TableHeaderRowCell" office:value-type="string">
              <text:p text:style-name="Table_20_Heading">Розмір</text:p>
            </table:table-cell>
            <table:table-cell table:style-name="TableHeaderRowCell" office:value-type="string">
              <text:p text:style-name="Table_20_Heading">Діапазон</text:p>
            </table:table-cell>
            <table:table-cell table:style-name="TableHeaderRowCell" office:value-type="string">
              <text:p text:style-name="Table_20_Heading">Приклад літерала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20_Text">byte</text:span></text:p>
          </table:table-cell>
          <table:table-cell table:style-name="TableRowCell" office:value-type="string">
            <text:p text:style-name="Table_20_Contents">8 біт</text:p>
          </table:table-cell>
          <table:table-cell table:style-name="TableRowCell" office:value-type="string">
            <text:p text:style-name="Table_20_Contents">−128 … 127</text:p>
          </table:table-cell>
          <table:table-cell table:style-name="TableRowCell" office:value-type="string">
            <text:p text:style-name="Table_20_Contents"><text:span text:style-name="Source_20_Text">(byte) 100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short</text:span></text:p>
          </table:table-cell>
          <table:table-cell table:style-name="TableRowCell" office:value-type="string">
            <text:p text:style-name="Table_20_Contents">16 біт</text:p>
          </table:table-cell>
          <table:table-cell table:style-name="TableRowCell" office:value-type="string">
            <text:p text:style-name="Table_20_Contents">−32 768 … 32 767</text:p>
          </table:table-cell>
          <table:table-cell table:style-name="TableRowCell" office:value-type="string">
            <text:p text:style-name="Table_20_Contents"><text:span text:style-name="Source_20_Text">(short) 1000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int</text:span></text:p>
          </table:table-cell>
          <table:table-cell table:style-name="TableRowCell" office:value-type="string">
            <text:p text:style-name="Table_20_Contents">32 біти</text:p>
          </table:table-cell>
          <table:table-cell table:style-name="TableRowCell" office:value-type="string">
            <text:p text:style-name="Table_20_Contents">−2³¹ … 2³¹−1</text:p>
          </table:table-cell>
          <table:table-cell table:style-name="TableRowCell" office:value-type="string">
            <text:p text:style-name="Table_20_Contents"><text:span text:style-name="Source_20_Text">42</text:span>, <text:span text:style-name="Source_20_Text">0xFF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long</text:span></text:p>
          </table:table-cell>
          <table:table-cell table:style-name="TableRowCell" office:value-type="string">
            <text:p text:style-name="Table_20_Contents">64 біти</text:p>
          </table:table-cell>
          <table:table-cell table:style-name="TableRowCell" office:value-type="string">
            <text:p text:style-name="Table_20_Contents">−2⁶³ … 2⁶³−1</text:p>
          </table:table-cell>
          <table:table-cell table:style-name="TableRowCell" office:value-type="string">
            <text:p text:style-name="Table_20_Contents"><text:span text:style-name="Source_20_Text">9_000_000_000L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float</text:span></text:p>
          </table:table-cell>
          <table:table-cell table:style-name="TableRowCell" office:value-type="string">
            <text:p text:style-name="Table_20_Contents">32 біти</text:p>
          </table:table-cell>
          <table:table-cell table:style-name="TableRowCell" office:value-type="string">
            <text:p text:style-name="Table_20_Contents">IEEE 754</text:p>
          </table:table-cell>
          <table:table-cell table:style-name="TableRowCell" office:value-type="string">
            <text:p text:style-name="Table_20_Contents"><text:span text:style-name="Source_20_Text">3.14f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double</text:span></text:p>
          </table:table-cell>
          <table:table-cell table:style-name="TableRowCell" office:value-type="string">
            <text:p text:style-name="Table_20_Contents">64 біти</text:p>
          </table:table-cell>
          <table:table-cell table:style-name="TableRowCell" office:value-type="string">
            <text:p text:style-name="Table_20_Contents">IEEE 754</text:p>
          </table:table-cell>
          <table:table-cell table:style-name="TableRowCell" office:value-type="string">
            <text:p text:style-name="Table_20_Contents"><text:span text:style-name="Source_20_Text">3.14159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char</text:span></text:p>
          </table:table-cell>
          <table:table-cell table:style-name="TableRowCell" office:value-type="string">
            <text:p text:style-name="Table_20_Contents">16 біт</text:p>
          </table:table-cell>
          <table:table-cell table:style-name="TableRowCell" office:value-type="string">
            <text:p text:style-name="Table_20_Contents">0 … 65 535 (Unicode)</text:p>
          </table:table-cell>
          <table:table-cell table:style-name="TableRowCell" office:value-type="string">
            <text:p text:style-name="Table_20_Contents"><text:span text:style-name="Source_20_Text">'А'</text:span>, <text:span text:style-name="Source_20_Text">'A'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boolean</text:span></text:p>
          </table:table-cell>
          <table:table-cell table:style-name="TableRowCell" office:value-type="string">
            <text:p text:style-name="Table_20_Contents">1 біт</text:p>
          </table:table-cell>
          <table:table-cell table:style-name="TableRowCell" office:value-type="string">
            <text:p text:style-name="Table_20_Contents"><text:span text:style-name="Source_20_Text">true</text:span> / <text:span text:style-name="Source_20_Text">false</text:span></text:p>
          </table:table-cell>
          <table:table-cell table:style-name="TableRowCell" office:value-type="string">
            <text:p text:style-name="Table_20_Contents"><text:span text:style-name="Source_20_Text">true</text:span></text:p>
          </table:table-cell>
        </table:table-row>
      </table:table>
      <text:p text:style-name="First_20_paragraph">Символ підкреслення в числових літералах (<text:span text:style-name="Source_20_Text">1_000_000</text:span>) допускається починаючи з Java 7 і покращує читабельність.</text:p>
      <text:h text:style-name="Heading_20_4" text:outline-level="4"><text:bookmark-start text:name="класи-обгортки-wrapper-classes"/>Класи-обгортки (Wrapper classes)<text:bookmark-end text:name="класи-обгортки-wrapper-classes"/></text:h>
      <text:p text:style-name="First_20_paragraph">Кожному примітивному типу відповідає клас-обгортка: <text:span text:style-name="Source_20_Text">Integer</text:span>, <text:span text:style-name="Source_20_Text">Long</text:span>, <text:span text:style-name="Source_20_Text">Double</text:span>, <text:span text:style-name="Source_20_Text">Boolean</text:span> тощо. Автоупакування (<text:span text:style-name="T2">autoboxing</text:span>) і розпакування (<text:span text:style-name="T2">unboxing</text:span>) виконуються компілятором автоматично:</text:p>
      <text:p text:style-name="P60">Integer a = 42; <text:s text:c="9"/>// autoboxing: int → Integer</text:p>
      <text:p text:style-name="P61">int b = a; <text:s text:c="14"/>// unboxing: <text:s text:c="2"/>Integer → int</text:p>
      <text:p text:style-name="P62">int max = Integer.MAX_VALUE; <text:s text:c="2"/>// 2 147 483 647</text:p>
      <text:p text:style-name="P63">String s = Integer.toBinaryString(255); // "11111111"</text:p>
      <text:h text:style-name="Heading_20_4" text:outline-level="4"><text:bookmark-start text:name="оператори"/>Оператори<text:bookmark-end text:name="оператори"/></text:h>
      <text:p text:style-name="First_20_paragraph"><text:span text:style-name="T1">Арифметичні:</text:span> <text:span text:style-name="Source_20_Text">+</text:span>, <text:span text:style-name="Source_20_Text">-</text:span>, <text:span text:style-name="Source_20_Text">*</text:span>, <text:span text:style-name="Source_20_Text">/</text:span>, <text:span text:style-name="Source_20_Text">%</text:span> (остача від ділення), <text:span text:style-name="Source_20_Text">++</text:span>, <text:span text:style-name="Source_20_Text">--</text:span><text:line-break/><text:span text:style-name="T1">Порівняння:</text:span> <text:span text:style-name="Source_20_Text">==</text:span>, <text:span text:style-name="Source_20_Text">!=</text:span>, <text:span text:style-name="Source_20_Text">&lt;</text:span>, <text:span text:style-name="Source_20_Text">&gt;</text:span>, <text:span text:style-name="Source_20_Text">&lt;=</text:span>, <text:span text:style-name="Source_20_Text">&gt;=</text:span><text:line-break/><text:span text:style-name="T1">Логічні:</text:span> <text:span text:style-name="Source_20_Text">&amp;&amp;</text:span> (і), <text:span text:style-name="Source_20_Text">||</text:span> (або), <text:span text:style-name="Source_20_Text">!</text:span> (не), <text:span text:style-name="Source_20_Text">^</text:span> (XOR)<text:line-break/><text:span text:style-name="T1">Побітові:</text:span> <text:span text:style-name="Source_20_Text">&amp;</text:span>, <text:span text:style-name="Source_20_Text">|</text:span>, <text:span text:style-name="Source_20_Text">^</text:span>, <text:span text:style-name="Source_20_Text">~</text:span>, <text:span text:style-name="Source_20_Text">&lt;&lt;</text:span>, <text:span text:style-name="Source_20_Text">&gt;&gt;</text:span>, <text:span text:style-name="Source_20_Text">&gt;&gt;&gt;</text:span> (зсув без знаку)<text:line-break/><text:span text:style-name="T1">Тернарний:</text:span> <text:span text:style-name="Source_20_Text">умова ? вираз1 : вираз2</text:span></text:p>
      <text:p text:style-name="Text_20_body">Ділення цілих чисел у Java дає ціле: <text:span text:style-name="Source_20_Text">7 / 2 == 3</text:span>. Для отримання дробового результату необхідно перетворення: <text:span text:style-name="Source_20_Text">7.0 / 2</text:span> або <text:span text:style-name="Source_20_Text">(double) 7 / 2</text:span>.</text:p>
      <text:h text:style-name="Heading_20_4" text:outline-level="4"><text:bookmark-start text:name="одновимірні-масиви"/>Одновимірні масиви<text:bookmark-end text:name="одновимірні-масиви"/></text:h>
      <text:p text:style-name="P64">// Оголошення та ініціалізація</text:p>
      <text:p text:style-name="P65">int[] temperatures = new int[10]; <text:s text:c="7"/>// нульові значення за замовчуванням</text:p>
      <text:p text:style-name="P66">double[] readings = {36.6, 37.1, 36.8}; // ініціалізатор</text:p>
      <text:p text:style-name="P67"/>
      <text:p text:style-name="P68">// Довжина масиву</text:p>
      <text:p text:style-name="P69">int len = readings.length; // поле, не метод!</text:p>
      <text:p text:style-name="P70"/>
      <text:p text:style-name="P71">// Перебір</text:p>
      <text:p text:style-name="P72">for (int i = 0; i &lt; readings.length; i++) {</text:p>
      <text:p text:style-name="P73"><text:s text:c="4"/>System.out.printf("readings[%d] = %.1f%n", i, readings[i]);</text:p>
      <text:p text:style-name="P74">}</text:p>
      <text:p text:style-name="P75"/>
      <text:p text:style-name="P76">// Розширений for (foreach)</text:p>
      <text:p text:style-name="P77">for (double r : readings) {</text:p>
      <text:p text:style-name="P78"><text:s text:c="4"/>System.out.println(r);</text:p>
      <text:p text:style-name="P79">}</text:p>
      <text:p text:style-name="First_20_paragraph">Клас <text:span text:style-name="Source_20_Text">java.util.Arrays</text:span> містить методи сортування (<text:span text:style-name="Source_20_Text">Arrays.sort</text:span>), пошуку (<text:span text:style-name="Source_20_Text">Arrays.binarySearch</text:span>) та порівняння (<text:span text:style-name="Source_20_Text">Arrays.equals</text:span>).</text:p>
      <text:h text:style-name="Heading_20_4" text:outline-level="4"><text:bookmark-start text:name="двовимірні-масиви"/>Двовимірні масиви<text:bookmark-end text:name="двовимірні-масиви"/></text:h>
      <text:p text:style-name="P80">// Матриця 3×4</text:p>
      <text:p text:style-name="P81">int[][] matrix = new int[3][4];</text:p>
      <text:p text:style-name="P82"/>
      <text:p text:style-name="P83">// Ініціалізація літералом</text:p>
      <text:p text:style-name="P84">int[][] identity = {</text:p>
      <text:p text:style-name="P85"><text:s text:c="4"/>{1, 0, 0},</text:p>
      <text:p text:style-name="P86"><text:s text:c="4"/>{0, 1, 0},</text:p>
      <text:p text:style-name="P87"><text:s text:c="4"/>{0, 0, 1}</text:p>
      <text:p text:style-name="P88">};</text:p>
      <text:p text:style-name="P89"/>
      <text:p text:style-name="P90">// Перебір</text:p>
      <text:p text:style-name="P91">for (int row = 0; row &lt; matrix.length; row++) {</text:p>
      <text:p text:style-name="P92"><text:s text:c="4"/>for (int col = 0; col &lt; matrix[row].length; col++) {</text:p>
      <text:p text:style-name="P93"><text:s text:c="8"/>System.out.printf("%4d", matrix[row][col]);</text:p>
      <text:p text:style-name="P94"><text:s text:c="4"/>}</text:p>
      <text:p text:style-name="P95"><text:s text:c="4"/>System.out.println();</text:p>
      <text:p text:style-name="P96">}</text:p>
      <text:p text:style-name="First_20_paragraph">Java підтримує «зубчасті» (jagged) масиви — рядки можуть мати різну довжину.</text:p>
      <text:h text:style-name="Heading_20_4" text:outline-level="4"><text:bookmark-start text:name="приклад-з-репозиторію-java-iot"/>Приклад з репозиторію java-iot<text:bookmark-end text:name="приклад-з-репозиторію-java-iot"/></text:h>
      <text:p text:style-name="First_20_paragraph">Клас <text:a xlink:type="simple" xlink:href="https://github.com/AndriyLutskiv/java-iot/blob/main/projects/p01-thermometer/src/main/java/ua/crowpi/projects/p01/TemperatureReading.java" office:name=""><text:span text:style-name="Definition"><text:span text:style-name="Source_20_Text">TemperatureReading.java</text:span></text:span></text:a> зберігає показання температури як поля примітивного типу. Клас <text:a xlink:type="simple" xlink:href="https://github.com/AndriyLutskiv/java-iot/blob/main/projects/p03-music-box/src/main/java/ua/crowpi/projects/p03/Note.java" office:name=""><text:span text:style-name="Definition"><text:span text:style-name="Source_20_Text">Note.java</text:span></text:span></text:a> використовує масив частот нот та операції приведення типів для генерації звуку. Рекомендується переглянути ці файли як приклади практичного використання примітивних типів.</text:p>
      <text:p text:style-name="Horizontal_20_Line"/>
      <text:h text:style-name="Heading_20_3" text:outline-level="3"><text:bookmark-start text:name="хід-виконання-роботи-1"/>Хід виконання роботи<text:bookmark-end text:name="хід-виконання-роботи-1"/></text:h>
      <text:list text:style-name="L28">
        <text:list-item>
          <text:p text:style-name="P97">Оголосити та ініціалізувати змінні кожного з восьми примітивних типів; вивести їх значення разом із іменем типу (<text:span text:style-name="Source_20_Text">getClass()</text:span> для обгорток або <text:span text:style-name="Source_20_Text">typeof</text:span> через <text:span text:style-name="Source_20_Text">var</text:span>).</text:p>
        </text:list-item>
        <text:list-item>
          <text:p text:style-name="P97">Дослідити межі типів: вивести <text:span text:style-name="Source_20_Text">Integer.MAX_VALUE</text:span>, <text:span text:style-name="Source_20_Text">Integer.MIN_VALUE</text:span>, <text:span text:style-name="Source_20_Text">Long.MAX_VALUE</text:span>, <text:span text:style-name="Source_20_Text">Double.MAX_VALUE</text:span>. Перевірити, що відбувається при переповненні (наприклад, <text:span text:style-name="Source_20_Text">Integer.MAX_VALUE + 1</text:span>).</text:p>
        </text:list-item>
        <text:list-item>
          <text:p text:style-name="P97">Відкрити у браузері клас <text:span text:style-name="Source_20_Text">TemperatureReading.java</text:span> (посилання вище) та проаналізувати, як у ньому зберігаються показання датчика. Визначити типи всіх полів.</text:p>
        </text:list-item>
        <text:list-item>
          <text:p text:style-name="P97">Реалізувати обчислення відповідно до свого варіанту індивідуального завдання, використовуючи відповідні арифметичні оператори.</text:p>
        </text:list-item>
        <text:list-item>
          <text:p text:style-name="P97">Проілюструвати роботу побітових операторів: виконати <text:span text:style-name="Source_20_Text">&amp;</text:span>, <text:span text:style-name="Source_20_Text">|</text:span>, <text:span text:style-name="Source_20_Text">^</text:span>, <text:span text:style-name="Source_20_Text">&lt;&lt;</text:span>, <text:span text:style-name="Source_20_Text">&gt;&gt;</text:span> над двома цілими числами, вивести результати у двійковому (<text:span text:style-name="Source_20_Text">Integer.toBinaryString</text:span>) та шістнадцятковому форматі.</text:p>
        </text:list-item>
        <text:list-item>
          <text:p text:style-name="P97">Оголосити одновимірний масив відповідно до варіанту, заповнити його значеннями (через цикл або літерал), вивести елементи.</text:p>
        </text:list-item>
        <text:list-item>
          <text:p text:style-name="P97">Виконати операції над масивом: знайти мінімум, максимум, суму, середнє. Порівняти ручний пошук з методами <text:span text:style-name="Source_20_Text">Arrays.sort</text:span> + <text:span text:style-name="Source_20_Text">readings[0]</text:span>.</text:p>
        </text:list-item>
        <text:list-item>
          <text:p text:style-name="P97">Реалізувати двовимірний масив відповідно до варіанту (матриця, таблиця тощо).</text:p>
        </text:list-item>
        <text:list-item>
          <text:p text:style-name="P97">Перевірити роботу тернарного оператора на 3–5 різних умовах.</text:p>
        </text:list-item>
        <text:list-item>
          <text:p text:style-name="P97">Дослідити неявне та явне приведення типів (<text:span text:style-name="Source_20_Text">int → double</text:span>, <text:span text:style-name="Source_20_Text">double → int</text:span>). Перевірити, чи втрачається точність при звуженні.</text:p>
        </text:list-item>
        <text:list-item>
          <text:p text:style-name="P97">Оформити звіт: включити вихідний код та знімки виводу програми.</text:p>
        </text:list-item>
      </text:list>
      <text:p text:style-name="Horizontal_20_Line"/>
      <text:h text:style-name="Heading_20_3" text:outline-level="3"><text:bookmark-start text:name="індивідуальні-завдання-1"/>Індивідуальні завдання<text:bookmark-end text:name="індивідуальні-завдання-1"/></text:h>
      <text:p text:style-name="First_20_paragraph">Розробити програму мовою Java (один клас, метод <text:span text:style-name="Source_20_Text">main</text:span>). Обсяг: до 80 рядків коду. Усі дані задати у вигляді масивів або констант; введення з <text:span text:style-name="Source_20_Text">Scanner</text:span> вітається, але не обов’язкове.</text:p>
      <text:p text:style-name="Text_20_body"><text:span text:style-name="T1">Варіант 1.</text:span> Задати масив температур (10 значень типу <text:span text:style-name="Source_20_Text">double</text:span>, від -20 до +40) та обчислити: мінімальну, максимальну, середню температури; кількість днів зі значенням вище середнього. Вивести результати та відсортований масив.</text:p>
      <text:p text:style-name="Text_20_body"><text:span text:style-name="T1">Варіант 2.</text:span> Задати масив цілих чисел (15 елементів) та знайти: суму елементів на парних позиціях; суму на непарних позиціях; кількість від’ємних елементів; добуток ненульових елементів.</text:p>
      <text:p text:style-name="Text_20_body"><text:span text:style-name="T1">Варіант 3.</text:span> Задати матрицю 4×4 цілих чисел. Обчислити: суму головної діагоналі; суму побічної діагоналі; максимальний елемент кожного рядка.</text:p>
      <text:p text:style-name="Text_20_body"><text:span text:style-name="T1">Варіант 4.</text:span> Задати масив показань рівня сигналу (значення типу <text:span text:style-name="Source_20_Text">int</text:span>, від 0 до 100). Знайти кількість значень у кожному діапазоні: 0–25, 26–50, 51–75, 76–100. Вивести гістограму символами <text:span text:style-name="Source_20_Text">#</text:span>.</text:p>
      <text:p text:style-name="Text_20_body"><text:span text:style-name="T1">Варіант 5.</text:span> Задати масив частот нот (7 нот октави, тип <text:span text:style-name="Source_20_Text">double</text:span>). Обчислити різницю частот між сусідніми нотами, вивести ноту з найбільшою та найменшою частотою. За зразок взяти <text:a xlink:type="simple" xlink:href="https://github.com/AndriyLutskiv/java-iot/blob/main/projects/p03-music-box/src/main/java/ua/crowpi/projects/p03/Note.java" office:name=""><text:span text:style-name="Definition"><text:span text:style-name="Source_20_Text">Note.java</text:span></text:span></text:a>.</text:p>
      <text:p text:style-name="Text_20_body"><text:span text:style-name="T1">Варіант 6.</text:span> Задати масив довжин сторін трикутників (масив з N пар значень <text:span text:style-name="Source_20_Text">double a, b, c</text:span>). Для кожного трикутника визначити: чи є він дійсним, вид (рівносторонній, рівнобедрений, різносторонній).</text:p>
      <text:p text:style-name="Text_20_body"><text:span text:style-name="T1">Варіант 7.</text:span> Задати двовимірний масив оцінок (5 студентів × 6 предметів, тип <text:span text:style-name="Source_20_Text">int</text:span>, 1–100). Обчислити середній бал кожного студента та кожного предмета. Визначити студента з найвищим середнім балом.</text:p>
      <text:p text:style-name="Text_20_body"><text:span text:style-name="T1">Варіант 8.</text:span> Задати два масиви цілих чисел однакового розміру. Обчислити: скалярний добуток; поелементну суму та різницю (результат — новий масив); кількість позицій, де перший масив більший за другий.</text:p>
      <text:p text:style-name="Text_20_body"><text:span text:style-name="T1">Варіант 9.</text:span> Задати масив байтових значень (тип <text:span text:style-name="Source_20_Text">byte</text:span>, 20 елементів). Для кожного значення вивести: десяткове, двійкове та шістнадцяткове представлення. Знайти значення з максимальною кількістю одиничних бітів.</text:p>
      <text:p text:style-name="Text_20_body"><text:span text:style-name="T1">Варіант 10.</text:span> Задати матрицю 3×3 дійсних чисел. Обчислити транспоновану матрицю та вивести обидві матриці у форматованому вигляді. Перевірити рівність <text:span text:style-name="Source_20_Text">A[i][j] == A_T[j][i]</text:span>.</text:p>
      <text:p text:style-name="Text_20_body"><text:span text:style-name="T1">Варіант 11.</text:span> Задати масив відліків датчика освітленості (значення типу <text:span text:style-name="Source_20_Text">int</text:span>, 24 елементи — по одному на кожну годину доби). Знайти: пікове значення; середнє за «денний» час (8:00–20:00); кількість «темних» годин (значення &lt; 10).</text:p>
      <text:p text:style-name="Text_20_body"><text:span text:style-name="T1">Варіант 12.</text:span> Задати масив рядків-цін у форматі <text:span text:style-name="Source_20_Text">"99.99"</text:span> (10 елементів, тип <text:span text:style-name="Source_20_Text">String</text:span>). Перетворити в <text:span text:style-name="Source_20_Text">double</text:span> (метод <text:span text:style-name="Source_20_Text">Double.parseDouble</text:span>), знайти суму, мінімум, максимум. Вивести відформатований чек.</text:p>
      <text:p text:style-name="Text_20_body"><text:span text:style-name="T1">Варіант 13.</text:span> Задати масив цілих чисел та виконати сортування методом бульбашки (не використовувати <text:span text:style-name="Source_20_Text">Arrays.sort</text:span>). Підрахувати кількість порівнянь та перестановок. Вивести масив до та після сортування.</text:p>
      <text:p text:style-name="Text_20_body"><text:span text:style-name="T1">Варіант 14.</text:span> Задати квадратну матрицю N×N (N від 3 до 6). Перевірити, чи є вона симетричною (<text:span text:style-name="Source_20_Text">matrix[i][j] == matrix[j][i]</text:span>). Обчислити суму верхнього та нижнього трикутників окремо.</text:p>
      <text:p text:style-name="Text_20_body"><text:span text:style-name="T1">Варіант 15.</text:span> Задати масив цілих чисел (20 елементів). Виконати циклічний зсув масиву вправо на K позицій (K від 1 до 5). Вивести масив до та після зсуву. Не використовувати тимчасовий масив великого розміру.</text:p>
      <text:p text:style-name="Horizontal_20_Line"/>
      <text:h text:style-name="Heading_20_3" text:outline-level="3"><text:bookmark-start text:name="контрольні-запитання-1"/>Контрольні запитання<text:bookmark-end text:name="контрольні-запитання-1"/></text:h>
      <text:list text:style-name="L29">
        <text:list-item>
          <text:p text:style-name="P98">Перелічіть усі вісім примітивних типів Java. Яке значення займає кожен у пам’яті?</text:p>
        </text:list-item>
        <text:list-item>
          <text:p text:style-name="P98">Чим примітивний тип відрізняється від об’єктного (reference) типу? Де вони зберігаються в пам’яті JVM?</text:p>
        </text:list-item>
        <text:list-item>
          <text:p text:style-name="P98">Що таке автоупакування (autoboxing) та розпакування (unboxing)? Яка небезпека пов’язана із розпакуванням <text:span text:style-name="Source_20_Text">null</text:span>?</text:p>
        </text:list-item>
        <text:list-item>
          <text:p text:style-name="P98">Що відбудеться при виконанні <text:span text:style-name="Source_20_Text">int x = Integer.MAX_VALUE + 1</text:span>? Поясніть явище переповнення.</text:p>
        </text:list-item>
        <text:list-item>
          <text:p text:style-name="P98">Яка різниця між <text:span text:style-name="Source_20_Text">float</text:span> та <text:span text:style-name="Source_20_Text">double</text:span>? Коли слід використовувати <text:span text:style-name="Source_20_Text">BigDecimal</text:span> замість них?</text:p>
        </text:list-item>
        <text:list-item>
          <text:p text:style-name="P98">Що повертає вираз <text:span text:style-name="Source_20_Text">7 / 2</text:span> і <text:span text:style-name="Source_20_Text">7.0 / 2</text:span>? Поясніть механізм неявного приведення типів.</text:p>
        </text:list-item>
        <text:list-item>
          <text:p text:style-name="P98">Що означає оператор <text:span text:style-name="Source_20_Text">%</text:span> для від’ємних чисел? Наведіть приклад: <text:span text:style-name="Source_20_Text">-7 % 3</text:span>.</text:p>
        </text:list-item>
        <text:list-item>
          <text:p text:style-name="P98">Для чого служить оператор <text:span text:style-name="Source_20_Text">&gt;&gt;&gt;</text:span> (беззнаковий правий зсув) на відміну від <text:span text:style-name="Source_20_Text">&gt;&gt;</text:span>?</text:p>
        </text:list-item>
        <text:list-item>
          <text:p text:style-name="P98">Що таке «зубчастий» (jagged) масив у Java? Наведіть приклад ситуації, де він є доцільним.</text:p>
        </text:list-item>
        <text:list-item>
          <text:p text:style-name="P98">Чим <text:span text:style-name="Source_20_Text">arrays.length</text:span> відрізняється від <text:span text:style-name="Source_20_Text">String.length()</text:span>? Чому одне є полем, а інше — методом?</text:p>
        </text:list-item>
        <text:list-item>
          <text:p text:style-name="P98">Що робить <text:span text:style-name="Source_20_Text">Arrays.sort</text:span> із масивом об’єктів? Який інтерфейс повинні реалізовувати елементи?</text:p>
        </text:list-item>
        <text:list-item>
          <text:p text:style-name="P98">Як ініціалізуються елементи масиву за замовчуванням залежно від типу?</text:p>
        </text:list-item>
        <text:list-item>
          <text:p text:style-name="P98">Що таке <text:span text:style-name="Source_20_Text">ArrayIndexOutOfBoundsException</text:span>? Як запобігти цьому винятку?</text:p>
        </text:list-item>
        <text:list-item>
          <text:p text:style-name="P98">Поясніть різницю між <text:span text:style-name="Source_20_Text">==</text:span> та <text:span text:style-name="Source_20_Text">equals</text:span> при порівнянні масивів.</text:p>
        </text:list-item>
        <text:list-item>
          <text:p text:style-name="P98">Як за допомогою побітових операцій перевірити, чи встановлено n-й біт цілого числа?</text:p>
        </text:list-item>
      </text:list>
      <text:p text:style-name="Horizontal_20_Line"/>
      <text:h text:style-name="Heading_20_3" text:outline-level="3"><text:bookmark-start text:name="перелік-посилань-1"/>Перелік посилань<text:bookmark-end text:name="перелік-посилань-1"/></text:h>
      <text:list text:style-name="L30">
        <text:list-item>
          <text:p text:style-name="P99">Horstmann, C. S. <text:span text:style-name="T2">Core Java, Volume I — Fundamentals</text:span> (12th ed.). Hoboken : Pearson, 2022. 928 p.</text:p>
        </text:list-item>
        <text:list-item>
          <text:p text:style-name="P99">Schildt, H. <text:span text:style-name="T2">Java: The Complete Reference</text:span> (12th ed.). New York : McGraw-Hill, 2021. 1248 p.</text:p>
        </text:list-item>
        <text:list-item>
          <text:p text:style-name="P99">Oracle Corporation. <text:span text:style-name="T2">Primitive Data Types — Java SE Tutorial</text:span> [Електронний ресурс]. URL: https://docs.oracle.com/javase/tutorial/java/nutsandbolts/datatypes.html (дата звернення: 2025-09-01).</text:p>
        </text:list-item>
        <text:list-item>
          <text:p text:style-name="P99">Oracle Corporation. <text:span text:style-name="T2">Arrays — Java SE Tutorial</text:span> [Електронний ресурс]. URL: https://docs.oracle.com/javase/tutorial/java/nutsandbolts/arrays.html (дата звернення: 2025-09-01).</text:p>
        </text:list-item>
        <text:list-item>
          <text:p text:style-name="P99">Oracle Corporation. <text:span text:style-name="T2">java.util.Arrays API</text:span> [Електронний ресурс]. URL: https://docs.oracle.com/en/java/javase/25/docs/api/java.base/java/util/Arrays.html (дата звернення: 2025-09-01).</text:p>
        </text:list-item>
        <text:list-item>
          <text:p text:style-name="P99">Bloch, J. <text:span text:style-name="T2">Effective Java</text:span> (3rd ed.). Boston : Addison-Wesley, 2018. 412 p.</text:p>
        </text:list-item>
        <text:list-item>
          <text:p text:style-name="P99">Deitel, P., Deitel, H. <text:span text:style-name="T2">Java: How to Program</text:span> (11th ed.). Hoboken : Pearson, 2020. 1040 p.</text:p>
        </text:list-item>
      </text:list>
      <text:h text:style-name="Heading_20_1" text:outline-level="1"><text:bookmark-start text:name="лабораторна-робота-3-1"/>Лабораторна робота №3<text:bookmark-end text:name="лабораторна-робота-3-1"/></text:h>
      <text:h text:style-name="Heading_20_2" text:outline-level="2"><text:bookmark-start text:name="обєктно-орієнтоване-програмування-на-java"/>Об’єктно-орієнтоване програмування на Java<text:bookmark-end text:name="обєктно-орієнтоване-програмування-на-java"/></text:h>
      <text:p text:style-name="Horizontal_20_Line"/>
      <text:h text:style-name="Heading_20_3" text:outline-level="3"><text:bookmark-start text:name="тема-2"/>Тема<text:bookmark-end text:name="тема-2"/></text:h>
      <text:p text:style-name="First_20_paragraph">Об’єктно-орієнтоване програмування на Java: класи, об’єкти, інкапсуляція, наслідування, поліморфізм та інтерфейси.</text:p>
      <text:p text:style-name="Horizontal_20_Line"/>
      <text:h text:style-name="Heading_20_3" text:outline-level="3"><text:bookmark-start text:name="мета-2"/>Мета<text:bookmark-end text:name="мета-2"/></text:h>
      <text:p text:style-name="First_20_paragraph">Набути практичних навичок проєктування та реалізації класових ієрархій мовою Java шляхом розробки програм з використанням принципів інкапсуляції, наслідування та поліморфізму.</text:p>
      <text:p text:style-name="Horizontal_20_Line"/>
      <text:h text:style-name="Heading_20_3" text:outline-level="3"><text:bookmark-start text:name="теоретичні-відомості-2"/>Теоретичні відомості<text:bookmark-end text:name="теоретичні-відомості-2"/></text:h>
      <text:h text:style-name="Heading_20_4" text:outline-level="4"><text:bookmark-start text:name="класи-та-обєкти"/>Класи та об’єкти<text:bookmark-end text:name="класи-та-обєкти"/></text:h>
      <text:p text:style-name="First_20_paragraph">Клас у Java — це шаблон, що описує стан (поля) та поведінку (методи) об’єктів. Об’єкт — екземпляр класу, що займає ділянку в купі (<text:span text:style-name="T2">heap</text:span>).</text:p>
      <text:p text:style-name="P100">public class Sensor {</text:p>
      <text:p text:style-name="P101"><text:s text:c="4"/>// Поля (стан)</text:p>
      <text:p text:style-name="P102"><text:s text:c="4"/>private final String name;</text:p>
      <text:p text:style-name="P103"><text:s text:c="4"/>private double lastValue;</text:p>
      <text:p text:style-name="P104"/>
      <text:p text:style-name="P105"><text:s text:c="4"/>// Конструктор</text:p>
      <text:p text:style-name="P106"><text:s text:c="4"/>public Sensor(String name) {</text:p>
      <text:p text:style-name="P107"><text:s text:c="8"/>this.name = name;</text:p>
      <text:p text:style-name="P108"><text:s text:c="4"/>}</text:p>
      <text:p text:style-name="P109"/>
      <text:p text:style-name="P110"><text:s text:c="4"/>// Гетер</text:p>
      <text:p text:style-name="P111"><text:s text:c="4"/>public double getLastValue() { return lastValue; }</text:p>
      <text:p text:style-name="P112"/>
      <text:p text:style-name="P113"><text:s text:c="4"/>// Сетер з перевіркою</text:p>
      <text:p text:style-name="P114"><text:s text:c="4"/>public void setLastValue(double value) {</text:p>
      <text:p text:style-name="P115"><text:s text:c="8"/>if (Double.isNaN(value)) throw new IllegalArgumentException("Значення не може бути NaN");</text:p>
      <text:p text:style-name="P116"><text:s text:c="8"/>this.lastValue = value;</text:p>
      <text:p text:style-name="P117"><text:s text:c="4"/>}</text:p>
      <text:p text:style-name="P118"/>
      <text:p text:style-name="P119"><text:s text:c="4"/>// Перевизначення методу toString</text:p>
      <text:p text:style-name="P120"><text:s text:c="4"/>@Override</text:p>
      <text:p text:style-name="P121"><text:s text:c="4"/>public String toString() {</text:p>
      <text:p text:style-name="P122"><text:s text:c="8"/>return "Sensor{name='" + name + "', value=" + lastValue + '}';</text:p>
      <text:p text:style-name="P123"><text:s text:c="4"/>}</text:p>
      <text:p text:style-name="P124">}</text:p>
      <text:h text:style-name="Heading_20_4" text:outline-level="4"><text:bookmark-start text:name="інкапсуляція"/>Інкапсуляція<text:bookmark-end text:name="інкапсуляція"/></text:h>
      <text:p text:style-name="First_20_paragraph">Поля оголошуються <text:span text:style-name="Source_20_Text">private</text:span>; доступ — через публічні методи-гетери/сетери. Це дозволяє контролювати стан об’єкту та змінювати внутрішню реалізацію без порушення контракту класу.</text:p>
      <text:h text:style-name="Heading_20_4" text:outline-level="4"><text:bookmark-start text:name="наслідування"/>Наслідування<text:bookmark-end text:name="наслідування"/></text:h>
      <text:p text:style-name="P125">// Базовий клас (суперклас)</text:p>
      <text:p text:style-name="P126">public abstract class AbstractDevice {</text:p>
      <text:p text:style-name="P127"><text:s text:c="4"/>protected final String id;</text:p>
      <text:p text:style-name="P128"/>
      <text:p text:style-name="P129"><text:s text:c="4"/>public AbstractDevice(String id) { this.id = id; }</text:p>
      <text:p text:style-name="P130"/>
      <text:p text:style-name="P131"><text:s text:c="4"/>// Абстрактний метод — підкласи зобов'язані реалізувати</text:p>
      <text:p text:style-name="P132"><text:s text:c="4"/>public abstract String getStatus();</text:p>
      <text:p text:style-name="P133"/>
      <text:p text:style-name="P134"><text:s text:c="4"/>// Конкретний метод зі спільною логікою</text:p>
      <text:p text:style-name="P135"><text:s text:c="4"/>public String getId() { return id; }</text:p>
      <text:p text:style-name="P136">}</text:p>
      <text:p text:style-name="P137"/>
      <text:p text:style-name="P138">// Підклас</text:p>
      <text:p text:style-name="P139">public class TemperatureSensor extends AbstractDevice {</text:p>
      <text:p text:style-name="P140"><text:s text:c="4"/>private double celsius;</text:p>
      <text:p text:style-name="P141"/>
      <text:p text:style-name="P142"><text:s text:c="4"/>public TemperatureSensor(String id) { super(id); }</text:p>
      <text:p text:style-name="P143"/>
      <text:p text:style-name="P144"><text:s text:c="4"/>@Override</text:p>
      <text:p text:style-name="P145"><text:s text:c="4"/>public String getStatus() {</text:p>
      <text:p text:style-name="P146"><text:s text:c="8"/>return String.format("T=%.1f°C", celsius);</text:p>
      <text:p text:style-name="P147"><text:s text:c="4"/>}</text:p>
      <text:p text:style-name="P148">}</text:p>
      <text:p text:style-name="First_20_paragraph">Ключові слова: <text:span text:style-name="Source_20_Text">extends</text:span> (наслідування класу), <text:span text:style-name="Source_20_Text">super(...)</text:span> (виклик конструктора суперкласу), <text:span text:style-name="Source_20_Text">@Override</text:span> (анотація, підтверджує перевизначення).</text:p>
      <text:h text:style-name="Heading_20_4" text:outline-level="4"><text:bookmark-start text:name="інтерфейси"/>Інтерфейси<text:bookmark-end text:name="інтерфейси"/></text:h>
      <text:p text:style-name="First_20_paragraph">Інтерфейс визначає контракт поведінки. Один клас може реалізовувати кілька інтерфейсів.</text:p>
      <text:p text:style-name="P149">public interface Readable {</text:p>
      <text:p text:style-name="P150"><text:s text:c="4"/>double read(); // публічний та абстрактний за замовчуванням</text:p>
      <text:p text:style-name="P151">}</text:p>
      <text:p text:style-name="P152"/>
      <text:p text:style-name="P153">public interface Loggable {</text:p>
      <text:p text:style-name="P154"><text:s text:c="4"/>void log(String message);</text:p>
      <text:p text:style-name="P155"/>
      <text:p text:style-name="P156"><text:s text:c="4"/>// Дефолтний метод (дозволений з Java 8)</text:p>
      <text:p text:style-name="P157"><text:s text:c="4"/>default void logInfo(String msg) { log("[INFO] " + msg); }</text:p>
      <text:p text:style-name="P158">}</text:p>
      <text:p text:style-name="P159"/>
      <text:p text:style-name="P160">public class PressureSensor extends AbstractDevice</text:p>
      <text:p text:style-name="P161"><text:s text:c="8"/>implements Readable, Loggable {</text:p>
      <text:p text:style-name="P162"/>
      <text:p text:style-name="P163"><text:s text:c="4"/>@Override public double read() { /* ... */ return 0; }</text:p>
      <text:p text:style-name="P164"><text:s text:c="4"/>@Override public void log(String message) { System.out.println(message); }</text:p>
      <text:p text:style-name="P165"><text:s text:c="4"/>@Override public String getStatus() { return "ok"; }</text:p>
      <text:p text:style-name="P166"/>
      <text:p text:style-name="P167"><text:s text:c="4"/>public PressureSensor(String id) { super(id); }</text:p>
      <text:p text:style-name="P168">}</text:p>
      <text:h text:style-name="Heading_20_4" text:outline-level="4"><text:bookmark-start text:name="поліморфізм"/>Поліморфізм<text:bookmark-end text:name="поліморфізм"/></text:h>
      <text:p text:style-name="First_20_paragraph">Посилання на базовий тип або інтерфейс може вказувати на об’єкт будь-якого сумісного підкласу. Виклик методу відбувається через <text:span text:style-name="T1">динамічне зв’язування</text:span> (late binding):</text:p>
      <text:p text:style-name="P169">AbstractDevice[] devices = {</text:p>
      <text:p text:style-name="P170"><text:s text:c="4"/>new TemperatureSensor("T-01"),</text:p>
      <text:p text:style-name="P171"><text:s text:c="4"/>new PressureSensor("P-01")</text:p>
      <text:p text:style-name="P172">};</text:p>
      <text:p text:style-name="P173"/>
      <text:p text:style-name="P174">for (AbstractDevice d : devices) {</text:p>
      <text:p text:style-name="P175"><text:s text:c="4"/>// Викликається реалізація відповідного підкласу</text:p>
      <text:p text:style-name="P176"><text:s text:c="4"/>System.out.println(d.getStatus());</text:p>
      <text:p text:style-name="P177">}</text:p>
      <text:h text:style-name="Heading_20_4" text:outline-level="4"><text:bookmark-start text:name="записи-records-java-16"/>Записи (records, Java 16+)<text:bookmark-end text:name="записи-records-java-16"/></text:h>
      <text:p text:style-name="First_20_paragraph">Для незмінних об’єктів-даних зручно використовувати <text:span text:style-name="Source_20_Text">record</text:span>:</text:p>
      <text:p text:style-name="P178">public record Reading(String sensorId, double value, long timestamp) {}</text:p>
      <text:p text:style-name="P179"/>
      <text:p text:style-name="P180">// Компілятор автоматично генерує: конструктор, гетери, equals, hashCode, toString</text:p>
      <text:p text:style-name="P181">Reading r = new Reading("T-01", 36.6, System.currentTimeMillis());</text:p>
      <text:p text:style-name="P182">System.out.println(r.value()); // гетер без "get" префікса</text:p>
      <text:h text:style-name="Heading_20_4" text:outline-level="4"><text:bookmark-start text:name="запечатані-класи-sealed-classes-java-17"/>Запечатані класи (sealed classes, Java 17+)<text:bookmark-end text:name="запечатані-класи-sealed-classes-java-17"/></text:h>
      <text:p text:style-name="P183">public sealed interface Shape permits Circle, Rectangle {}</text:p>
      <text:p text:style-name="P184">public record Circle(double radius) implements Shape {}</text:p>
      <text:p text:style-name="P185">public record Rectangle(double w, double h) implements Shape {}</text:p>
      <text:h text:style-name="Heading_20_4" text:outline-level="4"><text:bookmark-start text:name="приклад-з-репозиторію-java-iot-1"/>Приклад з репозиторію java-iot<text:bookmark-end text:name="приклад-з-репозиторію-java-iot-1"/></text:h>
      <text:p text:style-name="First_20_paragraph">Інтерфейс <text:a xlink:type="simple" xlink:href="https://github.com/AndriyLutskiv/java-iot/blob/main/core/src/main/java/ua/crowpi/core/CrowPiProject.java" office:name=""><text:span text:style-name="Definition"><text:span text:style-name="Source_20_Text">CrowPiProject.java</text:span></text:span></text:a> демонструє контракт для всіх IoT-проєктів. Клас <text:a xlink:type="simple" xlink:href="https://github.com/AndriyLutskiv/java-iot/blob/main/projects/p01-thermometer/src/main/java/ua/crowpi/projects/p01/ThermometerProject.java" office:name=""><text:span text:style-name="Definition"><text:span text:style-name="Source_20_Text">ThermometerProject.java</text:span></text:span></text:a> реалізує цей інтерфейс. Клас <text:a xlink:type="simple" xlink:href="https://github.com/AndriyLutskiv/java-iot/blob/main/projects/p04-alarm/src/main/java/ua/crowpi/projects/p04/AlarmFsm.java" office:name=""><text:span text:style-name="Definition"><text:span text:style-name="Source_20_Text">AlarmFsm.java</text:span></text:span></text:a> демонструє поліморфізм через скінченний автомат. Рекомендується вивчити ці файли як зразок побудови класових ієрархій.</text:p>
      <text:p text:style-name="Horizontal_20_Line"/>
      <text:h text:style-name="Heading_20_3" text:outline-level="3"><text:bookmark-start text:name="хід-виконання-роботи-2"/>Хід виконання роботи<text:bookmark-end text:name="хід-виконання-роботи-2"/></text:h>
      <text:list text:style-name="L31">
        <text:list-item>
          <text:p text:style-name="P186">Відкрити та проаналізувати інтерфейс <text:span text:style-name="Source_20_Text">CrowPiProject.java</text:span> (посилання вище). Визначити: скільки методів оголошено, які параметри та типи повернення, чи є дефолтні методи.</text:p>
        </text:list-item>
        <text:list-item>
          <text:p text:style-name="P186">Переглянути клас <text:span text:style-name="Source_20_Text">ThermometerProject.java</text:span> — виявити, які методи інтерфейсу реалізовано, як використовуються поля та конструктор.</text:p>
        </text:list-item>
        <text:list-item>
          <text:p text:style-name="P186">Спроєктувати власну класову ієрархію відповідно до варіанту: визначити базовий клас (або інтерфейс), 2–3 підкласи, поля та методи.</text:p>
        </text:list-item>
        <text:list-item>
          <text:p text:style-name="P186">Реалізувати базовий клас або інтерфейс: оголосити поля з <text:span text:style-name="Source_20_Text">private</text:span>/<text:span text:style-name="Source_20_Text">protected</text:span>, написати конструктор, гетери, <text:span text:style-name="Source_20_Text">toString</text:span>, <text:span text:style-name="Source_20_Text">equals</text:span>, <text:span text:style-name="Source_20_Text">hashCode</text:span>.</text:p>
        </text:list-item>
        <text:list-item>
          <text:p text:style-name="P186">Реалізувати підкласи з використанням <text:span text:style-name="Source_20_Text">extends</text:span>/<text:span text:style-name="Source_20_Text">implements</text:span>. Перевизначити абстрактні методи з анотацією <text:span text:style-name="Source_20_Text">@Override</text:span>.</text:p>
        </text:list-item>
        <text:list-item>
          <text:p text:style-name="P186">Написати метод <text:span text:style-name="Source_20_Text">main</text:span>, що створює масив об’єктів різних підкласів через посилання на базовий тип та демонструє поліморфну поведінку.</text:p>
        </text:list-item>
        <text:list-item>
          <text:p text:style-name="P186">Реалізувати принаймні один <text:span text:style-name="Source_20_Text">record</text:span> для представлення незмінного стану (результат вимірювання, подія тощо).</text:p>
        </text:list-item>
        <text:list-item>
          <text:p text:style-name="P186">Продемонструвати динамічне зв’язування: викликати перевизначений метод через посилання на суперклас.</text:p>
        </text:list-item>
        <text:list-item>
          <text:p text:style-name="P186">Перевірити роботу <text:span text:style-name="Source_20_Text">instanceof</text:span> та розпізнавання зразків (pattern matching): <text:span text:style-name="Source_20_Text">if (device instanceof TemperatureSensor ts)</text:span>.</text:p>
        </text:list-item>
        <text:list-item>
          <text:p text:style-name="P186">Написати принаймні 3 модульні тести (JUnit 5) для ключових методів розроблених класів.</text:p>
        </text:list-item>
        <text:list-item>
          <text:p text:style-name="P186">Оформити звіт: включити UML-діаграму класів (навіть у текстовому вигляді), вихідний код та результати тестування.</text:p>
        </text:list-item>
      </text:list>
      <text:p text:style-name="Horizontal_20_Line"/>
      <text:h text:style-name="Heading_20_3" text:outline-level="3"><text:bookmark-start text:name="індивідуальні-завдання-2"/>Індивідуальні завдання<text:bookmark-end text:name="індивідуальні-завдання-2"/></text:h>
      <text:p text:style-name="First_20_paragraph">Розробити класову ієрархію з 1 базовим класом або інтерфейсом і 2–3 підкласами. Обсяг: до 120 рядків коду (без тестів). Продемонструвати поліморфізм у методі <text:span text:style-name="Source_20_Text">main</text:span>.</text:p>
      <text:p text:style-name="Text_20_body"><text:span text:style-name="T1">Варіант 1.</text:span> Ієрархія «Транспортний засіб»: абстрактний клас <text:span text:style-name="Source_20_Text">Vehicle</text:span> (поля: марка, рік, макс. швидкість); підкласи <text:span text:style-name="Source_20_Text">Car</text:span> (тип кузова), <text:span text:style-name="Source_20_Text">Truck</text:span> (вантажопідйомність), <text:span text:style-name="Source_20_Text">Motorcycle</text:span> (об’єм двигуна). Метод <text:span text:style-name="Source_20_Text">describe()</text:span> у кожному підкласі. Демонстрація у масиві.</text:p>
      <text:p text:style-name="Text_20_body"><text:span text:style-name="T1">Варіант 2.</text:span> Ієрархія «Геометричні фігури»: інтерфейс <text:span text:style-name="Source_20_Text">Shape</text:span> з методами <text:span text:style-name="Source_20_Text">area()</text:span> та <text:span text:style-name="Source_20_Text">perimeter()</text:span>; <text:span text:style-name="Source_20_Text">record</text:span>-реалізації <text:span text:style-name="Source_20_Text">Circle(double r)</text:span>, <text:span text:style-name="Source_20_Text">Rectangle(double w, double h)</text:span>, <text:span text:style-name="Source_20_Text">Triangle(double a, double b, double c)</text:span>. Вивести площі та периметри у відсортованому порядку.</text:p>
      <text:p text:style-name="Text_20_body"><text:span text:style-name="T1">Варіант 3.</text:span> Ієрархія «Банківський рахунок»: абстрактний клас <text:span text:style-name="Source_20_Text">BankAccount</text:span> (номер, баланс); підкласи <text:span text:style-name="Source_20_Text">SavingsAccount</text:span> (відсоткова ставка, нарахування відсотків), <text:span text:style-name="Source_20_Text">CheckingAccount</text:span> (ліміт овердрафту), <text:span text:style-name="Source_20_Text">DepositAccount</text:span> (строк депозиту). Метод <text:span text:style-name="Source_20_Text">getYearlyIncome()</text:span>.</text:p>
      <text:p text:style-name="Text_20_body"><text:span text:style-name="T1">Варіант 4.</text:span> Ієрархія «Співробітник»: абстрактний клас <text:span text:style-name="Source_20_Text">Employee</text:span> (ім’я, id); підкласи <text:span text:style-name="Source_20_Text">FullTimeEmployee</text:span> (ставка), <text:span text:style-name="Source_20_Text">PartTimeEmployee</text:span> (годинний тариф + кількість годин), <text:span text:style-name="Source_20_Text">Contractor</text:span> (вартість контракту). Абстрактний метод <text:span text:style-name="Source_20_Text">calculateSalary()</text:span>.</text:p>
      <text:p text:style-name="Text_20_body"><text:span text:style-name="T1">Варіант 5.</text:span> Ієрархія «IoT-датчик» (на основі <text:span text:style-name="Source_20_Text">java-iot</text:span>): інтерфейс <text:span text:style-name="Source_20_Text">Sensor</text:span> з методами <text:span text:style-name="Source_20_Text">read()</text:span> та <text:span text:style-name="Source_20_Text">getUnit()</text:span>; <text:span text:style-name="Source_20_Text">record</text:span>-реалізації <text:span text:style-name="Source_20_Text">TemperatureSensor</text:span>, <text:span text:style-name="Source_20_Text">HumiditySensor</text:span>, <text:span text:style-name="Source_20_Text">PressureSensor</text:span>. Порівняти з інтерфейсом <text:span text:style-name="Source_20_Text">CrowPiProject</text:span>.</text:p>
      <text:p text:style-name="Text_20_body"><text:span text:style-name="T1">Варіант 6.</text:span> Ієрархія «Музичний інструмент»: абстрактний клас <text:span text:style-name="Source_20_Text">Instrument</text:span> (назва, матеріал); підкласи <text:span text:style-name="Source_20_Text">StringInstrument</text:span> (кількість струн), <text:span text:style-name="Source_20_Text">WindInstrument</text:span> (тип мундштука), <text:span text:style-name="Source_20_Text">PercussionInstrument</text:span> (тип корпусу). Метод <text:span text:style-name="Source_20_Text">play()</text:span> з різним виводом.</text:p>
      <text:p text:style-name="Text_20_body"><text:span text:style-name="T1">Варіант 7.</text:span> Ієрархія «Тварина»: абстрактний клас <text:span text:style-name="Source_20_Text">Animal</text:span> (назва, вік); підкласи <text:span text:style-name="Source_20_Text">Dog</text:span> (порода, дресирування), <text:span text:style-name="Source_20_Text">Cat</text:span> (масть, самостійність), <text:span text:style-name="Source_20_Text">Bird</text:span> (розмах крил). Метод <text:span text:style-name="Source_20_Text">sound()</text:span>. Демонстрація поліморфізму через <text:span text:style-name="Source_20_Text">List&lt;Animal&gt;</text:span>.</text:p>
      <text:p text:style-name="Text_20_body"><text:span text:style-name="T1">Варіант 8.</text:span> Ієрархія «Електронний пристрій»: запечатаний інтерфейс <text:span text:style-name="Source_20_Text">Device</text:span> (sealed) з дозволеними <text:span text:style-name="Source_20_Text">Laptop</text:span>, <text:span text:style-name="Source_20_Text">Smartphone</text:span>, <text:span text:style-name="Source_20_Text">Tablet</text:span>. Кожен — <text:span text:style-name="Source_20_Text">record</text:span> з полями (бренд, рік, ціна). Метод <text:span text:style-name="Source_20_Text">describe()</text:span> через <text:span text:style-name="Source_20_Text">switch</text:span> з розпізнаванням зразків.</text:p>
      <text:p text:style-name="Text_20_body"><text:span text:style-name="T1">Варіант 9.</text:span> Ієрархія «Університет»: абстрактний клас <text:span text:style-name="Source_20_Text">Person</text:span> (ім’я, email); підкласи <text:span text:style-name="Source_20_Text">Student</text:span> (залікова книжка, середній бал), <text:span text:style-name="Source_20_Text">Lecturer</text:span> (кафедра, вчений ступінь), <text:span text:style-name="Source_20_Text">Administrator</text:span> (відділ). Метод <text:span text:style-name="Source_20_Text">getRole()</text:span>.</text:p>
      <text:p text:style-name="Text_20_body"><text:span text:style-name="T1">Варіант 10.</text:span> Ієрархія «Їжа»: інтерфейс <text:span text:style-name="Source_20_Text">Edible</text:span> (методи <text:span text:style-name="Source_20_Text">getCalories()</text:span>, <text:span text:style-name="Source_20_Text">isVegetarian()</text:span>); <text:span text:style-name="Source_20_Text">record</text:span>-реалізації <text:span text:style-name="Source_20_Text">Fruit(String name, double calories)</text:span>, <text:span text:style-name="Source_20_Text">Meat(String type, double calories)</text:span>, <text:span text:style-name="Source_20_Text">Vegetable(String name, double calories)</text:span>. Сортування за калорійністю.</text:p>
      <text:p text:style-name="Text_20_body"><text:span text:style-name="T1">Варіант 11.</text:span> Ієрархія «Фінансовий інструмент»: абстрактний клас <text:span text:style-name="Source_20_Text">FinancialAsset</text:span> (назва, ціна); підкласи <text:span text:style-name="Source_20_Text">Stock</text:span> (тікер, дивіденди), <text:span text:style-name="Source_20_Text">Bond</text:span> (купон, термін), <text:span text:style-name="Source_20_Text">Cryptocurrency</text:span> (символ, капіталізація). Метод <text:span text:style-name="Source_20_Text">getExpectedReturn()</text:span>.</text:p>
      <text:p text:style-name="Text_20_body"><text:span text:style-name="T1">Варіант 12.</text:span> Ієрархія «Повідомлення»: інтерфейс <text:span text:style-name="Source_20_Text">Message</text:span> (методи <text:span text:style-name="Source_20_Text">getSender()</text:span>, <text:span text:style-name="Source_20_Text">getContent()</text:span>, <text:span text:style-name="Source_20_Text">getTimestamp()</text:span>); <text:span text:style-name="Source_20_Text">record</text:span>-реалізації <text:span text:style-name="Source_20_Text">TextMessage</text:span>, <text:span text:style-name="Source_20_Text">EmailMessage</text:span>, <text:span text:style-name="Source_20_Text">PushNotification</text:span>. Вивести повідомлення у хронологічному порядку.</text:p>
      <text:p text:style-name="Text_20_body"><text:span text:style-name="T1">Варіант 13.</text:span> Ієрархія «Ігровий персонаж»: абстрактний клас <text:span text:style-name="Source_20_Text">Character</text:span> (ім’я, здоров’я, рівень); підкласи <text:span text:style-name="Source_20_Text">Warrior</text:span> (атака ближнього бою), <text:span text:style-name="Source_20_Text">Mage</text:span> (запас мани), <text:span text:style-name="Source_20_Text">Archer</text:span> (точність). Абстрактний метод <text:span text:style-name="Source_20_Text">attack()</text:span>.</text:p>
      <text:p text:style-name="Text_20_body"><text:span text:style-name="T1">Варіант 14.</text:span> Ієрархія «Логістика»: абстрактний клас <text:span text:style-name="Source_20_Text">Package</text:span> (трекінг-номер, вага, адреса); підкласи <text:span text:style-name="Source_20_Text">StandardPackage</text:span>, <text:span text:style-name="Source_20_Text">ExpressPackage</text:span> (термін доставки у годинах), <text:span text:style-name="Source_20_Text">FragilePackage</text:span> (страхова вартість). Метод <text:span text:style-name="Source_20_Text">calculateShippingCost()</text:span>.</text:p>
      <text:p text:style-name="Text_20_body"><text:span text:style-name="T1">Варіант 15.</text:span> Ієрархія «Медіаконтент»: запечатаний інтерфейс <text:span text:style-name="Source_20_Text">Media</text:span> з реалізаціями <text:span text:style-name="Source_20_Text">Video(String title, int durationSeconds)</text:span>, <text:span text:style-name="Source_20_Text">Audio(String title, int durationSeconds)</text:span>, <text:span text:style-name="Source_20_Text">Podcast(String title, int episodeCount)</text:span>. Метод <text:span text:style-name="Source_20_Text">describe()</text:span> через розпізнавання зразків у <text:span text:style-name="Source_20_Text">switch</text:span>.</text:p>
      <text:p text:style-name="Horizontal_20_Line"/>
      <text:h text:style-name="Heading_20_3" text:outline-level="3"><text:bookmark-start text:name="контрольні-запитання-2"/>Контрольні запитання<text:bookmark-end text:name="контрольні-запитання-2"/></text:h>
      <text:list text:style-name="L32">
        <text:list-item>
          <text:p text:style-name="P187">Що таке клас та об’єкт у Java? Яка різниця між ними з точки зору пам’яті?</text:p>
        </text:list-item>
        <text:list-item>
          <text:p text:style-name="P187">Що означає інкапсуляція? Навіщо поля оголошуються <text:span text:style-name="Source_20_Text">private</text:span>?</text:p>
        </text:list-item>
        <text:list-item>
          <text:p text:style-name="P187">Яка різниця між <text:span text:style-name="Source_20_Text">abstract class</text:span> та <text:span text:style-name="Source_20_Text">interface</text:span> в Java? Коли слід обирати одне, а коли інше?</text:p>
        </text:list-item>
        <text:list-item>
          <text:p text:style-name="P187">Що таке поліморфізм? Поясніть, що означає «динамічне зв’язування» (late binding).</text:p>
        </text:list-item>
        <text:list-item>
          <text:p text:style-name="P187">Що робить ключове слово <text:span text:style-name="Source_20_Text">super</text:span>? Наведіть два різних способи його використання.</text:p>
        </text:list-item>
        <text:list-item>
          <text:p text:style-name="P187">Яке призначення анотації <text:span text:style-name="Source_20_Text">@Override</text:span>? Що відбудеться, якщо перевизначити метод із помилкою в підписі без цієї анотації?</text:p>
        </text:list-item>
        <text:list-item>
          <text:p text:style-name="P187">Що таке <text:span text:style-name="Source_20_Text">record</text:span> у Java? Які методи генеруються компілятором автоматично?</text:p>
        </text:list-item>
        <text:list-item>
          <text:p text:style-name="P187">Що таке <text:span text:style-name="Source_20_Text">sealed</text:span> клас? Яку проблему він вирішує?</text:p>
        </text:list-item>
        <text:list-item>
          <text:p text:style-name="P187">Що таке розпізнавання зразків (pattern matching) для <text:span text:style-name="Source_20_Text">instanceof</text:span>? Як воно спрощує код?</text:p>
        </text:list-item>
        <text:list-item>
          <text:p text:style-name="P187">Яка різниця між перевантаженням (overloading) та перевизначенням (overriding) методу?</text:p>
        </text:list-item>
        <text:list-item>
          <text:p text:style-name="P187">Що таке конструктор? Чи може клас мати кілька конструкторів? Що таке конструктор за замовчуванням?</text:p>
        </text:list-item>
        <text:list-item>
          <text:p text:style-name="P187">Що означає ключове слово <text:span text:style-name="Source_20_Text">final</text:span> для класу, методу та поля?</text:p>
        </text:list-item>
        <text:list-item>
          <text:p text:style-name="P187">Навіщо перевизначати методи <text:span text:style-name="Source_20_Text">equals</text:span> та <text:span text:style-name="Source_20_Text">hashCode</text:span>? Яке правило зв’язку між ними?</text:p>
        </text:list-item>
        <text:list-item>
          <text:p text:style-name="P187">Що таке дефолтний метод (default method) в інтерфейсі? Коли він є доречним?</text:p>
        </text:list-item>
        <text:list-item>
          <text:p text:style-name="P187">Поясніть концепцію «програмування на інтерфейс, а не на реалізацію». Яку перевагу це дає?</text:p>
        </text:list-item>
      </text:list>
      <text:p text:style-name="Horizontal_20_Line"/>
      <text:h text:style-name="Heading_20_3" text:outline-level="3"><text:bookmark-start text:name="перелік-посилань-2"/>Перелік посилань<text:bookmark-end text:name="перелік-посилань-2"/></text:h>
      <text:list text:style-name="L33">
        <text:list-item>
          <text:p text:style-name="P188">Bloch, J. <text:span text:style-name="T2">Effective Java</text:span> (3rd ed.). Boston : Addison-Wesley, 2018. 412 p.</text:p>
        </text:list-item>
        <text:list-item>
          <text:p text:style-name="P188">Horstmann, C. S. <text:span text:style-name="T2">Core Java, Volume I — Fundamentals</text:span> (12th ed.). Hoboken : Pearson, 2022. 928 p.</text:p>
        </text:list-item>
        <text:list-item>
          <text:p text:style-name="P188">Gamma, E., Helm, R., Johnson, R., Vlissides, J. <text:span text:style-name="T2">Design Patterns: Elements of Reusable Object-Oriented Software</text:span>. Boston : Addison-Wesley, 1994. 395 p.</text:p>
        </text:list-item>
        <text:list-item>
          <text:p text:style-name="P188">Oracle Corporation. <text:span text:style-name="T2">Classes and Objects — Java Tutorials</text:span> [Електронний ресурс]. URL: https://docs.oracle.com/javase/tutorial/java/javaOO/ (дата звернення: 2025-09-01).</text:p>
        </text:list-item>
        <text:list-item>
          <text:p text:style-name="P188">Oracle Corporation. <text:span text:style-name="T2">Sealed Classes — JEP 409</text:span> [Електронний ресурс]. URL: https://openjdk.org/jeps/409 (дата звернення: 2025-09-01).</text:p>
        </text:list-item>
        <text:list-item>
          <text:p text:style-name="P188">Oracle Corporation. <text:span text:style-name="T2">Record Classes — JEP 395</text:span> [Електронний ресурс]. URL: https://openjdk.org/jeps/395 (дата звернення: 2025-09-01).</text:p>
        </text:list-item>
        <text:list-item>
          <text:p text:style-name="P188">Schildt, H. <text:span text:style-name="T2">Java: The Complete Reference</text:span> (12th ed.). New York : McGraw-Hill, 2021. 1248 p.</text:p>
        </text:list-item>
      </text:list>
      <text:h text:style-name="Heading_20_1" text:outline-level="1"><text:bookmark-start text:name="лабораторна-робота-4-1"/>Лабораторна робота №4<text:bookmark-end text:name="лабораторна-робота-4-1"/></text:h>
      <text:h text:style-name="Heading_20_2" text:outline-level="2"><text:bookmark-start text:name="операції-зі-стрічками"/>Операції зі стрічками<text:bookmark-end text:name="операції-зі-стрічками"/></text:h>
      <text:p text:style-name="Horizontal_20_Line"/>
      <text:h text:style-name="Heading_20_3" text:outline-level="3"><text:bookmark-start text:name="тема-3"/>Тема<text:bookmark-end text:name="тема-3"/></text:h>
      <text:p text:style-name="First_20_paragraph">Операції зі стрічками (рядками): клас <text:span text:style-name="Source_20_Text">String</text:span>, клас <text:span text:style-name="Source_20_Text">StringBuilder</text:span>, регулярні вирази та форматування тексту в Java.</text:p>
      <text:p text:style-name="Horizontal_20_Line"/>
      <text:h text:style-name="Heading_20_3" text:outline-level="3"><text:bookmark-start text:name="мета-3"/>Мета<text:bookmark-end text:name="мета-3"/></text:h>
      <text:p text:style-name="First_20_paragraph">Набути практичних навичок опрацювання рядкових даних засобами стандартної бібліотеки Java шляхом реалізації програм, що використовують методи класу <text:span text:style-name="Source_20_Text">String</text:span>, <text:span text:style-name="Source_20_Text">StringBuilder</text:span>, <text:span text:style-name="Source_20_Text">StringJoiner</text:span>, текстові блоки та регулярні вирази.</text:p>
      <text:p text:style-name="Horizontal_20_Line"/>
      <text:h text:style-name="Heading_20_3" text:outline-level="3"><text:bookmark-start text:name="теоретичні-відомості-3"/>Теоретичні відомості<text:bookmark-end text:name="теоретичні-відомості-3"/></text:h>
      <text:h text:style-name="Heading_20_4" text:outline-level="4"><text:bookmark-start text:name="клас-string"/>Клас <text:span text:style-name="Source_20_Text">String</text:span><text:bookmark-end text:name="клас-string"/></text:h>
      <text:p text:style-name="First_20_paragraph">Рядок у Java є об’єктом класу <text:span text:style-name="Source_20_Text">java.lang.String</text:span>. Рядки є <text:span text:style-name="T1">незмінними</text:span> (<text:span text:style-name="T2">immutable</text:span>): будь-яка операція, що «змінює» рядок, насправді створює новий об’єкт.</text:p>
      <text:p text:style-name="P189">String s = "Привіт, світе!";</text:p>
      <text:p text:style-name="P190"/>
      <text:p text:style-name="P191">// Основні методи</text:p>
      <text:p text:style-name="P192">int len <text:s text:c="3"/>= s.length(); <text:s text:c="10"/>// 14</text:p>
      <text:p text:style-name="P193">char c <text:s text:c="4"/>= s.charAt(0); <text:s text:c="9"/>// 'П'</text:p>
      <text:p text:style-name="P194">String sub = s.substring(8, 13); <text:s text:c="2"/>// "світ"</text:p>
      <text:p text:style-name="P195">String up <text:s text:c="1"/>= s.toUpperCase(); <text:s text:c="5"/>// "ПРИВІТ, СВІТЕ!"</text:p>
      <text:p text:style-name="P196">String tr <text:s text:c="1"/>= " <text:s text:c="1"/>Java <text:s text:c="1"/>".strip(); <text:s text:c="2"/>// "Java" (аналог trim(), Unicode-безпечний)</text:p>
      <text:p text:style-name="P197">boolean sw = s.startsWith("Прив"); // true</text:p>
      <text:p text:style-name="P198">int idx <text:s text:c="3"/>= s.indexOf("світ"); <text:s text:c="3"/>// 8</text:p>
      <text:p text:style-name="P199">String rep = s.replace("світе", "Java"); // "Привіт, Java!"</text:p>
      <text:p text:style-name="P200">String[] parts = "a,b,c".split(","); // ["a", "b", "c"]</text:p>
      <text:p text:style-name="P201">boolean eq = "hello".equalsIgnoreCase("HELLO"); // true</text:p>
      <text:p text:style-name="First_20_paragraph"><text:span text:style-name="T1">Важливо:</text:span> для порівняння рядків завжди використовувати <text:span text:style-name="Source_20_Text">equals()</text:span> або <text:span text:style-name="Source_20_Text">equalsIgnoreCase()</text:span>, а не <text:span text:style-name="Source_20_Text">==</text:span> (оператор <text:span text:style-name="Source_20_Text">==</text:span> порівнює посилання, а не вміст).</text:p>
      <text:h text:style-name="Heading_20_4" text:outline-level="4"><text:bookmark-start text:name="пул-рядків-string-pool"/>Пул рядків (String Pool)<text:bookmark-end text:name="пул-рядків-string-pool"/></text:h>
      <text:p text:style-name="First_20_paragraph">Рядкові літерали зберігаються у пулі рядків (<text:span text:style-name="Source_20_Text">String Pool</text:span>) у купі. Два однакові літерали вказують на один об’єкт. Метод <text:span text:style-name="Source_20_Text">intern()</text:span> дозволяє помістити рядок у пул вручну.</text:p>
      <text:h text:style-name="Heading_20_4" text:outline-level="4"><text:bookmark-start text:name="текстові-блоки-text-blocks-java-15"/>Текстові блоки (Text Blocks, Java 15+)<text:bookmark-end text:name="текстові-блоки-text-blocks-java-15"/></text:h>
      <text:p text:style-name="P202">String json = """</text:p>
      <text:p text:style-name="P203"><text:s text:c="4"/>{</text:p>
      <text:p text:style-name="P204"><text:s text:c="8"/>"sensor": "DHT11",</text:p>
      <text:p text:style-name="P205"><text:s text:c="8"/>"temperature": 23.5</text:p>
      <text:p text:style-name="P206"><text:s text:c="4"/>}</text:p>
      <text:p text:style-name="P207"><text:s text:c="4"/>""";</text:p>
      <text:p text:style-name="First_20_paragraph">Відступи обрізаються автоматично. Текстові блоки зручні для JSON, SQL, HTML у коді.</text:p>
      <text:h text:style-name="Heading_20_4" text:outline-level="4"><text:bookmark-start text:name="stringbuilder-та-stringbuffer"/><text:span text:style-name="Source_20_Text">StringBuilder</text:span> та <text:span text:style-name="Source_20_Text">StringBuffer</text:span><text:bookmark-end text:name="stringbuilder-та-stringbuffer"/></text:h>
      <text:p text:style-name="First_20_paragraph"><text:span text:style-name="Source_20_Text">StringBuilder</text:span> — змінний (mutable) аналог <text:span text:style-name="Source_20_Text">String</text:span>; ефективний для накопичення рядків у циклі:</text:p>
      <text:p text:style-name="P208">StringBuilder sb = new StringBuilder();</text:p>
      <text:p text:style-name="P209">for (int i = 1; i &lt;= 5; i++) {</text:p>
      <text:p text:style-name="P210"><text:s text:c="4"/>sb.append("Рядок ").append(i).append('\n');</text:p>
      <text:p text:style-name="P211">}</text:p>
      <text:p text:style-name="P212">String result = sb.toString();</text:p>
      <text:p text:style-name="First_20_paragraph"><text:span text:style-name="Source_20_Text">StringBuffer</text:span> — потокобезпечний (thread-safe) варіант <text:span text:style-name="Source_20_Text">StringBuilder</text:span>; повільніший через синхронізацію.</text:p>
      <text:h text:style-name="Heading_20_4" text:outline-level="4"><text:bookmark-start text:name="форматування-string.format-та-formatted"/>Форматування: <text:span text:style-name="Source_20_Text">String.format</text:span> та <text:span text:style-name="Source_20_Text">formatted</text:span><text:bookmark-end text:name="форматування-string.format-та-formatted"/></text:h>
      <text:p text:style-name="P213">String msg = String.format("Температура: %.1f°C, Вологість: %d%%", 23.5, 65);</text:p>
      <text:p text:style-name="P214">// Або через instance-метод (Java 15+):</text:p>
      <text:p text:style-name="P215">String msg2 = "Значення: %d".formatted(42);</text:p>
      <text:h text:style-name="Heading_20_4" text:outline-level="4"><text:bookmark-start text:name="stringjoiner-та-string.join"/><text:span text:style-name="Source_20_Text">StringJoiner</text:span> та <text:span text:style-name="Source_20_Text">String.join</text:span><text:bookmark-end text:name="stringjoiner-та-string.join"/></text:h>
      <text:p text:style-name="P216">// Об'єднання з роздільником</text:p>
      <text:p text:style-name="P217">String joined = String.join(", ", "Java", "Python", "C++"); // "Java, Python, C++"</text:p>
      <text:p text:style-name="P218"/>
      <text:p text:style-name="P219">// З префіксом та суфіксом</text:p>
      <text:p text:style-name="P220">StringJoiner sj = new StringJoiner(", ", "[", "]");</text:p>
      <text:p text:style-name="P221">sj.add("Alpha").add("Beta").add("Gamma");</text:p>
      <text:p text:style-name="P222">System.out.println(sj); // [Alpha, Beta, Gamma]</text:p>
      <text:h text:style-name="Heading_20_4" text:outline-level="4"><text:bookmark-start text:name="регулярні-вирази"/>Регулярні вирази<text:bookmark-end text:name="регулярні-вирази"/></text:h>
      <text:p text:style-name="P223">import java.util.regex.*;</text:p>
      <text:p text:style-name="P224"/>
      <text:p text:style-name="P225">String text = "Код: A-123, Серійний: B-456";</text:p>
      <text:p text:style-name="P226"/>
      <text:p text:style-name="P227">// Перевірка відповідності</text:p>
      <text:p text:style-name="P228">boolean match = "abc123".matches("[a-z]+\\d+"); // true</text:p>
      <text:p text:style-name="P229"/>
      <text:p text:style-name="P230">// Пошук усіх збігів</text:p>
      <text:p text:style-name="P231">Pattern p = Pattern.compile("[A-Z]-\\d+");</text:p>
      <text:p text:style-name="P232">Matcher m = p.matcher(text);</text:p>
      <text:p text:style-name="P233">while (m.find()) {</text:p>
      <text:p text:style-name="P234"><text:s text:c="4"/>System.out.println(m.group()); // A-123, потім B-456</text:p>
      <text:p text:style-name="P235">}</text:p>
      <text:p text:style-name="P236"/>
      <text:p text:style-name="P237">// Заміна</text:p>
      <text:p text:style-name="P238">String clean = text.replaceAll("\\d+", "***"); // маскування чисел</text:p>
      <text:h text:style-name="Heading_20_4" text:outline-level="4"><text:bookmark-start text:name="приклад-з-репозиторію-java-iot-2"/>Приклад з репозиторію java-iot<text:bookmark-end text:name="приклад-з-репозиторію-java-iot-2"/></text:h>
      <text:p text:style-name="First_20_paragraph">Клас <text:a xlink:type="simple" xlink:href="https://github.com/AndriyLutskiv/java-iot/blob/main/projects/p03-music-box/src/main/java/ua/crowpi/projects/p03/IrCodeDecoder.java" office:name=""><text:span text:style-name="Definition"><text:span text:style-name="Source_20_Text">IrCodeDecoder.java</text:span></text:span></text:a> виконує розбір бітових послідовностей ІЧ-сигналу у рядкові коди команд. Клас <text:a xlink:type="simple" xlink:href="https://github.com/AndriyLutskiv/java-iot/blob/main/projects/p03-music-box/src/main/java/ua/crowpi/projects/p03/MelodyLibrary.java" office:name=""><text:span text:style-name="Definition"><text:span text:style-name="Source_20_Text">MelodyLibrary.java</text:span></text:span></text:a> зберігає мелодії у текстовому форматі та розбирає їх у ноти. Рекомендується проаналізувати, як у цих класах використовуються операції зі стрічками.</text:p>
      <text:p text:style-name="Horizontal_20_Line"/>
      <text:h text:style-name="Heading_20_3" text:outline-level="3"><text:bookmark-start text:name="хід-виконання-роботи-3"/>Хід виконання роботи<text:bookmark-end text:name="хід-виконання-роботи-3"/></text:h>
      <text:list text:style-name="L34">
        <text:list-item>
          <text:p text:style-name="P239">Ознайомитися з класами <text:span text:style-name="Source_20_Text">IrCodeDecoder.java</text:span> та <text:span text:style-name="Source_20_Text">MelodyLibrary.java</text:span> (посилання вище). Визначити, які методи <text:span text:style-name="Source_20_Text">String</text:span>/<text:span text:style-name="Source_20_Text">StringBuilder</text:span> у них застосовано.</text:p>
        </text:list-item>
        <text:list-item>
          <text:p text:style-name="P239">Написати метод, що демонструє роботу щонайменше 10 методів класу <text:span text:style-name="Source_20_Text">String</text:span>. Виводити вхідний рядок, назву методу та результат.</text:p>
        </text:list-item>
        <text:list-item>
          <text:p text:style-name="P239">Порівняти продуктивність конкатенації через <text:span text:style-name="Source_20_Text">+</text:span> та через <text:span text:style-name="Source_20_Text">StringBuilder</text:span> у циклі 100 000 ітерацій. Використати <text:span text:style-name="Source_20_Text">System.nanoTime()</text:span> для вимірювання. Зробити висновки.</text:p>
        </text:list-item>
        <text:list-item>
          <text:p text:style-name="P239">Реалізувати завдання відповідно до свого варіанту.</text:p>
        </text:list-item>
        <text:list-item>
          <text:p text:style-name="P239">Реалізувати валідацію вхідних даних за допомогою регулярних виразів (наприклад, email, номер телефону, IP-адреса або дата — залежно від варіанту).</text:p>
        </text:list-item>
        <text:list-item>
          <text:p text:style-name="P239">Продемонструвати текстові блоки: оголосити рядок у форматі JSON або SQL без екранування, вивести на екран.</text:p>
        </text:list-item>
        <text:list-item>
          <text:p text:style-name="P239">Реалізувати метод форматування з <text:span text:style-name="Source_20_Text">String.format</text:span> та <text:span text:style-name="Source_20_Text">StringJoiner</text:span>.</text:p>
        </text:list-item>
        <text:list-item>
          <text:p text:style-name="P239">Реалізувати власний метод <text:span text:style-name="Source_20_Text">reverse(String s)</text:span> без використання <text:span text:style-name="Source_20_Text">StringBuilder.reverse()</text:span>. Порівняти результати з вбудованим методом.</text:p>
        </text:list-item>
        <text:list-item>
          <text:p text:style-name="P239">Написати 3 JUnit-тести для реалізованих методів рядкової обробки.</text:p>
        </text:list-item>
        <text:list-item>
          <text:p text:style-name="P239">Оформити звіт: вихідний код, порівняльна таблиця продуктивності, результати тестування.</text:p>
        </text:list-item>
      </text:list>
      <text:p text:style-name="Horizontal_20_Line"/>
      <text:h text:style-name="Heading_20_3" text:outline-level="3"><text:bookmark-start text:name="індивідуальні-завдання-3"/>Індивідуальні завдання<text:bookmark-end text:name="індивідуальні-завдання-3"/></text:h>
      <text:p text:style-name="First_20_paragraph">Розробити програму (2–3 класи або один складний клас), що виконує обробку рядкових даних. Обсяг: до 150 рядків коду.</text:p>
      <text:p text:style-name="Text_20_body"><text:span text:style-name="T1">Варіант 1.</text:span> Реалізувати клас <text:span text:style-name="Source_20_Text">TextStatistics</text:span>, що приймає текст і обчислює: кількість слів, речень, символів (без пробілів), кількість кожної голосної літери. Слова розбивати методом <text:span text:style-name="Source_20_Text">split</text:span> за пробілами та розділовими знаками.</text:p>
      <text:p text:style-name="Text_20_body"><text:span text:style-name="T1">Варіант 2.</text:span> Реалізувати клас <text:span text:style-name="Source_20_Text">PasswordValidator</text:span> з методами: <text:span text:style-name="Source_20_Text">isStrong(String pwd)</text:span> — пароль ≥8 символів, має великі, малі, цифри та спецсимвол; <text:span text:style-name="Source_20_Text">generateMask(String pwd)</text:span> — маскує всі символи крім першого та останнього. Використати регулярні вирази.</text:p>
      <text:p text:style-name="Text_20_body"><text:span text:style-name="T1">Варіант 3.</text:span> Реалізувати клас <text:span text:style-name="Source_20_Text">CsvParser</text:span>, що розбирає рядок у форматі CSV (з урахуванням полів у лапках, що можуть містити кому) та повертає <text:span text:style-name="Source_20_Text">List&lt;String&gt;</text:span>. Написати зворотній метод <text:span text:style-name="Source_20_Text">toCsvLine(List&lt;String&gt;)</text:span>.</text:p>
      <text:p text:style-name="Text_20_body"><text:span text:style-name="T1">Варіант 4.</text:span> Реалізувати клас <text:span text:style-name="Source_20_Text">TemplateFiller</text:span>, що приймає шаблон рядка з плейсхолдерами у форматі <text:span text:style-name="Source_20_Text">{{key}}</text:span> та <text:span text:style-name="Source_20_Text">Map&lt;String, String&gt;</text:span> значень, і повертає заповнений рядок. Використати <text:span text:style-name="Source_20_Text">Pattern</text:span> та <text:span text:style-name="Source_20_Text">Matcher</text:span> для пошуку плейсхолдерів.</text:p>
      <text:p text:style-name="Text_20_body"><text:span text:style-name="T1">Варіант 5.</text:span> Реалізувати клас <text:span text:style-name="Source_20_Text">MorseCodeConverter</text:span> з методами: <text:span text:style-name="Source_20_Text">toMorse(String text)</text:span> — перетворює латинський текст у код Морзе; <text:span text:style-name="Source_20_Text">fromMorse(String morse)</text:span> — зворотнє перетворення. Зберігати таблицю у <text:span text:style-name="Source_20_Text">Map&lt;Character, String&gt;</text:span>.</text:p>
      <text:p text:style-name="Text_20_body"><text:span text:style-name="T1">Варіант 6.</text:span> Реалізувати клас <text:span text:style-name="Source_20_Text">LogParser</text:span>, що розбирає рядки лог-файлу формату <text:span text:style-name="Source_20_Text">[РІВЕНЬ] ЧАС — Повідомлення</text:span>. Методи: <text:span text:style-name="Source_20_Text">getLevel()</text:span>, <text:span text:style-name="Source_20_Text">getTime()</text:span>, <text:span text:style-name="Source_20_Text">getMessage()</text:span>. Фільтрувати за рівнем за допомогою <text:span text:style-name="Source_20_Text">enum LogLevel</text:span>.</text:p>
      <text:p text:style-name="Text_20_body"><text:span text:style-name="T1">Варіант 7.</text:span> Реалізувати клас <text:span text:style-name="Source_20_Text">IrMessageDecoder</text:span> (натхненний <text:a xlink:type="simple" xlink:href="https://github.com/AndriyLutskiv/java-iot/blob/main/projects/p03-music-box/src/main/java/ua/crowpi/projects/p03/IrCodeDecoder.java" office:name=""><text:span text:style-name="Definition"><text:span text:style-name="Source_20_Text">IrCodeDecoder.java</text:span></text:span></text:a>): приймає рядок із нулів і одиниць довжиною 32 символи, розбиває на 4 байти, виводить кожен у десятковому та шістнадцятковому форматі. Перевірити рядок регулярним виразом <text:span text:style-name="Source_20_Text">[01]{32}</text:span>.</text:p>
      <text:p text:style-name="Text_20_body"><text:span text:style-name="T1">Варіант 8.</text:span> Реалізувати клас <text:span text:style-name="Source_20_Text">MarkdownStripper</text:span>, що видаляє Markdown-розмітку з рядка: <text:span text:style-name="Source_20_Text">**текст**</text:span> → <text:span text:style-name="Source_20_Text">текст</text:span>, <text:span text:style-name="Source_20_Text">_текст_</text:span> → <text:span text:style-name="Source_20_Text">текст</text:span>, <text:span text:style-name="Source_20_Text">[текст](url)</text:span> → <text:span text:style-name="Source_20_Text">текст</text:span>, заголовки <text:span text:style-name="Source_20_Text">#</text:span> → без <text:span text:style-name="Source_20_Text">#</text:span>. Використати <text:span text:style-name="Source_20_Text">replaceAll</text:span> з регулярними виразами.</text:p>
      <text:p text:style-name="Text_20_body"><text:span text:style-name="T1">Варіант 9.</text:span> Реалізувати клас <text:span text:style-name="Source_20_Text">VersionComparator</text:span>, що порівнює версії програм у форматі <text:span text:style-name="Source_20_Text">major.minor.patch</text:span> (наприклад, <text:span text:style-name="Source_20_Text">"1.10.3"</text:span> та <text:span text:style-name="Source_20_Text">"1.9.99"</text:span>). Методи: <text:span text:style-name="Source_20_Text">compare(String v1, String v2)</text:span> → -1, 0 або 1; <text:span text:style-name="Source_20_Text">isCompatible(String v1, String v2)</text:span> — однакові <text:span text:style-name="Source_20_Text">major</text:span>.</text:p>
      <text:p text:style-name="Text_20_body"><text:span text:style-name="T1">Варіант 10.</text:span> Реалізувати клас <text:span text:style-name="Source_20_Text">SqlQueryBuilder</text:span> із методами <text:span text:style-name="Source_20_Text">select(String... cols)</text:span>, <text:span text:style-name="Source_20_Text">from(String table)</text:span>, <text:span text:style-name="Source_20_Text">where(String condition)</text:span>, <text:span text:style-name="Source_20_Text">build()</text:span>. Клас накопичує частини запиту в <text:span text:style-name="Source_20_Text">StringBuilder</text:span> та повертає готовий SQL-рядок. Забороняється конкатенація через <text:span text:style-name="Source_20_Text">+</text:span> в циклі.</text:p>
      <text:p text:style-name="Text_20_body"><text:span text:style-name="T1">Варіант 11.</text:span> Реалізувати клас <text:span text:style-name="Source_20_Text">PhoneNumberFormatter</text:span>, що нормалізує рядки телефонних номерів різних форматів <text:span text:style-name="Source_20_Text">(050) 123-45-67</text:span>, <text:span text:style-name="Source_20_Text">+380501234567</text:span>, <text:span text:style-name="Source_20_Text">050-123-45-67</text:span> до єдиного формату <text:span text:style-name="Source_20_Text">+38 (XXX) XXX-XX-XX</text:span>. Використати регулярні вирази та <text:span text:style-name="Source_20_Text">replaceAll</text:span>.</text:p>
      <text:p text:style-name="Text_20_body"><text:span text:style-name="T1">Варіант 12.</text:span> Реалізувати клас <text:span text:style-name="Source_20_Text">RomanNumeralConverter</text:span> з методами: <text:span text:style-name="Source_20_Text">toRoman(int n)</text:span> — перетворює ціле (1–3999) у рядок римських цифр; <text:span text:style-name="Source_20_Text">toArabic(String roman)</text:span> — зворотнє перетворення. Валідувати вхідний рядок регулярним виразом.</text:p>
      <text:p text:style-name="Text_20_body"><text:span text:style-name="T1">Варіант 13.</text:span> Реалізувати клас <text:span text:style-name="Source_20_Text">HtmlEscaper</text:span> з методами: <text:span text:style-name="Source_20_Text">escape(String text)</text:span> — замінює <text:span text:style-name="Source_20_Text">&lt;</text:span>, <text:span text:style-name="Source_20_Text">&gt;</text:span>, <text:span text:style-name="Source_20_Text">&amp;</text:span>, <text:span text:style-name="Source_20_Text">"</text:span>, <text:span text:style-name="Source_20_Text">'</text:span> на HTML-entities; <text:span text:style-name="Source_20_Text">unescape(String html)</text:span> — зворотнє. Написати тести з рядками, що містять усі спецсимволи.</text:p>
      <text:p text:style-name="Text_20_body"><text:span text:style-name="T1">Варіант 14.</text:span> Реалізувати клас <text:span text:style-name="Source_20_Text">NoteParser</text:span> (натхненний <text:a xlink:type="simple" xlink:href="https://github.com/AndriyLutskiv/java-iot/blob/main/projects/p03-music-box/src/main/java/ua/crowpi/projects/p03/MelodyLibrary.java" office:name=""><text:span text:style-name="Definition"><text:span text:style-name="Source_20_Text">MelodyLibrary.java</text:span></text:span></text:a>): приймає рядок нот формату <text:span text:style-name="Source_20_Text">"C4:500,D4:250,E4:250"</text:span> (нота:тривалість), повертає список записів <text:span text:style-name="Source_20_Text">NoteEntry(String name, int durationMs)</text:span>. Валідувати формат регулярним виразом.</text:p>
      <text:p text:style-name="Text_20_body"><text:span text:style-name="T1">Варіант 15.</text:span> Реалізувати клас <text:span text:style-name="Source_20_Text">WordFrequencyCounter</text:span>, що підраховує частоту кожного слова у тексті (без урахування регістру та розділових знаків). Виводити топ-10 найчастіших слів у відсортованому порядку. Порівняти реалізацію на <text:span text:style-name="Source_20_Text">HashMap</text:span> з реалізацією на потоках (<text:span text:style-name="Source_20_Text">Stream</text:span>).</text:p>
      <text:p text:style-name="Horizontal_20_Line"/>
      <text:h text:style-name="Heading_20_3" text:outline-level="3"><text:bookmark-start text:name="контрольні-запитання-3"/>Контрольні запитання<text:bookmark-end text:name="контрольні-запитання-3"/></text:h>
      <text:list text:style-name="L35">
        <text:list-item>
          <text:p text:style-name="P240">Чому рядки у Java є незмінними (immutable)? Які переваги це дає?</text:p>
        </text:list-item>
        <text:list-item>
          <text:p text:style-name="P240">Чим відрізняється <text:span text:style-name="Source_20_Text">==</text:span> від <text:span text:style-name="Source_20_Text">equals()</text:span> при порівнянні рядків? Наведіть приклад, де <text:span text:style-name="Source_20_Text">==</text:span> дає неочікуваний результат.</text:p>
        </text:list-item>
        <text:list-item>
          <text:p text:style-name="P240">Що таке пул рядків (String Pool)? Як метод <text:span text:style-name="Source_20_Text">intern()</text:span> пов’язаний з пулом?</text:p>
        </text:list-item>
        <text:list-item>
          <text:p text:style-name="P240">Чому конкатенація рядків через <text:span text:style-name="Source_20_Text">+</text:span> у циклі є неефективною? Яку альтернативу слід використовувати?</text:p>
        </text:list-item>
        <text:list-item>
          <text:p text:style-name="P240">Чим відрізняється <text:span text:style-name="Source_20_Text">StringBuilder</text:span> від <text:span text:style-name="Source_20_Text">StringBuffer</text:span>? Коли слід використовувати кожен?</text:p>
        </text:list-item>
        <text:list-item>
          <text:p text:style-name="P240">Що таке текстові блоки (text blocks)? Як обробляється відступ у текстовому блоці?</text:p>
        </text:list-item>
        <text:list-item>
          <text:p text:style-name="P240">Що робить метод <text:span text:style-name="Source_20_Text">strip()</text:span> і чим він відрізняється від <text:span text:style-name="Source_20_Text">trim()</text:span>?</text:p>
        </text:list-item>
        <text:list-item>
          <text:p text:style-name="P240">Як у Java реалізована підтримка Unicode у рядках? Що таке кодова точка (code point) та одиниця коду (code unit)?</text:p>
        </text:list-item>
        <text:list-item>
          <text:p text:style-name="P240">Що таке регулярний вираз? Поясніть синтаксис: <text:span text:style-name="Source_20_Text">[a-z]+</text:span>, <text:span text:style-name="Source_20_Text">\\d{3}</text:span>, <text:span text:style-name="Source_20_Text">^[A-Z].*\\.$</text:span>.</text:p>
        </text:list-item>
        <text:list-item>
          <text:p text:style-name="P240">Що робить метод <text:span text:style-name="Source_20_Text">split(String regex, int limit)</text:span> з ненульовим параметром <text:span text:style-name="Source_20_Text">limit</text:span>?</text:p>
        </text:list-item>
        <text:list-item>
          <text:p text:style-name="P240">Яка різниця між <text:span text:style-name="Source_20_Text">String.format</text:span> та <text:span text:style-name="Source_20_Text">formatted()</text:span>?</text:p>
        </text:list-item>
        <text:list-item>
          <text:p text:style-name="P240">Що таке <text:span text:style-name="Source_20_Text">StringJoiner</text:span>? Яку перевагу він має порівняно з <text:span text:style-name="Source_20_Text">String.join</text:span>?</text:p>
        </text:list-item>
        <text:list-item>
          <text:p text:style-name="P240">Як порівнювати рядки без урахування регістру? Чи враховує <text:span text:style-name="Source_20_Text">equalsIgnoreCase</text:span> кирилицю?</text:p>
        </text:list-item>
        <text:list-item>
          <text:p text:style-name="P240">Що таке <text:span text:style-name="Source_20_Text">Matcher.group(int)</text:span> та як отримати всі групи захоплення?</text:p>
        </text:list-item>
        <text:list-item>
          <text:p text:style-name="P240">Коли краще використовувати <text:span text:style-name="Source_20_Text">contains()</text:span>, а коли <text:span text:style-name="Source_20_Text">indexOf()</text:span> — наведіть відмінності.</text:p>
        </text:list-item>
      </text:list>
      <text:p text:style-name="Horizontal_20_Line"/>
      <text:h text:style-name="Heading_20_3" text:outline-level="3"><text:bookmark-start text:name="перелік-посилань-3"/>Перелік посилань<text:bookmark-end text:name="перелік-посилань-3"/></text:h>
      <text:list text:style-name="L36">
        <text:list-item>
          <text:p text:style-name="P241">Horstmann, C. S. <text:span text:style-name="T2">Core Java, Volume I — Fundamentals</text:span> (12th ed.). Hoboken : Pearson, 2022. 928 p.</text:p>
        </text:list-item>
        <text:list-item>
          <text:p text:style-name="P241">Bloch, J. <text:span text:style-name="T2">Effective Java</text:span> (3rd ed.). Boston : Addison-Wesley, 2018. 412 p.</text:p>
        </text:list-item>
        <text:list-item>
          <text:p text:style-name="P241">Oracle Corporation. <text:span text:style-name="T2">java.lang.String API</text:span> [Електронний ресурс]. URL: https://docs.oracle.com/en/java/javase/25/docs/api/java.base/java/lang/String.html (дата звернення: 2025-09-01).</text:p>
        </text:list-item>
        <text:list-item>
          <text:p text:style-name="P241">Oracle Corporation. <text:span text:style-name="T2">java.lang.StringBuilder API</text:span> [Електронний ресурс]. URL: https://docs.oracle.com/en/java/javase/25/docs/api/java.base/java/lang/StringBuilder.html (дата звернення: 2025-09-01).</text:p>
        </text:list-item>
        <text:list-item>
          <text:p text:style-name="P241">Oracle Corporation. <text:span text:style-name="T2">Regular Expressions — Java Tutorials</text:span> [Електронний ресурс]. URL: https://docs.oracle.com/javase/tutorial/essential/regex/ (дата звернення: 2025-09-01).</text:p>
        </text:list-item>
        <text:list-item>
          <text:p text:style-name="P241">Oracle Corporation. <text:span text:style-name="T2">Text Blocks — JEP 378</text:span> [Електронний ресурс]. URL: https://openjdk.org/jeps/378 (дата звернення: 2025-09-01).</text:p>
        </text:list-item>
        <text:list-item>
          <text:p text:style-name="P241">Schildt, H. <text:span text:style-name="T2">Java: The Complete Reference</text:span> (12th ed.). New York : McGraw-Hill, 2021. 1248 p.</text:p>
        </text:list-item>
        <text:list-item>
          <text:p text:style-name="P241">Friedl, J. E. F. <text:span text:style-name="T2">Mastering Regular Expressions</text:span> (3rd ed.). Sebastopol : O’Reilly Media, 2006. 542 p.</text:p>
        </text:list-item>
      </text:list>
      <text:h text:style-name="Heading_20_1" text:outline-level="1"><text:bookmark-start text:name="лабораторна-робота-5-1"/>Лабораторна робота №5<text:bookmark-end text:name="лабораторна-робота-5-1"/></text:h>
      <text:h text:style-name="Heading_20_2" text:outline-level="2"><text:bookmark-start text:name="файли.-потоки-введеннявиведення"/>Файли. Потоки введення/виведення<text:bookmark-end text:name="файли.-потоки-введеннявиведення"/></text:h>
      <text:p text:style-name="Horizontal_20_Line"/>
      <text:h text:style-name="Heading_20_3" text:outline-level="3"><text:bookmark-start text:name="тема-4"/>Тема<text:bookmark-end text:name="тема-4"/></text:h>
      <text:p text:style-name="First_20_paragraph">Робота з файловою системою та потоками введення/виведення у Java: пакети <text:span text:style-name="Source_20_Text">java.io</text:span> та <text:span text:style-name="Source_20_Text">java.nio.file</text:span>.</text:p>
      <text:p text:style-name="Horizontal_20_Line"/>
      <text:h text:style-name="Heading_20_3" text:outline-level="3"><text:bookmark-start text:name="мета-4"/>Мета<text:bookmark-end text:name="мета-4"/></text:h>
      <text:p text:style-name="First_20_paragraph">Набути практичних навичок читання та запису файлів, серіалізації об’єктів та роботи з файловою системою засобами пакетів <text:span text:style-name="Source_20_Text">java.io</text:span> та <text:span text:style-name="Source_20_Text">java.nio.file</text:span> мови Java шляхом реалізації програм обробки файлових даних.</text:p>
      <text:p text:style-name="Horizontal_20_Line"/>
      <text:h text:style-name="Heading_20_3" text:outline-level="3"><text:bookmark-start text:name="теоретичні-відомості-4"/>Теоретичні відомості<text:bookmark-end text:name="теоретичні-відомості-4"/></text:h>
      <text:h text:style-name="Heading_20_4" text:outline-level="4"><text:bookmark-start text:name="ієрархія-потоків-у-java.io"/>Ієрархія потоків у <text:span text:style-name="Source_20_Text">java.io</text:span><text:bookmark-end text:name="ієрархія-потоків-у-java.io"/></text:h>
      <text:p text:style-name="First_20_paragraph">Потоки поділяються на <text:span text:style-name="T1">байтові</text:span> та <text:span text:style-name="T1">символьні</text:span>: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Table_20_Heading">Тип</text:p>
            </table:table-cell>
            <table:table-cell table:style-name="TableHeaderRowCell" office:value-type="string">
              <text:p text:style-name="Table_20_Heading">Вхідні</text:p>
            </table:table-cell>
            <table:table-cell table:style-name="TableHeaderRowCell" office:value-type="string">
              <text:p text:style-name="Table_20_Heading">Вихідні</text:p>
            </table:table-cell>
          </table:table-row>
        </table:table-header-rows>
        <table:table-row>
          <table:table-cell table:style-name="TableRowCell" office:value-type="string">
            <text:p text:style-name="Table_20_Contents">Байтові</text:p>
          </table:table-cell>
          <table:table-cell table:style-name="TableRowCell" office:value-type="string">
            <text:p text:style-name="Table_20_Contents"><text:span text:style-name="Source_20_Text">InputStream</text:span></text:p>
          </table:table-cell>
          <table:table-cell table:style-name="TableRowCell" office:value-type="string">
            <text:p text:style-name="Table_20_Contents"><text:span text:style-name="Source_20_Text">OutputStream</text:span></text:p>
          </table:table-cell>
        </table:table-row>
        <table:table-row>
          <table:table-cell table:style-name="TableRowCell" office:value-type="string">
            <text:p text:style-name="Table_20_Contents">Символьні</text:p>
          </table:table-cell>
          <table:table-cell table:style-name="TableRowCell" office:value-type="string">
            <text:p text:style-name="Table_20_Contents"><text:span text:style-name="Source_20_Text">Reader</text:span></text:p>
          </table:table-cell>
          <table:table-cell table:style-name="TableRowCell" office:value-type="string">
            <text:p text:style-name="Table_20_Contents"><text:span text:style-name="Source_20_Text">Writer</text:span></text:p>
          </table:table-cell>
        </table:table-row>
      </table:table>
      <text:p text:style-name="First_20_paragraph">Ключові реалізації: - <text:span text:style-name="Source_20_Text">FileInputStream</text:span> / <text:span text:style-name="Source_20_Text">FileOutputStream</text:span> — байтовий файловий I/O - <text:span text:style-name="Source_20_Text">FileReader</text:span> / <text:span text:style-name="Source_20_Text">FileWriter</text:span> — символьний файловий I/O - <text:span text:style-name="Source_20_Text">BufferedReader</text:span> / <text:span text:style-name="Source_20_Text">BufferedWriter</text:span> — буферизовані обгортки для ефективного I/O - <text:span text:style-name="Source_20_Text">PrintWriter</text:span> — зручне форматоване виведення у файл</text:p>
      <text:h text:style-name="Heading_20_4" text:outline-level="4"><text:bookmark-start text:name="java.nio.file-сучасний-api"/><text:span text:style-name="Source_20_Text">java.nio.file</text:span> — сучасний API<text:bookmark-end text:name="java.nio.file-сучасний-api"/></text:h>
      <text:p text:style-name="First_20_paragraph">Починаючи з Java 7, рекомендується використовувати <text:span text:style-name="Source_20_Text">java.nio.file</text:span>:</text:p>
      <text:p text:style-name="P242">import java.nio.file.*;</text:p>
      <text:p text:style-name="P243">import java.io.IOException;</text:p>
      <text:p text:style-name="P244">import java.util.List;</text:p>
      <text:p text:style-name="P245"/>
      <text:p text:style-name="P246">Path path = Path.of("data", "readings.csv"); // Path.of замість new File()</text:p>
      <text:p text:style-name="P247"/>
      <text:p text:style-name="P248">// Запис усіх рядків одразу</text:p>
      <text:p text:style-name="P249">List&lt;String&gt; lines = List.of("час,температура", "10:00,23.5", "11:00,24.1");</text:p>
      <text:p text:style-name="P250">Files.write(path, lines, StandardCharsets.UTF_8);</text:p>
      <text:p text:style-name="P251"/>
      <text:p text:style-name="P252">// Читання усіх рядків</text:p>
      <text:p text:style-name="P253">List&lt;String&gt; read = Files.readAllLines(path, StandardCharsets.UTF_8);</text:p>
      <text:p text:style-name="P254"/>
      <text:p text:style-name="P255">// Читання у рядок</text:p>
      <text:p text:style-name="P256">String content = Files.readString(path); // Java 11+</text:p>
      <text:p text:style-name="P257"/>
      <text:p text:style-name="P258">// Запис рядка</text:p>
      <text:p text:style-name="P259">Files.writeString(path, "Новий вміст", StandardOpenOption.APPEND);</text:p>
      <text:h text:style-name="Heading_20_4" text:outline-level="4"><text:bookmark-start text:name="bufferedreader-з-try-with-resources"/><text:span text:style-name="Source_20_Text">BufferedReader</text:span> з <text:span text:style-name="Source_20_Text">try-with-resources</text:span><text:bookmark-end text:name="bufferedreader-з-try-with-resources"/></text:h>
      <text:p text:style-name="P260">Path path = Path.of("log.txt");</text:p>
      <text:p text:style-name="P261">try (BufferedReader reader = Files.newBufferedReader(path, StandardCharsets.UTF_8)) {</text:p>
      <text:p text:style-name="P262"><text:s text:c="4"/>String line;</text:p>
      <text:p text:style-name="P263"><text:s text:c="4"/>while ((line = reader.readLine()) != null) {</text:p>
      <text:p text:style-name="P264"><text:s text:c="8"/>System.out.println(line);</text:p>
      <text:p text:style-name="P265"><text:s text:c="4"/>}</text:p>
      <text:p text:style-name="P266">} catch (IOException e) {</text:p>
      <text:p text:style-name="P267"><text:s text:c="4"/>System.err.println("Помилка читання: " + e.getMessage());</text:p>
      <text:p text:style-name="P268">}</text:p>
      <text:p text:style-name="First_20_paragraph">Конструкція <text:span text:style-name="Source_20_Text">try-with-resources</text:span> гарантує закриття ресурсу навіть при виникненні виключення.</text:p>
      <text:h text:style-name="Heading_20_4" text:outline-level="4"><text:bookmark-start text:name="файлова-система-path-та-files"/>Файлова система: <text:span text:style-name="Source_20_Text">Path</text:span> та <text:span text:style-name="Source_20_Text">Files</text:span><text:bookmark-end text:name="файлова-система-path-та-files"/></text:h>
      <text:p text:style-name="P269">Path dir = Path.of("output");</text:p>
      <text:p text:style-name="P270">Files.createDirectories(dir); <text:s text:c="13"/>// створити директорії рекурсивно</text:p>
      <text:p text:style-name="P271">Files.exists(dir); <text:s text:c="24"/>// перевірка існування</text:p>
      <text:p text:style-name="P272">Files.copy(src, dst, StandardCopyOption.REPLACE_EXISTING);</text:p>
      <text:p text:style-name="P273">Files.move(src, dst);</text:p>
      <text:p text:style-name="P274">Files.delete(path);</text:p>
      <text:p text:style-name="P275">long size = Files.size(path); <text:s text:c="13"/>// розмір у байтах</text:p>
      <text:p text:style-name="P276"/>
      <text:p text:style-name="P277">// Перебір файлів у директорії</text:p>
      <text:p text:style-name="P278">try (Stream&lt;Path&gt; entries = Files.list(dir)) {</text:p>
      <text:p text:style-name="P279"><text:s text:c="4"/>entries.filter(p -&gt; p.toString().endsWith(".csv"))</text:p>
      <text:p text:style-name="P280"><text:s text:c="11"/>.forEach(System.out::println);</text:p>
      <text:p text:style-name="P281">}</text:p>
      <text:h text:style-name="Heading_20_4" text:outline-level="4"><text:bookmark-start text:name="серіалізація-обєктів"/>Серіалізація об’єктів<text:bookmark-end text:name="серіалізація-обєктів"/></text:h>
      <text:p text:style-name="P282">import java.io.*;</text:p>
      <text:p text:style-name="P283"/>
      <text:p text:style-name="P284">// Клас для серіалізації повинен реалізовувати Serializable</text:p>
      <text:p text:style-name="P285">public record SensorReading(String id, double value) implements Serializable {}</text:p>
      <text:p text:style-name="P286"/>
      <text:p text:style-name="P287">// Серіалізація (запис у файл)</text:p>
      <text:p text:style-name="P288">try (ObjectOutputStream oos = new ObjectOutputStream(</text:p>
      <text:p text:style-name="P289"><text:s text:c="8"/>new FileOutputStream("reading.ser"))) {</text:p>
      <text:p text:style-name="P290"><text:s text:c="4"/>oos.writeObject(new SensorReading("T-01", 36.6));</text:p>
      <text:p text:style-name="P291">}</text:p>
      <text:p text:style-name="P292"/>
      <text:p text:style-name="P293">// Десеріалізація (читання з файлу)</text:p>
      <text:p text:style-name="P294">try (ObjectInputStream ois = new ObjectInputStream(</text:p>
      <text:p text:style-name="P295"><text:s text:c="8"/>new FileInputStream("reading.ser"))) {</text:p>
      <text:p text:style-name="P296"><text:s text:c="4"/>SensorReading r = (SensorReading) ois.readObject();</text:p>
      <text:p text:style-name="P297"><text:s text:c="4"/>System.out.println(r);</text:p>
      <text:p text:style-name="P298">}</text:p>
      <text:h text:style-name="Heading_20_4" text:outline-level="4"><text:bookmark-start text:name="формат-csv"/>Формат CSV<text:bookmark-end text:name="формат-csv"/></text:h>
      <text:p text:style-name="First_20_paragraph">CSV (<text:span text:style-name="T2">Comma-Separated Values</text:span>) — текстовий формат для табличних даних. Кожен рядок — рядок таблиці; поля розділені комою. Перший рядок зазвичай — заголовок.</text:p>
      <text:h text:style-name="Heading_20_4" text:outline-level="4"><text:bookmark-start text:name="приклад-з-репозиторію-java-iot-3"/>Приклад з репозиторію java-iot<text:bookmark-end text:name="приклад-з-репозиторію-java-iot-3"/></text:h>
      <text:p text:style-name="First_20_paragraph">Клас <text:a xlink:type="simple" xlink:href="https://github.com/AndriyLutskiv/java-iot/blob/main/projects/p01-thermometer/src/main/java/ua/crowpi/projects/p01/CsvDataLogger.java" office:name=""><text:span text:style-name="Definition"><text:span text:style-name="Source_20_Text">CsvDataLogger.java</text:span></text:span></text:a> записує показання датчиків у CSV-файл за допомогою <text:span text:style-name="Source_20_Text">PrintWriter</text:span> та <text:span text:style-name="Source_20_Text">BufferedWriter</text:span>. Клас <text:a xlink:type="simple" xlink:href="https://github.com/AndriyLutskiv/java-iot/blob/main/projects/p02-counter/src/main/java/ua/crowpi/projects/p02/EventFileLogger.java" office:name=""><text:span text:style-name="Definition"><text:span text:style-name="Source_20_Text">EventFileLogger.java</text:span></text:span></text:a> реалізує запис подій у текстовий журнал. Клас <text:a xlink:type="simple" xlink:href="https://github.com/AndriyLutskiv/java-iot/blob/main/projects/p10-meteostation/src/main/java/ua/crowpi/projects/p10/HtmlReportGenerator.java" office:name=""><text:span text:style-name="Definition"><text:span text:style-name="Source_20_Text">HtmlReportGenerator.java</text:span></text:span></text:a> генерує HTML-файл з результатами вимірювань. Рекомендується проаналізувати ці класи перед виконанням завдання.</text:p>
      <text:p text:style-name="Horizontal_20_Line"/>
      <text:h text:style-name="Heading_20_3" text:outline-level="3"><text:bookmark-start text:name="хід-виконання-роботи-4"/>Хід виконання роботи<text:bookmark-end text:name="хід-виконання-роботи-4"/></text:h>
      <text:list text:style-name="L37">
        <text:list-item>
          <text:p text:style-name="P299">Відкрити та проаналізувати <text:span text:style-name="Source_20_Text">CsvDataLogger.java</text:span> та <text:span text:style-name="Source_20_Text">EventFileLogger.java</text:span> (посилання вище). Визначити клас потоку, що використовується, спосіб закриття ресурсів, кодування символів.</text:p>
        </text:list-item>
        <text:list-item>
          <text:p text:style-name="P299">Створити тестовий файл <text:span text:style-name="Source_20_Text">test_data.txt</text:span> з 10–20 рядками тексту (власне ім’я, дата, числа) засобами <text:span text:style-name="Source_20_Text">Files.writeString</text:span>.</text:p>
        </text:list-item>
        <text:list-item>
          <text:p text:style-name="P299">Написати метод читання файлу рядок за рядком через <text:span text:style-name="Source_20_Text">BufferedReader</text:span>. Підрахувати кількість рядків, слів та символів.</text:p>
        </text:list-item>
        <text:list-item>
          <text:p text:style-name="P299">Реалізувати завдання відповідно до свого варіанту.</text:p>
        </text:list-item>
        <text:list-item>
          <text:p text:style-name="P299">Виконати запис даних у CSV-файл (<text:span text:style-name="Source_20_Text">data.csv</text:span>) та зворотнє читання. Переконатися, що кодування UTF-8 зберігається (перевірити кирилицю).</text:p>
        </text:list-item>
        <text:list-item>
          <text:p text:style-name="P299">Продемонструвати роботу <text:span text:style-name="Source_20_Text">Files.copy</text:span>, <text:span text:style-name="Source_20_Text">Files.move</text:span>, <text:span text:style-name="Source_20_Text">Files.delete</text:span>. Створити директорію <text:span text:style-name="Source_20_Text">output/</text:span>, скопіювати туди файл, перейменувати.</text:p>
        </text:list-item>
        <text:list-item>
          <text:p text:style-name="P299">Реалізувати серіалізацію та десеріалізацію об’єктів відповідно до варіанту.</text:p>
        </text:list-item>
        <text:list-item>
          <text:p text:style-name="P299">Перехопити та обробити виключення <text:span text:style-name="Source_20_Text">IOException</text:span> та <text:span text:style-name="Source_20_Text">FileNotFoundException</text:span>. Вивести інформативне повідомлення замість стек-трейсу.</text:p>
        </text:list-item>
        <text:list-item>
          <text:p text:style-name="P299">Написати 3 JUnit-тести з використанням <text:span text:style-name="Source_20_Text">@TempDir</text:span> (анотація JUnit 5 для тимчасових директорій) для тестування файлових операцій.</text:p>
        </text:list-item>
        <text:list-item>
          <text:p text:style-name="P299">Оформити звіт: вихідний код, вміст створених файлів (знімки екрану або вставлений текст), результати тестування.</text:p>
        </text:list-item>
      </text:list>
      <text:p text:style-name="Horizontal_20_Line"/>
      <text:h text:style-name="Heading_20_3" text:outline-level="3"><text:bookmark-start text:name="індивідуальні-завдання-4"/>Індивідуальні завдання<text:bookmark-end text:name="індивідуальні-завдання-4"/></text:h>
      <text:p text:style-name="First_20_paragraph">Розробити програму (2–3 класи), що реалізує файловий I/O відповідно до варіанту. Обсяг: до 150 рядків коду. Обов’язково: <text:span text:style-name="Source_20_Text">try-with-resources</text:span>, обробка <text:span text:style-name="Source_20_Text">IOException</text:span>, UTF-8 кодування.</text:p>
      <text:p text:style-name="Text_20_body"><text:span text:style-name="T1">Варіант 1.</text:span> Реалізувати клас <text:span text:style-name="Source_20_Text">StudentGradeBook</text:span>, що зберігає оцінки студентів у CSV-файлі (стовпці: прізвище, ім’я, дисципліна, оцінка). Методи: <text:span text:style-name="Source_20_Text">addRecord</text:span>, <text:span text:style-name="Source_20_Text">readAll</text:span>, <text:span text:style-name="Source_20_Text">findByStudent(String lastName)</text:span>, <text:span text:style-name="Source_20_Text">averageBySubject(String subject)</text:span>.</text:p>
      <text:p text:style-name="Text_20_body"><text:span text:style-name="T1">Варіант 2.</text:span> Реалізувати клас <text:span text:style-name="Source_20_Text">TemperatureLogger</text:span> (натхненний <text:a xlink:type="simple" xlink:href="https://github.com/AndriyLutskiv/java-iot/blob/main/projects/p01-thermometer/src/main/java/ua/crowpi/projects/p01/CsvDataLogger.java" office:name=""><text:span text:style-name="Definition"><text:span text:style-name="Source_20_Text">CsvDataLogger.java</text:span></text:span></text:a>): записує показання з міткою часу у CSV. Методи: <text:span text:style-name="Source_20_Text">append(double temp)</text:span>, <text:span text:style-name="Source_20_Text">readLast(int n)</text:span>, <text:span text:style-name="Source_20_Text">getAverage()</text:span>. Перевірити роботу з кирилицею у полі коментаря.</text:p>
      <text:p text:style-name="Text_20_body"><text:span text:style-name="T1">Варіант 3.</text:span> Реалізувати клас <text:span text:style-name="Source_20_Text">ConfigManager</text:span>, що читає та записує конфігурацію з <text:span text:style-name="Source_20_Text">.properties</text:span>-файлу. Методи: <text:span text:style-name="Source_20_Text">get(String key)</text:span>, <text:span text:style-name="Source_20_Text">set(String key, String value)</text:span>, <text:span text:style-name="Source_20_Text">save()</text:span>, <text:span text:style-name="Source_20_Text">load()</text:span>. Зберігати шлях до файлу у полі класу.</text:p>
      <text:p text:style-name="Text_20_body"><text:span text:style-name="T1">Варіант 4.</text:span> Реалізувати клас <text:span text:style-name="Source_20_Text">EventLogger</text:span> (натхненний <text:a xlink:type="simple" xlink:href="https://github.com/AndriyLutskiv/java-iot/blob/main/projects/p02-counter/src/main/java/ua/crowpi/projects/p02/EventFileLogger.java" office:name=""><text:span text:style-name="Definition"><text:span text:style-name="Source_20_Text">EventFileLogger.java</text:span></text:span></text:a>): записує повідомлення у файл журналу з рівнями INFO, WARN, ERROR та мітками часу. Методи: <text:span text:style-name="Source_20_Text">info</text:span>, <text:span text:style-name="Source_20_Text">warn</text:span>, <text:span text:style-name="Source_20_Text">error</text:span>. Записувати у режимі додавання (<text:span text:style-name="Source_20_Text">APPEND</text:span>).</text:p>
      <text:p text:style-name="Text_20_body"><text:span text:style-name="T1">Варіант 5.</text:span> Реалізувати клас <text:span text:style-name="Source_20_Text">HtmlTableGenerator</text:span> (натхненний <text:a xlink:type="simple" xlink:href="https://github.com/AndriyLutskiv/java-iot/blob/main/projects/p10-meteostation/src/main/java/ua/crowpi/projects/p10/HtmlReportGenerator.java" office:name=""><text:span text:style-name="Definition"><text:span text:style-name="Source_20_Text">HtmlReportGenerator.java</text:span></text:span></text:a>): приймає список рядків (масиви <text:span text:style-name="Source_20_Text">String[]</text:span>), заголовок та генерує HTML-файл з таблицею. Файл зберегти у кодуванні UTF-8 з метатегом <text:span text:style-name="Source_20_Text">charset=UTF-8</text:span>.</text:p>
      <text:p text:style-name="Text_20_body"><text:span text:style-name="T1">Варіант 6.</text:span> Реалізувати клас <text:span text:style-name="Source_20_Text">FileWordCount</text:span>, що читає текстовий файл (можна використовувати <text:span text:style-name="Source_20_Text">Files.lines</text:span> зі <text:span text:style-name="Source_20_Text">Stream</text:span>) та підраховує частоту кожного слова. Результат записати у інший файл у форматі <text:span text:style-name="Source_20_Text">слово: кількість</text:span>, відсортований за зменшенням частоти.</text:p>
      <text:p text:style-name="Text_20_body"><text:span text:style-name="T1">Варіант 7.</text:span> Реалізувати клас <text:span text:style-name="Source_20_Text">DirectoryScanner</text:span>, що рекурсивно обходить директорію (<text:span text:style-name="Source_20_Text">Files.walk</text:span>), підраховує файли за розширенням та виводить статистику. Результат записати у JSON-подібний текстовий файл.</text:p>
      <text:p text:style-name="Text_20_body"><text:span text:style-name="T1">Варіант 8.</text:span> Реалізувати клас <text:span text:style-name="Source_20_Text">SerializableSensorData</text:span> із серіалізацією: клас <text:span text:style-name="Source_20_Text">SensorSnapshot implements Serializable</text:span> зберігає ідентифікатор, масив показань та мітку часу. Методи: <text:span text:style-name="Source_20_Text">save(Path p)</text:span> та статичний <text:span text:style-name="Source_20_Text">load(Path p)</text:span>. Демонстрація: зберегти → завантажити → порівняти дані.</text:p>
      <text:p text:style-name="Text_20_body"><text:span text:style-name="T1">Варіант 9.</text:span> Реалізувати клас <text:span text:style-name="Source_20_Text">MultiFileMerger</text:span>, що читає всі <text:span text:style-name="Source_20_Text">.txt</text:span>-файли з вказаної директорії та об’єднує їх у один файл <text:span text:style-name="Source_20_Text">merged.txt</text:span>. Між вмістом кожного файлу вставляти роздільник з ім’ям файлу-джерела.</text:p>
      <text:p text:style-name="Text_20_body"><text:span text:style-name="T1">Варіант 10.</text:span> Реалізувати клас <text:span text:style-name="Source_20_Text">CsvToHtmlConverter</text:span>: читає CSV-файл з рядком-заголовком та перетворює його у HTML-таблицю з підтримкою кирилиці. Клас <text:span text:style-name="Source_20_Text">Row</text:span> для зберігання рядків CSV.</text:p>
      <text:p text:style-name="Text_20_body"><text:span text:style-name="T1">Варіант 11.</text:span> Реалізувати клас <text:span text:style-name="Source_20_Text">LineNumberedFile</text:span>: записує будь-який текстовий файл з доданими номерами рядків у форматі <text:span text:style-name="Source_20_Text">001: текст рядка</text:span>. Читає вихідний файл рядок за рядком через <text:span text:style-name="Source_20_Text">BufferedReader</text:span>, записує через <text:span text:style-name="Source_20_Text">BufferedWriter</text:span>.</text:p>
      <text:p text:style-name="Text_20_body"><text:span text:style-name="T1">Варіант 12.</text:span> Реалізувати клас <text:span text:style-name="Source_20_Text">BinaryFileAnalyzer</text:span>, що читає файл байт за байтом (<text:span text:style-name="Source_20_Text">FileInputStream</text:span>), підраховує частоту кожного значення байта (0–255) та виводить топ-10 найчастіших байтів у шістнадцятковому форматі.</text:p>
      <text:p text:style-name="Text_20_body"><text:span text:style-name="T1">Варіант 13.</text:span> Реалізувати клас <text:span text:style-name="Source_20_Text">FileDiff</text:span>, що порівнює два текстові файли рядок за рядком та виводить відмінності у форматі <text:span text:style-name="Source_20_Text">уніфікованого diff</text:span> (<text:span text:style-name="Source_20_Text">+ рядок тільки у файлі 2</text:span>, <text:span text:style-name="Source_20_Text">- рядок тільки у файлі 1</text:span>).</text:p>
      <text:p text:style-name="Text_20_body"><text:span text:style-name="T1">Варіант 14.</text:span> Реалізувати клас <text:span text:style-name="Source_20_Text">DataArchiver</text:span> з методами: <text:span text:style-name="Source_20_Text">compress(Path src, Path dst)</text:span> — перетворює текстові рядки у <text:span text:style-name="Source_20_Text">GZIPOutputStream</text:span>; <text:span text:style-name="Source_20_Text">decompress(Path src, Path dst)</text:span> — зворотнє. Порівняти розміри файлів до та після.</text:p>
      <text:p text:style-name="Text_20_body"><text:span text:style-name="T1">Варіант 15.</text:span> Реалізувати клас <text:span text:style-name="Source_20_Text">PropertyFileEditor</text:span> з підтримкою списків: значення може бути комою-роздільним списком (<text:span text:style-name="Source_20_Text">key=val1,val2,val3</text:span>). Методи: <text:span text:style-name="Source_20_Text">getList(String key)</text:span>, <text:span text:style-name="Source_20_Text">setList(String key, List&lt;String&gt; values)</text:span>. Зберегти у <text:span text:style-name="Source_20_Text">.properties</text:span>-файл.</text:p>
      <text:p text:style-name="Horizontal_20_Line"/>
      <text:h text:style-name="Heading_20_3" text:outline-level="3"><text:bookmark-start text:name="контрольні-запитання-4"/>Контрольні запитання<text:bookmark-end text:name="контрольні-запитання-4"/></text:h>
      <text:list text:style-name="L38">
        <text:list-item>
          <text:p text:style-name="P300">Яка різниця між байтовими (<text:span text:style-name="Source_20_Text">InputStream</text:span>/<text:span text:style-name="Source_20_Text">OutputStream</text:span>) та символьними (<text:span text:style-name="Source_20_Text">Reader</text:span>/<text:span text:style-name="Source_20_Text">Writer</text:span>) потоками? Коли слід використовувати кожен тип?</text:p>
        </text:list-item>
        <text:list-item>
          <text:p text:style-name="P300">Чому при роботі з текстовими файлами важливо явно вказувати кодування (<text:span text:style-name="Source_20_Text">StandardCharsets.UTF_8</text:span>)? Що відбувається, якщо кодування не вказано?</text:p>
        </text:list-item>
        <text:list-item>
          <text:p text:style-name="P300">Що таке <text:span text:style-name="Source_20_Text">try-with-resources</text:span>? Який інтерфейс повинен реалізовувати ресурс для використання у цій конструкції?</text:p>
        </text:list-item>
        <text:list-item>
          <text:p text:style-name="P300">Навіщо використовується <text:span text:style-name="Source_20_Text">BufferedReader</text:span>/<text:span text:style-name="Source_20_Text">BufferedWriter</text:span>? Як буферизація впливає на продуктивність?</text:p>
        </text:list-item>
        <text:list-item>
          <text:p text:style-name="P300">Яка різниця між <text:span text:style-name="Source_20_Text">Path.of</text:span> та <text:span text:style-name="Source_20_Text">new File</text:span>? Чому <text:span text:style-name="Source_20_Text">Path</text:span> є кращим вибором у сучасному Java-коді?</text:p>
        </text:list-item>
        <text:list-item>
          <text:p text:style-name="P300">Що таке серіалізація? Яку роль відіграє <text:span text:style-name="Source_20_Text">serialVersionUID</text:span>?</text:p>
        </text:list-item>
        <text:list-item>
          <text:p text:style-name="P300">Що таке <text:span text:style-name="Source_20_Text">transient</text:span> поле? Чому деякі поля не варто серіалізувати?</text:p>
        </text:list-item>
        <text:list-item>
          <text:p text:style-name="P300">Чим відрізняється <text:span text:style-name="Source_20_Text">Files.write</text:span> від <text:span text:style-name="Source_20_Text">Files.writeString</text:span>? Які <text:span text:style-name="Source_20_Text">StandardOpenOption</text:span> підтримуються?</text:p>
        </text:list-item>
        <text:list-item>
          <text:p text:style-name="P300">Що робить <text:span text:style-name="Source_20_Text">Files.walk</text:span> і яку структуру даних вона повертає? Чим відрізняється від <text:span text:style-name="Source_20_Text">Files.list</text:span>?</text:p>
        </text:list-item>
        <text:list-item>
          <text:p text:style-name="P300">Як налаштувати <text:span text:style-name="Source_20_Text">PrintWriter</text:span>, щоб він автоматично скидав буфер після кожного <text:span text:style-name="Source_20_Text">println</text:span>?</text:p>
        </text:list-item>
        <text:list-item>
          <text:p text:style-name="P300">Що таке <text:span text:style-name="Source_20_Text">RandomAccessFile</text:span>? У яких сценаріях він є необхідним?</text:p>
        </text:list-item>
        <text:list-item>
          <text:p text:style-name="P300">Що таке <text:span text:style-name="Source_20_Text">FileChannel</text:span> та <text:span text:style-name="Source_20_Text">MappedByteBuffer</text:span>? Яку перевагу вони дають при роботі з великими файлами?</text:p>
        </text:list-item>
        <text:list-item>
          <text:p text:style-name="P300">Як перехопити одразу кілька різних типів виключень в одному блоці <text:span text:style-name="Source_20_Text">catch</text:span>?</text:p>
        </text:list-item>
        <text:list-item>
          <text:p text:style-name="P300">Що робить <text:span text:style-name="Source_20_Text">Files.lines(Path)</text:span> і яку перевагу має перед <text:span text:style-name="Source_20_Text">readAllLines</text:span> при роботі з великими файлами?</text:p>
        </text:list-item>
        <text:list-item>
          <text:p text:style-name="P300">Як програмно перевірити, чи є шлях файлом, директорією або символьним посиланням?</text:p>
        </text:list-item>
      </text:list>
      <text:p text:style-name="Horizontal_20_Line"/>
      <text:h text:style-name="Heading_20_3" text:outline-level="3"><text:bookmark-start text:name="перелік-посилань-4"/>Перелік посилань<text:bookmark-end text:name="перелік-посилань-4"/></text:h>
      <text:list text:style-name="L39">
        <text:list-item>
          <text:p text:style-name="P301">Horstmann, C. S. <text:span text:style-name="T2">Core Java, Volume II — Advanced Features</text:span> (12th ed.). Hoboken : Pearson, 2022. 832 p.</text:p>
        </text:list-item>
        <text:list-item>
          <text:p text:style-name="P301">Schildt, H. <text:span text:style-name="T2">Java: The Complete Reference</text:span> (12th ed.). New York : McGraw-Hill, 2021. 1248 p.</text:p>
        </text:list-item>
        <text:list-item>
          <text:p text:style-name="P301">Oracle Corporation. <text:span text:style-name="T2">Basic I/O — Java Tutorials</text:span> [Електронний ресурс]. URL: https://docs.oracle.com/javase/tutorial/essential/io/ (дата звернення: 2025-09-01).</text:p>
        </text:list-item>
        <text:list-item>
          <text:p text:style-name="P301">Oracle Corporation. <text:span text:style-name="T2">java.nio.file.Files API</text:span> [Електронний ресурс]. URL: https://docs.oracle.com/en/java/javase/25/docs/api/java.base/java/nio/file/Files.html (дата звернення: 2025-09-01).</text:p>
        </text:list-item>
        <text:list-item>
          <text:p text:style-name="P301">Oracle Corporation. <text:span text:style-name="T2">File I/O (Featuring NIO.2)</text:span> [Електронний ресурс]. URL: https://docs.oracle.com/javase/tutorial/essential/io/fileio.html (дата звернення: 2025-09-01).</text:p>
        </text:list-item>
        <text:list-item>
          <text:p text:style-name="P301">Bloch, J. <text:span text:style-name="T2">Effective Java</text:span> (3rd ed.). Boston : Addison-Wesley, 2018. 412 p.</text:p>
        </text:list-item>
        <text:list-item>
          <text:p text:style-name="P301">Deitel, P., Deitel, H. <text:span text:style-name="T2">Java: How to Program</text:span> (11th ed.). Hoboken : Pearson, 2020. 1040 p.</text:p>
        </text:list-item>
      </text:list>
      <text:h text:style-name="Heading_20_1" text:outline-level="1"><text:bookmark-start text:name="лабораторна-робота-6-1"/>Лабораторна робота №6<text:bookmark-end text:name="лабораторна-робота-6-1"/></text:h>
      <text:h text:style-name="Heading_20_2" text:outline-level="2"><text:bookmark-start text:name="застосування-класів-колекцій-і-класів-утиліт.-створення-автоматизованих-тестів"/>Застосування класів-колекцій і класів утиліт. Створення автоматизованих тестів<text:bookmark-end text:name="застосування-класів-колекцій-і-класів-утиліт.-створення-автоматизованих-тестів"/></text:h>
      <text:p text:style-name="Horizontal_20_Line"/>
      <text:h text:style-name="Heading_20_3" text:outline-level="3"><text:bookmark-start text:name="тема-5"/>Тема<text:bookmark-end text:name="тема-5"/></text:h>
      <text:p text:style-name="First_20_paragraph">Застосування класів-колекцій (<text:span text:style-name="Source_20_Text">List</text:span>, <text:span text:style-name="Source_20_Text">Set</text:span>, <text:span text:style-name="Source_20_Text">Map</text:span>, <text:span text:style-name="Source_20_Text">Queue</text:span>) та класів-утиліт (<text:span text:style-name="Source_20_Text">Collections</text:span>, <text:span text:style-name="Source_20_Text">Arrays</text:span>) Java; написання автоматизованих модульних тестів за допомогою фреймворку JUnit 5.</text:p>
      <text:p text:style-name="Horizontal_20_Line"/>
      <text:h text:style-name="Heading_20_3" text:outline-level="3"><text:bookmark-start text:name="мета-5"/>Мета<text:bookmark-end text:name="мета-5"/></text:h>
      <text:p text:style-name="First_20_paragraph">Набути практичних навичок використання колекцій Java Collections Framework та написання автоматизованих модульних тестів із застосуванням JUnit 5 шляхом реалізації та тестування програм обробки даних.</text:p>
      <text:p text:style-name="Horizontal_20_Line"/>
      <text:h text:style-name="Heading_20_3" text:outline-level="3"><text:bookmark-start text:name="теоретичні-відомості-5"/>Теоретичні відомості<text:bookmark-end text:name="теоретичні-відомості-5"/></text:h>
      <text:h text:style-name="Heading_20_4" text:outline-level="4"><text:bookmark-start text:name="java-collections-framework"/>Java Collections Framework<text:bookmark-end text:name="java-collections-framework"/></text:h>
      <text:p text:style-name="First_20_paragraph"><text:span text:style-name="T1">Основні інтерфейси та їх реалізації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Table_20_Heading">Інтерфейс</text:p>
            </table:table-cell>
            <table:table-cell table:style-name="TableHeaderRowCell" office:value-type="string">
              <text:p text:style-name="Table_20_Heading">Реалізації</text:p>
            </table:table-cell>
            <table:table-cell table:style-name="TableHeaderRowCell" office:value-type="string">
              <text:p text:style-name="Table_20_Heading">Особливості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20_Text">List&lt;E&gt;</text:span></text:p>
          </table:table-cell>
          <table:table-cell table:style-name="TableRowCell" office:value-type="string">
            <text:p text:style-name="Table_20_Contents"><text:span text:style-name="Source_20_Text">ArrayList</text:span>, <text:span text:style-name="Source_20_Text">LinkedList</text:span></text:p>
          </table:table-cell>
          <table:table-cell table:style-name="TableRowCell" office:value-type="string">
            <text:p text:style-name="Table_20_Contents">Впорядкована колекція, допускає дублікати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Set&lt;E&gt;</text:span></text:p>
          </table:table-cell>
          <table:table-cell table:style-name="TableRowCell" office:value-type="string">
            <text:p text:style-name="Table_20_Contents"><text:span text:style-name="Source_20_Text">HashSet</text:span>, <text:span text:style-name="Source_20_Text">LinkedHashSet</text:span>, <text:span text:style-name="Source_20_Text">TreeSet</text:span></text:p>
          </table:table-cell>
          <table:table-cell table:style-name="TableRowCell" office:value-type="string">
            <text:p text:style-name="Table_20_Contents">Множина без дублікатів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Map&lt;K,V&gt;</text:span></text:p>
          </table:table-cell>
          <table:table-cell table:style-name="TableRowCell" office:value-type="string">
            <text:p text:style-name="Table_20_Contents"><text:span text:style-name="Source_20_Text">HashMap</text:span>, <text:span text:style-name="Source_20_Text">LinkedHashMap</text:span>, <text:span text:style-name="Source_20_Text">TreeMap</text:span></text:p>
          </table:table-cell>
          <table:table-cell table:style-name="TableRowCell" office:value-type="string">
            <text:p text:style-name="Table_20_Contents">Пари «ключ — значення»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Queue&lt;E&gt;</text:span></text:p>
          </table:table-cell>
          <table:table-cell table:style-name="TableRowCell" office:value-type="string">
            <text:p text:style-name="Table_20_Contents"><text:span text:style-name="Source_20_Text">ArrayDeque</text:span>, <text:span text:style-name="Source_20_Text">PriorityQueue</text:span></text:p>
          </table:table-cell>
          <table:table-cell table:style-name="TableRowCell" office:value-type="string">
            <text:p text:style-name="Table_20_Contents">Черга FIFO або пріоритетна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Deque&lt;E&gt;</text:span></text:p>
          </table:table-cell>
          <table:table-cell table:style-name="TableRowCell" office:value-type="string">
            <text:p text:style-name="Table_20_Contents"><text:span text:style-name="Source_20_Text">ArrayDeque</text:span></text:p>
          </table:table-cell>
          <table:table-cell table:style-name="TableRowCell" office:value-type="string">
            <text:p text:style-name="Table_20_Contents">Двобічна черга (стек + черга)</text:p>
          </table:table-cell>
        </table:table-row>
      </table:table>
      <text:p text:style-name="P302">import java.util.*;</text:p>
      <text:p text:style-name="P303"/>
      <text:p text:style-name="P304">// List</text:p>
      <text:p text:style-name="P305">List&lt;String&gt; names = new ArrayList&lt;&gt;(List.of("Іван", "Марія", "Олег"));</text:p>
      <text:p text:style-name="P306">names.add("Ганна");</text:p>
      <text:p text:style-name="P307">names.remove("Олег");</text:p>
      <text:p text:style-name="P308">Collections.sort(names);</text:p>
      <text:p text:style-name="P309"/>
      <text:p text:style-name="P310">// Map</text:p>
      <text:p text:style-name="P311">Map&lt;String, Integer&gt; scores = new HashMap&lt;&gt;();</text:p>
      <text:p text:style-name="P312">scores.put("Іван", 95);</text:p>
      <text:p text:style-name="P313">scores.put("Марія", 88);</text:p>
      <text:p text:style-name="P314">int score = scores.getOrDefault("Петро", 0); // 0, якщо ключ відсутній</text:p>
      <text:p text:style-name="P315"/>
      <text:p text:style-name="P316">// Set</text:p>
      <text:p text:style-name="P317">Set&lt;String&gt; unique = new HashSet&lt;&gt;(names);</text:p>
      <text:p text:style-name="P318">unique.add("Іван"); // дублікат — проігнорується</text:p>
      <text:p text:style-name="P319"/>
      <text:p text:style-name="P320">// Незмінні колекції (Java 9+)</text:p>
      <text:p text:style-name="P321">List&lt;String&gt; immutable = List.of("A", "B", "C");</text:p>
      <text:p text:style-name="P322">Map&lt;String, Integer&gt; immutableMap = Map.of("a", 1, "b", 2);</text:p>
      <text:h text:style-name="Heading_20_4" text:outline-level="4"><text:bookmark-start text:name="клас-collections"/>Клас <text:span text:style-name="Source_20_Text">Collections</text:span><text:bookmark-end text:name="клас-collections"/></text:h>
      <text:p text:style-name="P323">List&lt;Integer&gt; nums = new ArrayList&lt;&gt;(List.of(5, 3, 8, 1, 9));</text:p>
      <text:p text:style-name="P324"/>
      <text:p text:style-name="P325">Collections.sort(nums); <text:s text:c="24"/>// [1, 3, 5, 8, 9]</text:p>
      <text:p text:style-name="P326">Collections.reverse(nums); <text:s text:c="21"/>// [9, 8, 5, 3, 1]</text:p>
      <text:p text:style-name="P327">Collections.shuffle(nums); <text:s text:c="21"/>// випадковий порядок</text:p>
      <text:p text:style-name="P328">int max = Collections.max(nums); <text:s text:c="15"/>// максимум</text:p>
      <text:p text:style-name="P329">Collections.frequency(nums, 5); <text:s text:c="16"/>// кількість входжень</text:p>
      <text:p text:style-name="P330">List&lt;Integer&gt; unmod = Collections.unmodifiableList(nums); // тільки для читання</text:p>
      <text:h text:style-name="Heading_20_4" text:outline-level="4"><text:bookmark-start text:name="stream-api-java-8"/>Stream API (Java 8+)<text:bookmark-end text:name="stream-api-java-8"/></text:h>
      <text:p text:style-name="P331">List&lt;String&gt; names = List.of("Анна", "Богдан", "Василь", "Аліна");</text:p>
      <text:p text:style-name="P332"/>
      <text:p text:style-name="P333">// Фільтрація + перетворення + збирання</text:p>
      <text:p text:style-name="P334">List&lt;String&gt; filtered = names.stream()</text:p>
      <text:p text:style-name="P335"><text:s text:c="4"/>.filter(n -&gt; n.startsWith("А"))</text:p>
      <text:p text:style-name="P336"><text:s text:c="4"/>.map(String::toUpperCase)</text:p>
      <text:p text:style-name="P337"><text:s text:c="4"/>.sorted()</text:p>
      <text:p text:style-name="P338"><text:s text:c="4"/>.collect(Collectors.toList());</text:p>
      <text:p text:style-name="P339">// ["АЛІНА", "АННА"]</text:p>
      <text:p text:style-name="P340"/>
      <text:p text:style-name="P341">// Агрегація</text:p>
      <text:p text:style-name="P342">double avg = names.stream()</text:p>
      <text:p text:style-name="P343"><text:s text:c="4"/>.mapToInt(String::length)</text:p>
      <text:p text:style-name="P344"><text:s text:c="4"/>.average()</text:p>
      <text:p text:style-name="P345"><text:s text:c="4"/>.orElse(0.0);</text:p>
      <text:p text:style-name="P346"/>
      <text:p text:style-name="P347">// Групування</text:p>
      <text:p text:style-name="P348">Map&lt;Integer, List&lt;String&gt;&gt; byLength = names.stream()</text:p>
      <text:p text:style-name="P349"><text:s text:c="4"/>.collect(Collectors.groupingBy(String::length));</text:p>
      <text:h text:style-name="Heading_20_4" text:outline-level="4"><text:bookmark-start text:name="junit-5-структура-тестів"/>JUnit 5 — структура тестів<text:bookmark-end text:name="junit-5-структура-тестів"/></text:h>
      <text:p text:style-name="P350">import org.junit.jupiter.api.*;</text:p>
      <text:p text:style-name="P351">import static org.junit.jupiter.api.Assertions.*;</text:p>
      <text:p text:style-name="P352"/>
      <text:p text:style-name="P353">class CalculatorTest {</text:p>
      <text:p text:style-name="P354"/>
      <text:p text:style-name="P355"><text:s text:c="4"/>@BeforeEach</text:p>
      <text:p text:style-name="P356"><text:s text:c="4"/>void setUp() {</text:p>
      <text:p text:style-name="P357"><text:s text:c="8"/>// ініціалізація перед кожним тестом</text:p>
      <text:p text:style-name="P358"><text:s text:c="4"/>}</text:p>
      <text:p text:style-name="P359"/>
      <text:p text:style-name="P360"><text:s text:c="4"/>@Test</text:p>
      <text:p text:style-name="P361"><text:s text:c="4"/>@DisplayName("Сума двох позитивних чисел")</text:p>
      <text:p text:style-name="P362"><text:s text:c="4"/>void addPositiveNumbers() {</text:p>
      <text:p text:style-name="P363"><text:s text:c="8"/>assertEquals(5, Calculator.add(2, 3), "2 + 3 повинно дорівнювати 5");</text:p>
      <text:p text:style-name="P364"><text:s text:c="4"/>}</text:p>
      <text:p text:style-name="P365"/>
      <text:p text:style-name="P366"><text:s text:c="4"/>@Test</text:p>
      <text:p text:style-name="P367"><text:s text:c="4"/>void divideByZeroThrows() {</text:p>
      <text:p text:style-name="P368"><text:s text:c="8"/>assertThrows(ArithmeticException.class, () -&gt; Calculator.divide(1, 0));</text:p>
      <text:p text:style-name="P369"><text:s text:c="4"/>}</text:p>
      <text:p text:style-name="P370"/>
      <text:p text:style-name="P371"><text:s text:c="4"/>@ParameterizedTest</text:p>
      <text:p text:style-name="P372"><text:s text:c="4"/>@ValueSource(ints = {1, 3, 5, 7, 9})</text:p>
      <text:p text:style-name="P373"><text:s text:c="4"/>void oddNumbers(int n) {</text:p>
      <text:p text:style-name="P374"><text:s text:c="8"/>assertTrue(n % 2 != 0, n + " повинно бути непарним");</text:p>
      <text:p text:style-name="P375"><text:s text:c="4"/>}</text:p>
      <text:p text:style-name="P376">}</text:p>
      <text:p text:style-name="First_20_paragraph"><text:span text:style-name="T1">Ключові анотації JUnit 5:</text:span> <text:span text:style-name="Source_20_Text">@Test</text:span>, <text:span text:style-name="Source_20_Text">@BeforeEach</text:span>, <text:span text:style-name="Source_20_Text">@AfterEach</text:span>, <text:span text:style-name="Source_20_Text">@BeforeAll</text:span>, <text:span text:style-name="Source_20_Text">@AfterAll</text:span>, <text:span text:style-name="Source_20_Text">@DisplayName</text:span>, <text:span text:style-name="Source_20_Text">@ParameterizedTest</text:span>, <text:span text:style-name="Source_20_Text">@ValueSource</text:span>, <text:span text:style-name="Source_20_Text">@CsvSource</text:span>, <text:span text:style-name="Source_20_Text">@Disabled</text:span>.</text:p>
      <text:p text:style-name="Text_20_body"><text:span text:style-name="T1">Основні методи </text:span><text:span text:style-name="Source_20_Text">Assertions</text:span><text:span text:style-name="T1">:</text:span> <text:span text:style-name="Source_20_Text">assertEquals</text:span>, <text:span text:style-name="Source_20_Text">assertNotEquals</text:span>, <text:span text:style-name="Source_20_Text">assertTrue</text:span>, <text:span text:style-name="Source_20_Text">assertFalse</text:span>, <text:span text:style-name="Source_20_Text">assertNull</text:span>, <text:span text:style-name="Source_20_Text">assertNotNull</text:span>, <text:span text:style-name="Source_20_Text">assertThrows</text:span>, <text:span text:style-name="Source_20_Text">assertAll</text:span>, <text:span text:style-name="Source_20_Text">assertArrayEquals</text:span>.</text:p>
      <text:h text:style-name="Heading_20_4" text:outline-level="4"><text:bookmark-start text:name="приклад-з-репозиторію-java-iot-4"/>Приклад з репозиторію java-iot<text:bookmark-end text:name="приклад-з-репозиторію-java-iot-4"/></text:h>
      <text:p text:style-name="First_20_paragraph">Клас <text:a xlink:type="simple" xlink:href="https://github.com/AndriyLutskiv/java-iot/blob/main/projects/p03-music-box/src/main/java/ua/crowpi/projects/p03/MelodyLibrary.java" office:name=""><text:span text:style-name="Definition"><text:span text:style-name="Source_20_Text">MelodyLibrary.java</text:span></text:span></text:a> зберігає мелодії у <text:span text:style-name="Source_20_Text">Map&lt;String, Melody&gt;</text:span>. Клас <text:a xlink:type="simple" xlink:href="https://github.com/AndriyLutskiv/java-iot/blob/main/projects/p11-lcd-game/src/main/java/ua/crowpi/projects/p11/LeaderBoard.java" office:name=""><text:span text:style-name="Definition"><text:span text:style-name="Source_20_Text">LeaderBoard.java</text:span></text:span></text:a> реалізує рейтингову таблицю через <text:span text:style-name="Source_20_Text">TreeMap</text:span>/<text:span text:style-name="Source_20_Text">List</text:span>. Тест <text:a xlink:type="simple" xlink:href="https://github.com/AndriyLutskiv/java-iot/blob/main/core/src/test/java/ua/crowpi/core/util/PropertiesLoaderTest.java" office:name=""><text:span text:style-name="Definition"><text:span text:style-name="Source_20_Text">PropertiesLoaderTest.java</text:span></text:span></text:a> демонструє написання JUnit 5 тестів у стилі репозиторію. Рекомендується проаналізувати всі три класи.</text:p>
      <text:p text:style-name="Horizontal_20_Line"/>
      <text:h text:style-name="Heading_20_3" text:outline-level="3"><text:bookmark-start text:name="хід-виконання-роботи-5"/>Хід виконання роботи<text:bookmark-end text:name="хід-виконання-роботи-5"/></text:h>
      <text:list text:style-name="L40">
        <text:list-item>
          <text:p text:style-name="P377">Відкрити та проаналізувати <text:span text:style-name="Source_20_Text">MelodyLibrary.java</text:span>, <text:span text:style-name="Source_20_Text">LeaderBoard.java</text:span> та <text:span text:style-name="Source_20_Text">PropertiesLoaderTest.java</text:span> (посилання вище). Визначити типи колекцій та методи, що використовуються.</text:p>
        </text:list-item>
        <text:list-item>
          <text:p text:style-name="P377">Написати демонстраційний клас, що показує роботу <text:span text:style-name="Source_20_Text">ArrayList</text:span>, <text:span text:style-name="Source_20_Text">LinkedList</text:span>, <text:span text:style-name="Source_20_Text">HashSet</text:span>, <text:span text:style-name="Source_20_Text">TreeSet</text:span>, <text:span text:style-name="Source_20_Text">HashMap</text:span>, <text:span text:style-name="Source_20_Text">TreeMap</text:span>. Для кожної колекції показати: додавання, видалення, пошук, перебір.</text:p>
        </text:list-item>
        <text:list-item>
          <text:p text:style-name="P377">Порівняти продуктивність <text:span text:style-name="Source_20_Text">ArrayList</text:span> та <text:span text:style-name="Source_20_Text">LinkedList</text:span> при вставці на початок 100 000 елементів. Використати <text:span text:style-name="Source_20_Text">System.nanoTime()</text:span>. Пояснити результат.</text:p>
        </text:list-item>
        <text:list-item>
          <text:p text:style-name="P377">Реалізувати завдання відповідно до свого варіанту.</text:p>
        </text:list-item>
        <text:list-item>
          <text:p text:style-name="P377">Реалізувати щонайменше одну операцію з використанням Stream API: фільтрацію, сортування та групування (метод <text:span text:style-name="Source_20_Text">groupingBy</text:span>).</text:p>
        </text:list-item>
        <text:list-item>
          <text:p text:style-name="P377">Написати щонайменше 10 JUnit 5 тестів для реалізованих методів. Використати <text:span text:style-name="Source_20_Text">@ParameterizedTest</text:span> з <text:span text:style-name="Source_20_Text">@CsvSource</text:span> для принаймні 2 тестів.</text:p>
        </text:list-item>
        <text:list-item>
          <text:p text:style-name="P377">Використати <text:span text:style-name="Source_20_Text">@BeforeEach</text:span> для ініціалізації тестових даних та <text:span text:style-name="Source_20_Text">assertThrows</text:span> для перевірки виключень.</text:p>
        </text:list-item>
        <text:list-item>
          <text:p text:style-name="P377">Перевірити покриття коду тестами (Coverage) в IDE (IntelliJ: Run with Coverage). Прагнути до ≥80% покриття класу з бізнес-логікою.</text:p>
        </text:list-item>
        <text:list-item>
          <text:p text:style-name="P377">Оформити звіт: вихідний код, результати JUnit (кількість тестів, кількість успішних), знімок звіту покриття.</text:p>
        </text:list-item>
      </text:list>
      <text:p text:style-name="Horizontal_20_Line"/>
      <text:h text:style-name="Heading_20_3" text:outline-level="3"><text:bookmark-start text:name="індивідуальні-завдання-5"/>Індивідуальні завдання<text:bookmark-end text:name="індивідуальні-завдання-5"/></text:h>
      <text:p text:style-name="First_20_paragraph">Розробити програму (2–3 класи), що використовує колекції Java, та написати не менше 10 JUnit 5 тестів. Обсяг коду: до 150 рядків (без тестів).</text:p>
      <text:p text:style-name="Text_20_body"><text:span text:style-name="T1">Варіант 1.</text:span> Реалізувати клас <text:span text:style-name="Source_20_Text">StudentRegistry</text:span> для реєстру студентів: зберігати у <text:span text:style-name="Source_20_Text">Map&lt;String, Student&gt;</text:span> (ключ — залікова книжка). Методи: <text:span text:style-name="Source_20_Text">add</text:span>, <text:span text:style-name="Source_20_Text">remove</text:span>, <text:span text:style-name="Source_20_Text">findByName(String)</text:span> → <text:span text:style-name="Source_20_Text">List&lt;Student&gt;</text:span>, <text:span text:style-name="Source_20_Text">topStudents(int n)</text:span> — топ-N за середнім балом. Тести: коректність додавання, дублікат, пошук, топ-список.</text:p>
      <text:p text:style-name="Text_20_body"><text:span text:style-name="T1">Варіант 2.</text:span> Реалізувати клас <text:span text:style-name="Source_20_Text">LibraryCatalog</text:span> для каталогу книг: зберігати у <text:span text:style-name="Source_20_Text">Map&lt;String, List&lt;Book&gt;&gt;</text:span> (ключ — автор). Методи: <text:span text:style-name="Source_20_Text">addBook</text:span>, <text:span text:style-name="Source_20_Text">findByTitle(String)</text:span>, <text:span text:style-name="Source_20_Text">getByAuthor(String)</text:span>, <text:span text:style-name="Source_20_Text">getMostProlificAuthor()</text:span>. Тести: порожній каталог, однаковий автор, пошук по рядку.</text:p>
      <text:p text:style-name="Text_20_body"><text:span text:style-name="T1">Варіант 3.</text:span> Реалізувати клас <text:span text:style-name="Source_20_Text">PlaylistManager</text:span> (натхненний <text:a xlink:type="simple" xlink:href="https://github.com/AndriyLutskiv/java-iot/blob/main/projects/p03-music-box/src/main/java/ua/crowpi/projects/p03/MelodyLibrary.java" office:name=""><text:span text:style-name="Definition"><text:span text:style-name="Source_20_Text">MelodyLibrary.java</text:span></text:span></text:a>): <text:span text:style-name="Source_20_Text">Map&lt;String, List&lt;String&gt;&gt;</text:span> (жанр → список пісень). Методи: <text:span text:style-name="Source_20_Text">addSong</text:span>, <text:span text:style-name="Source_20_Text">removeSong</text:span>, <text:span text:style-name="Source_20_Text">shuffle(String genre)</text:span>, <text:span text:style-name="Source_20_Text">getByGenre</text:span>. Тести: невідомий жанр, перетасовка.</text:p>
      <text:p text:style-name="Text_20_body"><text:span text:style-name="T1">Варіант 4.</text:span> Реалізувати клас <text:span text:style-name="Source_20_Text">ScoreBoard</text:span> (натхненний <text:a xlink:type="simple" xlink:href="https://github.com/AndriyLutskiv/java-iot/blob/main/projects/p11-lcd-game/src/main/java/ua/crowpi/projects/p11/LeaderBoard.java" office:name=""><text:span text:style-name="Definition"><text:span text:style-name="Source_20_Text">LeaderBoard.java</text:span></text:span></text:a>): рейтинг гравців у <text:span text:style-name="Source_20_Text">TreeMap&lt;Integer, String&gt;</text:span> (рахунок → ім’я). Методи: <text:span text:style-name="Source_20_Text">addScore</text:span>, <text:span text:style-name="Source_20_Text">getTop(int n)</text:span>, <text:span text:style-name="Source_20_Text">getRank(String name)</text:span>. Тести: рівний рахунок двох гравців, негативний рахунок.</text:p>
      <text:p text:style-name="Text_20_body"><text:span text:style-name="T1">Варіант 5.</text:span> Реалізувати клас <text:span text:style-name="Source_20_Text">FrequencyCounter&lt;T&gt;</text:span> із generic-параметром: підраховує кількість кожного елемента у <text:span text:style-name="Source_20_Text">Map&lt;T, Integer&gt;</text:span>. Методи: <text:span text:style-name="Source_20_Text">add(T)</text:span>, <text:span text:style-name="Source_20_Text">getCount(T)</text:span>, <text:span text:style-name="Source_20_Text">getMostFrequent()</text:span>, <text:span text:style-name="Source_20_Text">getAll()</text:span> — відсортовані за частотою. Тести: рядки, числа.</text:p>
      <text:p text:style-name="Text_20_body"><text:span text:style-name="T1">Варіант 6.</text:span> Реалізувати клас <text:span text:style-name="Source_20_Text">UniqueWordDictionary</text:span>: зберігає унікальні слова у <text:span text:style-name="Source_20_Text">TreeSet&lt;String&gt;</text:span>. Методи: <text:span text:style-name="Source_20_Text">addWord</text:span>, <text:span text:style-name="Source_20_Text">remove</text:span>, <text:span text:style-name="Source_20_Text">startingWith(String prefix)</text:span> → підмножина, <text:span text:style-name="Source_20_Text">size</text:span>. Тести: нечутливість до регістру, порядок сортування.</text:p>
      <text:p text:style-name="Text_20_body"><text:span text:style-name="T1">Варіант 7.</text:span> Реалізувати клас <text:span text:style-name="Source_20_Text">TaskQueue</text:span> на основі <text:span text:style-name="Source_20_Text">ArrayDeque&lt;Task&gt;</text:span> (клас <text:span text:style-name="Source_20_Text">Task</text:span> із пріоритетом та описом). Методи: <text:span text:style-name="Source_20_Text">enqueue</text:span>, <text:span text:style-name="Source_20_Text">dequeue</text:span>, <text:span text:style-name="Source_20_Text">peek</text:span>, <text:span text:style-name="Source_20_Text">processAll</text:span>. Альтернативна реалізація з <text:span text:style-name="Source_20_Text">PriorityQueue</text:span>. Тести: порожня черга, порядок видачі.</text:p>
      <text:p text:style-name="Text_20_body"><text:span text:style-name="T1">Варіант 8.</text:span> Реалізувати клас <text:span text:style-name="Source_20_Text">EventBus</text:span> (паттерн «Спостерігач»): <text:span text:style-name="Source_20_Text">Map&lt;String, List&lt;Runnable&gt;&gt;</text:span> (тема → список обробників). Методи: <text:span text:style-name="Source_20_Text">subscribe(String topic, Runnable handler)</text:span>, <text:span text:style-name="Source_20_Text">publish(String topic)</text:span>, <text:span text:style-name="Source_20_Text">unsubscribe</text:span>. Тести: публікація без підписників, кілька підписників.</text:p>
      <text:p text:style-name="Text_20_body"><text:span text:style-name="T1">Варіант 9.</text:span> Реалізувати клас <text:span text:style-name="Source_20_Text">InventoryManager</text:span> для складу: <text:span text:style-name="Source_20_Text">Map&lt;String, Integer&gt;</text:span> (товар → кількість). Методи: <text:span text:style-name="Source_20_Text">addStock</text:span>, <text:span text:style-name="Source_20_Text">removeStock</text:span>, <text:span text:style-name="Source_20_Text">getLowStock(int threshold)</text:span>, <text:span text:style-name="Source_20_Text">getTotalValue(Map&lt;String, Double&gt; prices)</text:span>. Тести: від’ємний залишок, порожній склад.</text:p>
      <text:p text:style-name="Text_20_body"><text:span text:style-name="T1">Варіант 10.</text:span> Реалізувати клас <text:span text:style-name="Source_20_Text">PhoneBook</text:span>: <text:span text:style-name="Source_20_Text">Map&lt;String, Set&lt;String&gt;&gt;</text:span> (ім’я → набір номерів телефонів). Методи: <text:span text:style-name="Source_20_Text">addContact</text:span>, <text:span text:style-name="Source_20_Text">addPhone</text:span>, <text:span text:style-name="Source_20_Text">removeContact</text:span>, <text:span text:style-name="Source_20_Text">findByPhone(String)</text:span> — знайти ім’я за номером. Тести: кілька номерів, видалення.</text:p>
      <text:p text:style-name="Text_20_body"><text:span text:style-name="T1">Варіант 11.</text:span> Реалізувати клас <text:span text:style-name="Source_20_Text">SensorDataBuffer&lt;T&gt;</text:span> на основі <text:span text:style-name="Source_20_Text">ArrayDeque</text:span> з обмеженням розміру (circlar buffer). Методи: <text:span text:style-name="Source_20_Text">push(T)</text:span> (при переповненні — видаляти найстаріший), <text:span text:style-name="Source_20_Text">toList()</text:span>, <text:span text:style-name="Source_20_Text">average()</text:span> (для числових типів через <text:span text:style-name="Source_20_Text">Number</text:span>). Тести: переповнення.</text:p>
      <text:p text:style-name="Text_20_body"><text:span text:style-name="T1">Варіант 12.</text:span> Реалізувати клас <text:span text:style-name="Source_20_Text">WordCloud</text:span>: підраховує частоту слів у тексті (<text:span text:style-name="Source_20_Text">Map&lt;String, Long&gt;</text:span> через <text:span text:style-name="Source_20_Text">Collectors.counting</text:span>). Методи: <text:span text:style-name="Source_20_Text">analyze(String text)</text:span>, <text:span text:style-name="Source_20_Text">topN(int n)</text:span>, <text:span text:style-name="Source_20_Text">wordsLongerThan(int len)</text:span>. Використати Stream API у всіх методах. Тести: порожній рядок, регістр.</text:p>
      <text:p text:style-name="Text_20_body"><text:span text:style-name="T1">Варіант 13.</text:span> Реалізувати клас <text:span text:style-name="Source_20_Text">ProductCatalog</text:span>: <text:span text:style-name="Source_20_Text">List&lt;Product&gt;</text:span> де <text:span text:style-name="Source_20_Text">Product record(String name, String category, double price)</text:span>. Методи через Stream API: <text:span text:style-name="Source_20_Text">filterByCategory</text:span>, <text:span text:style-name="Source_20_Text">sortByPrice</text:span>, <text:span text:style-name="Source_20_Text">averagePriceByCategory()</text:span> → <text:span text:style-name="Source_20_Text">Map&lt;String, Double&gt;</text:span>. Тести: порожній каталог, сортування.</text:p>
      <text:p text:style-name="Text_20_body"><text:span text:style-name="T1">Варіант 14.</text:span> Реалізувати клас <text:span text:style-name="Source_20_Text">GraphAdjacency</text:span> для орієнтованого графа: <text:span text:style-name="Source_20_Text">Map&lt;String, Set&lt;String&gt;&gt;</text:span> (вузол → множина сусідів). Методи: <text:span text:style-name="Source_20_Text">addEdge</text:span>, <text:span text:style-name="Source_20_Text">removeEdge</text:span>, <text:span text:style-name="Source_20_Text">getNeighbors</text:span>, <text:span text:style-name="Source_20_Text">hasCycle()</text:span> (обхід DFS). Тести: самопетля, граф без циклу, граф з циклом.</text:p>
      <text:p text:style-name="Text_20_body"><text:span text:style-name="T1">Варіант 15.</text:span> Реалізувати клас <text:span text:style-name="Source_20_Text">MultiSetCounter&lt;T&gt;</text:span>: мультимножина, що дозволяє кілька екземплярів одного значення. Зберігати у <text:span text:style-name="Source_20_Text">HashMap&lt;T, Integer&gt;</text:span>. Методи: <text:span text:style-name="Source_20_Text">add(T, int count)</text:span>, <text:span text:style-name="Source_20_Text">remove(T, int count)</text:span>, <text:span text:style-name="Source_20_Text">entrySet()</text:span> відсортований. Тести: від’ємна кількість, нульова кількість.</text:p>
      <text:p text:style-name="Horizontal_20_Line"/>
      <text:h text:style-name="Heading_20_3" text:outline-level="3"><text:bookmark-start text:name="контрольні-запитання-5"/>Контрольні запитання<text:bookmark-end text:name="контрольні-запитання-5"/></text:h>
      <text:list text:style-name="L41">
        <text:list-item>
          <text:p text:style-name="P378">Яка різниця між <text:span text:style-name="Source_20_Text">ArrayList</text:span> та <text:span text:style-name="Source_20_Text">LinkedList</text:span> з точки зору складності операцій? Коли слід обирати кожен?</text:p>
        </text:list-item>
        <text:list-item>
          <text:p text:style-name="P378">Яка різниця між <text:span text:style-name="Source_20_Text">HashSet</text:span>, <text:span text:style-name="Source_20_Text">LinkedHashSet</text:span> та <text:span text:style-name="Source_20_Text">TreeSet</text:span>? Який порядок обходу у кожному?</text:p>
        </text:list-item>
        <text:list-item>
          <text:p text:style-name="P378">Чому <text:span text:style-name="Source_20_Text">HashMap</text:span> не гарантує порядку ітерації? Яка реалізація зберігає порядок вставки?</text:p>
        </text:list-item>
        <text:list-item>
          <text:p text:style-name="P378">Що таке <text:span text:style-name="Source_20_Text">equals</text:span> та <text:span text:style-name="Source_20_Text">hashCode</text:span> у контексті <text:span text:style-name="Source_20_Text">HashMap</text:span>? Що станеться, якщо два об’єкти рівні за <text:span text:style-name="Source_20_Text">equals</text:span>, але мають різні <text:span text:style-name="Source_20_Text">hashCode</text:span>?</text:p>
        </text:list-item>
        <text:list-item>
          <text:p text:style-name="P378">Що таке незмінні колекції (<text:span text:style-name="Source_20_Text">List.of</text:span>, <text:span text:style-name="Source_20_Text">Map.of</text:span>)? Яку виключення кидають при спробі модифікації?</text:p>
        </text:list-item>
        <text:list-item>
          <text:p text:style-name="P378">Яка різниця між <text:span text:style-name="Source_20_Text">Collections.unmodifiableList</text:span> та <text:span text:style-name="Source_20_Text">List.of</text:span>?</text:p>
        </text:list-item>
        <text:list-item>
          <text:p text:style-name="P378">Що таке <text:span text:style-name="Source_20_Text">Comparator</text:span> та <text:span text:style-name="Source_20_Text">Comparable</text:span>? Як реалізувати нестандартне сортування?</text:p>
        </text:list-item>
        <text:list-item>
          <text:p text:style-name="P378">Що таке <text:span text:style-name="Source_20_Text">Stream</text:span> у Java? Яка різниця між проміжними (intermediate) та термінальними (terminal) операціями?</text:p>
        </text:list-item>
        <text:list-item>
          <text:p text:style-name="P378">Що таке <text:span text:style-name="Source_20_Text">Collectors.groupingBy</text:span>? Наведіть приклад групування списку об’єктів за полем.</text:p>
        </text:list-item>
        <text:list-item>
          <text:p text:style-name="P378">Які анотації JUnit 5 відповідають за: ініціалізацію перед кожним тестом, перевірку виключення, параметризований тест?</text:p>
        </text:list-item>
        <text:list-item>
          <text:p text:style-name="P378">Що таке <text:span text:style-name="Source_20_Text">assertAll</text:span> у JUnit 5? Чим він відрізняється від кількох окремих <text:span text:style-name="Source_20_Text">assertEquals</text:span>?</text:p>
        </text:list-item>
        <text:list-item>
          <text:p text:style-name="P378">Що таке покриття коду (code coverage)? Яка різниця між покриттям рядків і покриттям гілок?</text:p>
        </text:list-item>
        <text:list-item>
          <text:p text:style-name="P378">Що таке <text:span text:style-name="Source_20_Text">@TempDir</text:span> у JUnit 5? Для яких тестів він є доречним?</text:p>
        </text:list-item>
        <text:list-item>
          <text:p text:style-name="P378">Чому не слід тестувати приватні методи безпосередньо? Як тестувати поведінку, що залежить від приватного методу?</text:p>
        </text:list-item>
        <text:list-item>
          <text:p text:style-name="P378">Що таке <text:span text:style-name="Source_20_Text">PriorityQueue</text:span>? Який природний порядок вона використовує за замовчуванням?</text:p>
        </text:list-item>
      </text:list>
      <text:p text:style-name="Horizontal_20_Line"/>
      <text:h text:style-name="Heading_20_3" text:outline-level="3"><text:bookmark-start text:name="перелік-посилань-5"/>Перелік посилань<text:bookmark-end text:name="перелік-посилань-5"/></text:h>
      <text:list text:style-name="L42">
        <text:list-item>
          <text:p text:style-name="P379">Bloch, J. <text:span text:style-name="T2">Effective Java</text:span> (3rd ed.). Boston : Addison-Wesley, 2018. 412 p.</text:p>
        </text:list-item>
        <text:list-item>
          <text:p text:style-name="P379">Horstmann, C. S. <text:span text:style-name="T2">Core Java, Volume I — Fundamentals</text:span> (12th ed.). Hoboken : Pearson, 2022. 928 p.</text:p>
        </text:list-item>
        <text:list-item>
          <text:p text:style-name="P379">Oracle Corporation. <text:span text:style-name="T2">Collections — Java Tutorials</text:span> [Електронний ресурс]. URL: https://docs.oracle.com/javase/tutorial/collections/ (дата звернення: 2025-09-01).</text:p>
        </text:list-item>
        <text:list-item>
          <text:p text:style-name="P379">Oracle Corporation. <text:span text:style-name="T2">java.util.stream — Stream API</text:span> [Електронний ресурс]. URL: https://docs.oracle.com/en/java/javase/25/docs/api/java.base/java/util/stream/package-summary.html (дата звернення: 2025-09-01).</text:p>
        </text:list-item>
        <text:list-item>
          <text:p text:style-name="P379">JUnit Team. <text:span text:style-name="T2">JUnit 5 User Guide</text:span> [Електронний ресурс]. URL: https://junit.org/junit5/docs/current/user-guide/ (дата звернення: 2025-09-01).</text:p>
        </text:list-item>
        <text:list-item>
          <text:p text:style-name="P379">Schildt, H. <text:span text:style-name="T2">Java: The Complete Reference</text:span> (12th ed.). New York : McGraw-Hill, 2021. 1248 p.</text:p>
        </text:list-item>
        <text:list-item>
          <text:p text:style-name="P379">Warburton, R. <text:span text:style-name="T2">Java 8 Lambdas</text:span>. Sebastopol : O’Reilly Media, 2014. 182 p.</text:p>
        </text:list-item>
      </text:list>
      <text:h text:style-name="Heading_20_1" text:outline-level="1"><text:bookmark-start text:name="лабораторна-робота-7-1"/>Лабораторна робота №7<text:bookmark-end text:name="лабораторна-робота-7-1"/></text:h>
      <text:h text:style-name="Heading_20_2" text:outline-level="2"><text:bookmark-start text:name="створення-програм-з-графічним-інтерфейсом-користувача"/>Створення програм з графічним інтерфейсом користувача<text:bookmark-end text:name="створення-програм-з-графічним-інтерфейсом-користувача"/></text:h>
      <text:p text:style-name="Horizontal_20_Line"/>
      <text:h text:style-name="Heading_20_3" text:outline-level="3"><text:bookmark-start text:name="тема-6"/>Тема<text:bookmark-end text:name="тема-6"/></text:h>
      <text:p text:style-name="First_20_paragraph">Створення програм з графічним інтерфейсом користувача (GUI) засобами бібліотеки Swing мови Java.</text:p>
      <text:p text:style-name="Horizontal_20_Line"/>
      <text:h text:style-name="Heading_20_3" text:outline-level="3"><text:bookmark-start text:name="мета-6"/>Мета<text:bookmark-end text:name="мета-6"/></text:h>
      <text:p text:style-name="First_20_paragraph">Набути практичних навичок розробки застосунків з графічним інтерфейсом користувача з використанням бібліотеки Swing шляхом реалізації віконних компонентів, менеджерів розміщення та обробників подій.</text:p>
      <text:p text:style-name="Horizontal_20_Line"/>
      <text:h text:style-name="Heading_20_3" text:outline-level="3"><text:bookmark-start text:name="теоретичні-відомості-6"/>Теоретичні відомості<text:bookmark-end text:name="теоретичні-відомості-6"/></text:h>
      <text:h text:style-name="Heading_20_4" text:outline-level="4"><text:bookmark-start text:name="огляд-gui-бібліотек-java"/>Огляд GUI-бібліотек Java<text:bookmark-end text:name="огляд-gui-бібліотек-java"/></text:h>
      <text:p text:style-name="First_20_paragraph">У Java існує кілька підходів до побудови GUI: - <text:span text:style-name="T1">Swing</text:span> (<text:span text:style-name="Source_20_Text">javax.swing</text:span>) — класична бібліотека, вбудована у JDK. Платформо-незалежна завдяки власній відрисовці компонентів. - <text:span text:style-name="T1">JavaFX</text:span> — сучасніший фреймворк із підтримкою CSS, FXML та анімацій. З JDK 11 поставляється окремо (OpenJFX). - <text:span text:style-name="T1">SWT</text:span> (Standard Widget Toolkit) — Eclipse-бібліотека з нативними компонентами ОС.</text:p>
      <text:p text:style-name="Text_20_body">У цій лабораторній роботі використовується <text:span text:style-name="T1">Swing</text:span> як найдоступніший варіант без додаткових залежностей.</text:p>
      <text:h text:style-name="Heading_20_4" text:outline-level="4"><text:bookmark-start text:name="основні-компоненти-swing"/>Основні компоненти Swing<text:bookmark-end text:name="основні-компоненти-swing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Клас</text:p>
            </table:table-cell>
            <table:table-cell table:style-name="TableHeaderRowCell" office:value-type="string">
              <text:p text:style-name="Table_20_Heading">Призначення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20_Text">JFrame</text:span></text:p>
          </table:table-cell>
          <table:table-cell table:style-name="TableRowCell" office:value-type="string">
            <text:p text:style-name="Table_20_Contents">Головне вікно застосунку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JPanel</text:span></text:p>
          </table:table-cell>
          <table:table-cell table:style-name="TableRowCell" office:value-type="string">
            <text:p text:style-name="Table_20_Contents">Контейнер для групування компонентів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JLabel</text:span></text:p>
          </table:table-cell>
          <table:table-cell table:style-name="TableRowCell" office:value-type="string">
            <text:p text:style-name="Table_20_Contents">Текстова мітка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JButton</text:span></text:p>
          </table:table-cell>
          <table:table-cell table:style-name="TableRowCell" office:value-type="string">
            <text:p text:style-name="Table_20_Contents">Кнопка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JTextField</text:span></text:p>
          </table:table-cell>
          <table:table-cell table:style-name="TableRowCell" office:value-type="string">
            <text:p text:style-name="Table_20_Contents">Однорядкове текстове поле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JTextArea</text:span></text:p>
          </table:table-cell>
          <table:table-cell table:style-name="TableRowCell" office:value-type="string">
            <text:p text:style-name="Table_20_Contents">Багаторядкове текстове поле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JCheckBox</text:span></text:p>
          </table:table-cell>
          <table:table-cell table:style-name="TableRowCell" office:value-type="string">
            <text:p text:style-name="Table_20_Contents">Прапорець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JRadioButton</text:span></text:p>
          </table:table-cell>
          <table:table-cell table:style-name="TableRowCell" office:value-type="string">
            <text:p text:style-name="Table_20_Contents">Перемикач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JComboBox</text:span></text:p>
          </table:table-cell>
          <table:table-cell table:style-name="TableRowCell" office:value-type="string">
            <text:p text:style-name="Table_20_Contents">Випадний список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JList</text:span></text:p>
          </table:table-cell>
          <table:table-cell table:style-name="TableRowCell" office:value-type="string">
            <text:p text:style-name="Table_20_Contents">Список елементів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JTable</text:span></text:p>
          </table:table-cell>
          <table:table-cell table:style-name="TableRowCell" office:value-type="string">
            <text:p text:style-name="Table_20_Contents">Таблиця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JMenuBar</text:span> / <text:span text:style-name="Source_20_Text">JMenu</text:span> / <text:span text:style-name="Source_20_Text">JMenuItem</text:span></text:p>
          </table:table-cell>
          <table:table-cell table:style-name="TableRowCell" office:value-type="string">
            <text:p text:style-name="Table_20_Contents">Рядок меню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JFileChooser</text:span></text:p>
          </table:table-cell>
          <table:table-cell table:style-name="TableRowCell" office:value-type="string">
            <text:p text:style-name="Table_20_Contents">Діалог вибору файлу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JOptionPane</text:span></text:p>
          </table:table-cell>
          <table:table-cell table:style-name="TableRowCell" office:value-type="string">
            <text:p text:style-name="Table_20_Contents">Стандартні діалоги (info, error, input)</text:p>
          </table:table-cell>
        </table:table-row>
      </table:table>
      <text:h text:style-name="Heading_20_4" text:outline-level="4"><text:bookmark-start text:name="структура-swing-застосунку"/>Структура Swing-застосунку<text:bookmark-end text:name="структура-swing-застосунку"/></text:h>
      <text:p text:style-name="P380">import javax.swing.*;</text:p>
      <text:p text:style-name="P381">import java.awt.*;</text:p>
      <text:p text:style-name="P382">import java.awt.event.*;</text:p>
      <text:p text:style-name="P383"/>
      <text:p text:style-name="P384">public class MainWindow extends JFrame {</text:p>
      <text:p text:style-name="P385"/>
      <text:p text:style-name="P386"><text:s text:c="4"/>private JTextField inputField;</text:p>
      <text:p text:style-name="P387"><text:s text:c="4"/>private JLabel resultLabel;</text:p>
      <text:p text:style-name="P388"/>
      <text:p text:style-name="P389"><text:s text:c="4"/>public MainWindow() {</text:p>
      <text:p text:style-name="P390"><text:s text:c="8"/>super("Мій застосунок");</text:p>
      <text:p text:style-name="P391"><text:s text:c="8"/>setDefaultCloseOperation(JFrame.EXIT_ON_CLOSE);</text:p>
      <text:p text:style-name="P392"><text:s text:c="8"/>setSize(400, 300);</text:p>
      <text:p text:style-name="P393"><text:s text:c="8"/>setLocationRelativeTo(null); // центр екрану</text:p>
      <text:p text:style-name="P394"/>
      <text:p text:style-name="P395"><text:s text:c="8"/>// Ініціалізація компонентів</text:p>
      <text:p text:style-name="P396"><text:s text:c="8"/>inputField = new JTextField(20);</text:p>
      <text:p text:style-name="P397"><text:s text:c="8"/>JButton calcButton = new JButton("Обчислити");</text:p>
      <text:p text:style-name="P398"><text:s text:c="8"/>resultLabel = new JLabel("Результат з'явиться тут");</text:p>
      <text:p text:style-name="P399"/>
      <text:p text:style-name="P400"><text:s text:c="8"/>// Обробник події кліку</text:p>
      <text:p text:style-name="P401"><text:s text:c="8"/>calcButton.addActionListener(e -&gt; onCalculate());</text:p>
      <text:p text:style-name="P402"/>
      <text:p text:style-name="P403"><text:s text:c="8"/>// Розміщення компонентів</text:p>
      <text:p text:style-name="P404"><text:s text:c="8"/>JPanel panel = new JPanel(new FlowLayout());</text:p>
      <text:p text:style-name="P405"><text:s text:c="8"/>panel.add(new JLabel("Введіть значення:"));</text:p>
      <text:p text:style-name="P406"><text:s text:c="8"/>panel.add(inputField);</text:p>
      <text:p text:style-name="P407"><text:s text:c="8"/>panel.add(calcButton);</text:p>
      <text:p text:style-name="P408"><text:s text:c="8"/>panel.add(resultLabel);</text:p>
      <text:p text:style-name="P409"/>
      <text:p text:style-name="P410"><text:s text:c="8"/>add(panel);</text:p>
      <text:p text:style-name="P411"><text:s text:c="8"/>setVisible(true);</text:p>
      <text:p text:style-name="P412"><text:s text:c="4"/>}</text:p>
      <text:p text:style-name="P413"/>
      <text:p text:style-name="P414"><text:s text:c="4"/>private void onCalculate() {</text:p>
      <text:p text:style-name="P415"><text:s text:c="8"/>String text = inputField.getText().strip();</text:p>
      <text:p text:style-name="P416"><text:s text:c="8"/>if (text.isEmpty()) {</text:p>
      <text:p text:style-name="P417"><text:s text:c="12"/>JOptionPane.showMessageDialog(this, "Введіть значення!", "Помилка", JOptionPane.ERROR_MESSAGE);</text:p>
      <text:p text:style-name="P418"><text:s text:c="12"/>return;</text:p>
      <text:p text:style-name="P419"><text:s text:c="8"/>}</text:p>
      <text:p text:style-name="P420"><text:s text:c="8"/>resultLabel.setText("Результат: " + text.toUpperCase());</text:p>
      <text:p text:style-name="P421"><text:s text:c="4"/>}</text:p>
      <text:p text:style-name="P422"/>
      <text:p text:style-name="P423"><text:s text:c="4"/>public static void main(String[] args) {</text:p>
      <text:p text:style-name="P424"><text:s text:c="8"/>// Swing-компоненти слід створювати у EDT (Event Dispatch Thread)</text:p>
      <text:p text:style-name="P425"><text:s text:c="8"/>SwingUtilities.invokeLater(MainWindow::new);</text:p>
      <text:p text:style-name="P426"><text:s text:c="4"/>}</text:p>
      <text:p text:style-name="P427">}</text:p>
      <text:h text:style-name="Heading_20_4" text:outline-level="4"><text:bookmark-start text:name="менеджери-розміщення-layout-managers"/>Менеджери розміщення (Layout Managers)<text:bookmark-end text:name="менеджери-розміщення-layout-managers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Менеджер</text:p>
            </table:table-cell>
            <table:table-cell table:style-name="TableHeaderRowCell" office:value-type="string">
              <text:p text:style-name="Table_20_Heading">Опис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20_Text">FlowLayout</text:span></text:p>
          </table:table-cell>
          <table:table-cell table:style-name="TableRowCell" office:value-type="string">
            <text:p text:style-name="Table_20_Contents">Розміщення зліва направо, перенос на новий рядок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BorderLayout</text:span></text:p>
          </table:table-cell>
          <table:table-cell table:style-name="TableRowCell" office:value-type="string">
            <text:p text:style-name="Table_20_Contents">5 зон: North, South, East, West, Center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GridLayout</text:span></text:p>
          </table:table-cell>
          <table:table-cell table:style-name="TableRowCell" office:value-type="string">
            <text:p text:style-name="Table_20_Contents">Рівна сітка N×M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GridBagLayout</text:span></text:p>
          </table:table-cell>
          <table:table-cell table:style-name="TableRowCell" office:value-type="string">
            <text:p text:style-name="Table_20_Contents">Гнучка сітка з обмеженнями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BoxLayout</text:span></text:p>
          </table:table-cell>
          <table:table-cell table:style-name="TableRowCell" office:value-type="string">
            <text:p text:style-name="Table_20_Contents">Вертикальне або горизонтальне розміщення</text:p>
          </table:table-cell>
        </table:table-row>
      </table:table>
      <text:p text:style-name="P428">JPanel panel = new JPanel(new BorderLayout());</text:p>
      <text:p text:style-name="P429">panel.add(new JLabel("Заголовок"), BorderLayout.NORTH);</text:p>
      <text:p text:style-name="P430">panel.add(new JScrollPane(textArea), <text:s text:c="1"/>BorderLayout.CENTER);</text:p>
      <text:p text:style-name="P431">panel.add(okButton, <text:s text:c="18"/>BorderLayout.SOUTH);</text:p>
      <text:h text:style-name="Heading_20_4" text:outline-level="4"><text:bookmark-start text:name="подієва-модель"/>Подієва модель<text:bookmark-end text:name="подієва-модель"/></text:h>
      <text:p text:style-name="First_20_paragraph">Swing використовує патерн «Спостерігач» (Observer): компонент генерує подію → слухачі (listeners) обробляють її. З Java 8 зручно використовувати лямбди замість анонімних класів:</text:p>
      <text:p text:style-name="P432">button.addActionListener(e -&gt; System.out.println("Натиснуто!"));</text:p>
      <text:p text:style-name="P433">textField.addKeyListener(new KeyAdapter() {</text:p>
      <text:p text:style-name="P434"><text:s text:c="4"/>@Override</text:p>
      <text:p text:style-name="P435"><text:s text:c="4"/>public void keyPressed(KeyEvent e) {</text:p>
      <text:p text:style-name="P436"><text:s text:c="8"/>if (e.getKeyCode() == KeyEvent.VK_ENTER) onCalculate();</text:p>
      <text:p text:style-name="P437"><text:s text:c="4"/>}</text:p>
      <text:p text:style-name="P438">});</text:p>
      <text:h text:style-name="Heading_20_4" text:outline-level="4"><text:bookmark-start text:name="look-and-feel"/>Look and Feel<text:bookmark-end text:name="look-and-feel"/></text:h>
      <text:p text:style-name="P439">// Системний L&amp;F (схожий на нативні вікна ОС)</text:p>
      <text:p text:style-name="P440">UIManager.setLookAndFeel(UIManager.getSystemLookAndFeelClassName());</text:p>
      <text:h text:style-name="Heading_20_4" text:outline-level="4"><text:bookmark-start text:name="приклад-з-репозиторію-java-iot-5"/>Приклад з репозиторію java-iot<text:bookmark-end text:name="приклад-з-репозиторію-java-iot-5"/></text:h>
      <text:p text:style-name="First_20_paragraph">Клас <text:a xlink:type="simple" xlink:href="https://github.com/AndriyLutskiv/java-iot/blob/main/ui/src/main/java/ua/crowpi/ui/LauncherUI.java" office:name=""><text:span text:style-name="Definition"><text:span text:style-name="Source_20_Text">LauncherUI.java</text:span></text:span></text:a> реалізує графічний лаунчер для вибору та запуску IoT-проєктів. Клас <text:a xlink:type="simple" xlink:href="https://github.com/AndriyLutskiv/java-iot/blob/main/ui/src/main/java/ua/crowpi/ui/ProjectRunner.java" office:name=""><text:span text:style-name="Definition"><text:span text:style-name="Source_20_Text">ProjectRunner.java</text:span></text:span></text:a> виконує вибраний проєкт у фоновому потоці. Рекомендується проаналізувати, як у них організовано компоновку вікна, обробку подій та взаємодію з фоновим потоком.</text:p>
      <text:p text:style-name="Horizontal_20_Line"/>
      <text:h text:style-name="Heading_20_3" text:outline-level="3"><text:bookmark-start text:name="хід-виконання-роботи-6"/>Хід виконання роботи<text:bookmark-end text:name="хід-виконання-роботи-6"/></text:h>
      <text:list text:style-name="L43">
        <text:list-item>
          <text:p text:style-name="P441">Відкрити та проаналізувати <text:span text:style-name="Source_20_Text">LauncherUI.java</text:span> та <text:span text:style-name="Source_20_Text">ProjectRunner.java</text:span> (посилання вище). Визначити: які компоненти Swing використано, як організовано EDT, як фоновий потік оновлює UI.</text:p>
        </text:list-item>
        <text:list-item>
          <text:p text:style-name="P441">Створити головне вікно (<text:span text:style-name="Source_20_Text">JFrame</text:span>) з заголовком, мінімальним розміром 600×400 px та розміщенням у центрі екрану.</text:p>
        </text:list-item>
        <text:list-item>
          <text:p text:style-name="P441">Реалізувати компоненти форми відповідно до варіанту. Використати принаймні 3 різних типи компонентів та 2 різні менеджери розміщення.</text:p>
        </text:list-item>
        <text:list-item>
          <text:p text:style-name="P441">Реалізувати обробники подій для всіх інтерактивних елементів (кнопки, поля введення, список). Для кнопок — через лямбду або <text:span text:style-name="Source_20_Text">ActionListener</text:span>.</text:p>
        </text:list-item>
        <text:list-item>
          <text:p text:style-name="P441">Реалізувати валідацію введених даних з виведенням повідомлень через <text:span text:style-name="Source_20_Text">JOptionPane</text:span>.</text:p>
        </text:list-item>
        <text:list-item>
          <text:p text:style-name="P441">Додати рядок меню (<text:span text:style-name="Source_20_Text">JMenuBar</text:span>) з розділами «Файл» (Відкрити, Зберегти, Вихід) та «Допомога» (Про програму). Реалізувати пункти «Вихід» та «Про програму».</text:p>
        </text:list-item>
        <text:list-item>
          <text:p text:style-name="P441">Реалізувати діалог «Про програму» з назвою застосунку, версією та автором (через <text:span text:style-name="Source_20_Text">JOptionPane</text:span> або <text:span text:style-name="Source_20_Text">JDialog</text:span>).</text:p>
        </text:list-item>
        <text:list-item>
          <text:p text:style-name="P441">Переконатися, що всі компоненти створюються та оновлюються в EDT (<text:span text:style-name="Source_20_Text">SwingUtilities.invokeLater</text:span>). Продемонструвати проблему при виклику UI поза EDT (якщо актуально для варіанту).</text:p>
        </text:list-item>
        <text:list-item>
          <text:p text:style-name="P441">Застосувати Look and Feel системного стилю.</text:p>
        </text:list-item>
        <text:list-item>
          <text:p text:style-name="P441">Зробити знімки екрану головного вікна, діалогів та результатів роботи програми.</text:p>
        </text:list-item>
        <text:list-item>
          <text:p text:style-name="P441">Оформити звіт: вихідний код, знімки екрану з поясненнями, опис подієвої моделі застосунку.</text:p>
        </text:list-item>
      </text:list>
      <text:p text:style-name="Horizontal_20_Line"/>
      <text:h text:style-name="Heading_20_3" text:outline-level="3"><text:bookmark-start text:name="індивідуальні-завдання-6"/>Індивідуальні завдання<text:bookmark-end text:name="індивідуальні-завдання-6"/></text:h>
      <text:p text:style-name="First_20_paragraph">Розробити Swing-застосунок (2–3 класи). Обсяг: до 150 рядків коду. Обов’язково: щонайменше 3 типи компонентів, рядок меню, валідація, EDT.</text:p>
      <text:p text:style-name="Text_20_body"><text:span text:style-name="T1">Варіант 1.</text:span> Калькулятор: 4 поля (<text:span text:style-name="Source_20_Text">JTextField</text:span>) для двох операндів, знаку операції (<text:span text:style-name="Source_20_Text">JComboBox</text:span>: +, -, *, /) та результату. Кнопки «Обчислити» та «Очистити». Обробка ділення на нуль через <text:span text:style-name="Source_20_Text">JOptionPane</text:span>.</text:p>
      <text:p text:style-name="Text_20_body"><text:span text:style-name="T1">Варіант 2.</text:span> Записник: <text:span text:style-name="Source_20_Text">JTextArea</text:span> зі <text:span text:style-name="Source_20_Text">JScrollPane</text:span>, кнопки «Відкрити файл», «Зберегти файл» через <text:span text:style-name="Source_20_Text">JFileChooser</text:span>. Відображення шляху до поточного файлу у заголовку вікна. Питання про збереження перед виходом.</text:p>
      <text:p text:style-name="Text_20_body"><text:span text:style-name="T1">Варіант 3.</text:span> Конвертор одиниць: <text:span text:style-name="Source_20_Text">JComboBox</text:span> для вибору типу (відстань, температура, маса), два <text:span text:style-name="Source_20_Text">JTextField</text:span> (вхід/вихід), кнопка «Конвертувати». При зміні значення у першому полі — автоматичний перерахунок через <text:span text:style-name="Source_20_Text">DocumentListener</text:span>.</text:p>
      <text:p text:style-name="Text_20_body"><text:span text:style-name="T1">Варіант 4.</text:span> Список завдань (To-Do): <text:span text:style-name="Source_20_Text">JList</text:span> зі списком завдань, <text:span text:style-name="Source_20_Text">JTextField</text:span> для введення нового завдання, кнопки «Додати», «Видалити», «Позначити виконаним» (зміна кольору рядка через <text:span text:style-name="Source_20_Text">ListCellRenderer</text:span>).</text:p>
      <text:p text:style-name="Text_20_body"><text:span text:style-name="T1">Варіант 5.</text:span> Тест-вікторина: питання відображається у <text:span text:style-name="Source_20_Text">JLabel</text:span>, 4 варіанти відповіді — <text:span text:style-name="Source_20_Text">JRadioButton</text:span> у <text:span text:style-name="Source_20_Text">ButtonGroup</text:span>. Кнопки «Далі» та «Завершити». Після останнього питання — діалог з результатом (кількість правильних відповідей).</text:p>
      <text:p text:style-name="Text_20_body"><text:span text:style-name="T1">Варіант 6.</text:span> Телефонна книга: <text:span text:style-name="Source_20_Text">JTable</text:span> зі стовпцями «Ім’я», «Телефон», «Email»; кнопки «Додати», «Видалити», «Знайти». Пошук фільтрує рядки таблиці за введеним текстом через <text:span text:style-name="Source_20_Text">TableRowSorter</text:span>.</text:p>
      <text:p text:style-name="Text_20_body"><text:span text:style-name="T1">Варіант 7.</text:span> Реєстраційна форма: поля <text:span text:style-name="Source_20_Text">JTextField</text:span> для імені, прізвища, email; <text:span text:style-name="Source_20_Text">JComboBox</text:span> для курсу (1–6); <text:span text:style-name="Source_20_Text">JCheckBox</text:span> для «Погоджуюсь з умовами»; кнопка «Зареєструватися» (активна лише при позначеному прапорці). Підтвердження реєстрації — <text:span text:style-name="Source_20_Text">JOptionPane</text:span>.</text:p>
      <text:p text:style-name="Text_20_body"><text:span text:style-name="T1">Варіант 8.</text:span> Генератор паролів: <text:span text:style-name="Source_20_Text">JSlider</text:span> для довжини (8–32), <text:span text:style-name="Source_20_Text">JCheckBox</text:span> для включення: великі, малі, цифри, спецсимволи. Кнопка «Згенерувати» → відображення у <text:span text:style-name="Source_20_Text">JTextField</text:span> (тільки для читання). Кнопка «Копіювати» → буфер обміну (<text:span text:style-name="Source_20_Text">Toolkit.getDefaultToolkit().getSystemClipboard()</text:span>).</text:p>
      <text:p text:style-name="Text_20_body"><text:span text:style-name="T1">Варіант 9.</text:span> Прості нотатки: вікно з вкладками (<text:span text:style-name="Source_20_Text">JTabbedPane</text:span>), кожна вкладка — <text:span text:style-name="Source_20_Text">JTextArea</text:span>. Кнопки «Додати вкладку», «Закрити поточну». Зберігати вміст вкладок у <text:span text:style-name="Source_20_Text">Map&lt;String, String&gt;</text:span>.</text:p>
      <text:p text:style-name="Text_20_body"><text:span text:style-name="T1">Варіант 10.</text:span> Натхненний <text:a xlink:type="simple" xlink:href="https://github.com/AndriyLutskiv/java-iot/blob/main/ui/src/main/java/ua/crowpi/ui/LauncherUI.java" office:name=""><text:span text:style-name="Definition"><text:span text:style-name="Source_20_Text">LauncherUI.java</text:span></text:span></text:a>: лаунчер програм. <text:span text:style-name="Source_20_Text">JList</text:span> зі списком операцій (назви власних навчальних класів). При виборі — опис у <text:span text:style-name="Source_20_Text">JTextArea</text:span>. Кнопка «Запустити» → виконання у <text:span text:style-name="Source_20_Text">SwingWorker</text:span>.</text:p>
      <text:p text:style-name="Text_20_body"><text:span text:style-name="T1">Варіант 11.</text:span> Прогрес-бар задачі: кнопка «Почати завантаження», <text:span text:style-name="Source_20_Text">JProgressBar</text:span> від 0 до 100%. Симуляція через <text:span text:style-name="Source_20_Text">javax.swing.Timer</text:span> (збільшення на 5% кожні 200 мс). Після завершення — <text:span text:style-name="Source_20_Text">JOptionPane</text:span> з повідомленням. Кнопка «Скасувати».</text:p>
      <text:p text:style-name="Text_20_body"><text:span text:style-name="T1">Варіант 12.</text:span> Форма звіту: <text:span text:style-name="Source_20_Text">JTextField</text:span> для назви, <text:span text:style-name="Source_20_Text">JTextArea</text:span> для опису, <text:span text:style-name="Source_20_Text">JSpinner</text:span> для дати (модель <text:span text:style-name="Source_20_Text">SpinnerDateModel</text:span>). Кнопка «Попередній перегляд» — виводить форматований звіт у новий <text:span text:style-name="Source_20_Text">JDialog</text:span> з <text:span text:style-name="Source_20_Text">JTextArea</text:span>.</text:p>
      <text:p text:style-name="Text_20_body"><text:span text:style-name="T1">Варіант 13.</text:span> Малювалка: <text:span text:style-name="Source_20_Text">JPanel</text:span> з перевизначеним <text:span text:style-name="Source_20_Text">paintComponent</text:span>, <text:span text:style-name="Source_20_Text">JColorChooser</text:span> для вибору кольору пера, <text:span text:style-name="Source_20_Text">JSlider</text:span> для товщини. Малювання через <text:span text:style-name="Source_20_Text">MouseListener</text:span>/<text:span text:style-name="Source_20_Text">MouseMotionListener</text:span>. Кнопка «Очистити».</text:p>
      <text:p text:style-name="Text_20_body"><text:span text:style-name="T1">Варіант 14.</text:span> Таблиця оцінок: <text:span text:style-name="Source_20_Text">JTable</text:span> з <text:span text:style-name="Source_20_Text">DefaultTableModel</text:span> та стовпцями «Студент», «Предмет 1»…«Предмет 5». Кнопки «Додати рядок», «Видалити рядок». У рядку стану (нижня <text:span text:style-name="Source_20_Text">JLabel</text:span>) — середній бал виділеного студента.</text:p>
      <text:p text:style-name="Text_20_body"><text:span text:style-name="T1">Варіант 15.</text:span> Менеджер контактів: вікно з трьома панелями (<text:span text:style-name="Source_20_Text">JSplitPane</text:span>): ліво — <text:span text:style-name="Source_20_Text">JList</text:span> контактів, центр — деталі у <text:span text:style-name="Source_20_Text">JPanel</text:span> з <text:span text:style-name="Source_20_Text">GridLayout</text:span>, право — <text:span text:style-name="Source_20_Text">JTextArea</text:span> нотаток. Кнопки «Додати», «Видалити», «Зберегти зміни».</text:p>
      <text:p text:style-name="Horizontal_20_Line"/>
      <text:h text:style-name="Heading_20_3" text:outline-level="3"><text:bookmark-start text:name="контрольні-запитання-6"/>Контрольні запитання<text:bookmark-end text:name="контрольні-запитання-6"/></text:h>
      <text:list text:style-name="L44">
        <text:list-item>
          <text:p text:style-name="P442">Що таке EDT (Event Dispatch Thread) у Swing? Чому небезпечно оновлювати GUI поза EDT?</text:p>
        </text:list-item>
        <text:list-item>
          <text:p text:style-name="P442">Що таке <text:span text:style-name="Source_20_Text">SwingUtilities.invokeLater</text:span> та <text:span text:style-name="Source_20_Text">SwingWorker</text:span>? Коли використовувати кожен?</text:p>
        </text:list-item>
        <text:list-item>
          <text:p text:style-name="P442">Що таке менеджер розміщення (Layout Manager)? Чому не рекомендується використовувати <text:span text:style-name="Source_20_Text">AbsoluteLayout</text:span> (<text:span text:style-name="Source_20_Text">null</text:span> layout)?</text:p>
        </text:list-item>
        <text:list-item>
          <text:p text:style-name="P442">Яка різниця між <text:span text:style-name="Source_20_Text">JFrame.EXIT_ON_CLOSE</text:span> та <text:span text:style-name="Source_20_Text">WindowAdapter.windowClosing</text:span>?</text:p>
        </text:list-item>
        <text:list-item>
          <text:p text:style-name="P442">Що таке Look and Feel (L&amp;F)? Які стандартні L&amp;F постачаються з JDK?</text:p>
        </text:list-item>
        <text:list-item>
          <text:p text:style-name="P442">Що таке <text:span text:style-name="Source_20_Text">JScrollPane</text:span> і навіщо його застосовувати з <text:span text:style-name="Source_20_Text">JTextArea</text:span> або <text:span text:style-name="Source_20_Text">JList</text:span>?</text:p>
        </text:list-item>
        <text:list-item>
          <text:p text:style-name="P442">Яка різниця між <text:span text:style-name="Source_20_Text">ActionListener</text:span> та <text:span text:style-name="Source_20_Text">MouseListener</text:span>? Наведіть приклад, де кожен є доречним.</text:p>
        </text:list-item>
        <text:list-item>
          <text:p text:style-name="P442">Що таке <text:span text:style-name="Source_20_Text">DefaultTableModel</text:span>? Як динамічно додавати рядки до <text:span text:style-name="Source_20_Text">JTable</text:span>?</text:p>
        </text:list-item>
        <text:list-item>
          <text:p text:style-name="P442">Що таке <text:span text:style-name="Source_20_Text">DocumentListener</text:span>? Для якої задачі він використовується?</text:p>
        </text:list-item>
        <text:list-item>
          <text:p text:style-name="P442">Що таке <text:span text:style-name="Source_20_Text">ButtonGroup</text:span>? Навіщо вона потрібна для <text:span text:style-name="Source_20_Text">JRadioButton</text:span>?</text:p>
        </text:list-item>
        <text:list-item>
          <text:p text:style-name="P442">Як відкрити файл за допомогою <text:span text:style-name="Source_20_Text">JFileChooser</text:span>? Як встановити фільтр для типів файлів?</text:p>
        </text:list-item>
        <text:list-item>
          <text:p text:style-name="P442">Що таке <text:span text:style-name="Source_20_Text">JOptionPane.showInputDialog</text:span>? Як обробити натискання кнопки «Скасувати»?</text:p>
        </text:list-item>
        <text:list-item>
          <text:p text:style-name="P442">Що таке <text:span text:style-name="Source_20_Text">ListCellRenderer</text:span>? Як змінити відображення окремих елементів у <text:span text:style-name="Source_20_Text">JList</text:span>?</text:p>
        </text:list-item>
        <text:list-item>
          <text:p text:style-name="P442">Як отримати текст з <text:span text:style-name="Source_20_Text">JTextField</text:span> і встановити його програмно?</text:p>
        </text:list-item>
        <text:list-item>
          <text:p text:style-name="P442">Що таке <text:span text:style-name="Source_20_Text">javax.swing.Timer</text:span>? Чим він відрізняється від <text:span text:style-name="Source_20_Text">java.util.Timer</text:span> для задач GUI?</text:p>
        </text:list-item>
      </text:list>
      <text:p text:style-name="Horizontal_20_Line"/>
      <text:h text:style-name="Heading_20_3" text:outline-level="3"><text:bookmark-start text:name="перелік-посилань-6"/>Перелік посилань<text:bookmark-end text:name="перелік-посилань-6"/></text:h>
      <text:list text:style-name="L45">
        <text:list-item>
          <text:p text:style-name="P443">Horstmann, C. S. <text:span text:style-name="T2">Core Java, Volume II — Advanced Features</text:span> (12th ed.). Hoboken : Pearson, 2022. 832 p.</text:p>
        </text:list-item>
        <text:list-item>
          <text:p text:style-name="P443">Schildt, H. <text:span text:style-name="T2">Java: The Complete Reference</text:span> (12th ed.). New York : McGraw-Hill, 2021. 1248 p.</text:p>
        </text:list-item>
        <text:list-item>
          <text:p text:style-name="P443">Oracle Corporation. <text:span text:style-name="T2">Creating a GUI With Swing — Java Tutorials</text:span> [Електронний ресурс]. URL: https://docs.oracle.com/javase/tutorial/uiswing/ (дата звернення: 2025-09-01).</text:p>
        </text:list-item>
        <text:list-item>
          <text:p text:style-name="P443">Oracle Corporation. <text:span text:style-name="T2">javax.swing Package API</text:span> [Електронний ресурс]. URL: https://docs.oracle.com/en/java/javase/25/docs/api/java.desktop/javax/swing/package-summary.html (дата звернення: 2025-09-01).</text:p>
        </text:list-item>
        <text:list-item>
          <text:p text:style-name="P443">Oracle Corporation. <text:span text:style-name="T2">Concurrency in Swing</text:span> [Електронний ресурс]. URL: https://docs.oracle.com/javase/tutorial/uiswing/concurrency/ (дата звернення: 2025-09-01).</text:p>
        </text:list-item>
        <text:list-item>
          <text:p text:style-name="P443">Loy, M., Eckstein, R., Wood, D., Elliott, J., Cole, B. <text:span text:style-name="T2">Java Swing</text:span> (2nd ed.). Sebastopol : O’Reilly Media, 2002. 1278 p.</text:p>
        </text:list-item>
        <text:list-item>
          <text:p text:style-name="P443">Bloch, J. <text:span text:style-name="T2">Effective Java</text:span> (3rd ed.). Boston : Addison-Wesley, 2018. 412 p.</text:p>
        </text:list-item>
      </text:list>
      <text:h text:style-name="Heading_20_1" text:outline-level="1"><text:bookmark-start text:name="лабораторна-робота-8-1"/>Лабораторна робота №8<text:bookmark-end text:name="лабораторна-робота-8-1"/></text:h>
      <text:h text:style-name="Heading_20_2" text:outline-level="2"><text:bookmark-start text:name="використання-java-для-створення-мережевих-програм"/>Використання Java для створення мережевих програм<text:bookmark-end text:name="використання-java-для-створення-мережевих-програм"/></text:h>
      <text:p text:style-name="Horizontal_20_Line"/>
      <text:h text:style-name="Heading_20_3" text:outline-level="3"><text:bookmark-start text:name="тема-7"/>Тема<text:bookmark-end text:name="тема-7"/></text:h>
      <text:p text:style-name="First_20_paragraph">Використання Java для створення мережевих програм: TCP/IP-сокети, HTTP-клієнти та основи мережевого програмування.</text:p>
      <text:p text:style-name="Horizontal_20_Line"/>
      <text:h text:style-name="Heading_20_3" text:outline-level="3"><text:bookmark-start text:name="мета-7"/>Мета<text:bookmark-end text:name="мета-7"/></text:h>
      <text:p text:style-name="First_20_paragraph">Набути практичних навичок розробки мережевих застосунків мовою Java шляхом реалізації TCP-клієнта та серверу, а також HTTP-клієнта з використанням стандартного API <text:span text:style-name="Source_20_Text">java.net.http</text:span>.</text:p>
      <text:p text:style-name="Horizontal_20_Line"/>
      <text:h text:style-name="Heading_20_3" text:outline-level="3"><text:bookmark-start text:name="теоретичні-відомості-7"/>Теоретичні відомості<text:bookmark-end text:name="теоретичні-відомості-7"/></text:h>
      <text:h text:style-name="Heading_20_4" text:outline-level="4"><text:bookmark-start text:name="основи-мережевої-моделі"/>Основи мережевої моделі<text:bookmark-end text:name="основи-мережевої-моделі"/></text:h>
      <text:p text:style-name="First_20_paragraph">Мережева комунікація Java базується на стеку протоколів <text:span text:style-name="T1">TCP/IP</text:span>: - <text:span text:style-name="T1">IP</text:span> (Internet Protocol) — адресація хостів (IPv4: 192.168.1.1; IPv6: ::1). - <text:span text:style-name="T1">TCP</text:span> (Transmission Control Protocol) — надійна, орієнтована на з’єднання передача; гарантує доставку та порядок пакетів. - <text:span text:style-name="T1">UDP</text:span> (User Datagram Protocol) — ненадійна, без з’єднання; швидша, але без гарантій. - <text:span text:style-name="T1">Порт</text:span> — 16-бітний ідентифікатор (0–65 535) для розрізнення сервісів на одному хості. Зарезервовані: 0–1023; загальновідомі: HTTP 80, HTTPS 443, FTP 21.</text:p>
      <text:h text:style-name="Heading_20_4" text:outline-level="4"><text:bookmark-start text:name="tcp-сервер-serversocket"/>TCP-сервер (<text:span text:style-name="Source_20_Text">ServerSocket</text:span>)<text:bookmark-end text:name="tcp-сервер-serversocket"/></text:h>
      <text:p text:style-name="P444">import java.net.*;</text:p>
      <text:p text:style-name="P445">import java.io.*;</text:p>
      <text:p text:style-name="P446"/>
      <text:p text:style-name="P447">public class EchoServer {</text:p>
      <text:p text:style-name="P448"><text:s text:c="4"/>public static void main(String[] args) throws IOException {</text:p>
      <text:p text:style-name="P449"><text:s text:c="8"/>int port = 9000;</text:p>
      <text:p text:style-name="P450"><text:s text:c="8"/>try (ServerSocket serverSocket = new ServerSocket(port)) {</text:p>
      <text:p text:style-name="P451"><text:s text:c="12"/>System.out.println("Сервер слухає порт " + port);</text:p>
      <text:p text:style-name="P452"><text:s text:c="12"/>while (true) {</text:p>
      <text:p text:style-name="P453"><text:s text:c="16"/>// Очікування підключення клієнта (блокуюча операція)</text:p>
      <text:p text:style-name="P454"><text:s text:c="16"/>Socket client = serverSocket.accept();</text:p>
      <text:p text:style-name="P455"><text:s text:c="16"/>System.out.println("Підключено: " + client.getInetAddress());</text:p>
      <text:p text:style-name="P456"/>
      <text:p text:style-name="P457"><text:s text:c="16"/>// Обробка у потоці, щоб не блокувати прийняття нових з'єднань</text:p>
      <text:p text:style-name="P458"><text:s text:c="16"/>new Thread(() -&gt; handleClient(client)).start();</text:p>
      <text:p text:style-name="P459"><text:s text:c="12"/>}</text:p>
      <text:p text:style-name="P460"><text:s text:c="8"/>}</text:p>
      <text:p text:style-name="P461"><text:s text:c="4"/>}</text:p>
      <text:p text:style-name="P462"/>
      <text:p text:style-name="P463"><text:s text:c="4"/>private static void handleClient(Socket socket) {</text:p>
      <text:p text:style-name="P464"><text:s text:c="8"/>try (socket;</text:p>
      <text:p text:style-name="P465"><text:s text:c="13"/>BufferedReader in = new BufferedReader(</text:p>
      <text:p text:style-name="P466"><text:s text:c="17"/>new InputStreamReader(socket.getInputStream(), StandardCharsets.UTF_8));</text:p>
      <text:p text:style-name="P467"><text:s text:c="13"/>PrintWriter out = new PrintWriter(</text:p>
      <text:p text:style-name="P468"><text:s text:c="17"/>new OutputStreamWriter(socket.getOutputStream(), StandardCharsets.UTF_8), true)) {</text:p>
      <text:p text:style-name="P469"/>
      <text:p text:style-name="P470"><text:s text:c="12"/>String line;</text:p>
      <text:p text:style-name="P471"><text:s text:c="12"/>while ((line = in.readLine()) != null) {</text:p>
      <text:p text:style-name="P472"><text:s text:c="16"/>System.out.println("Отримано: " + line);</text:p>
      <text:p text:style-name="P473"><text:s text:c="16"/>out.println("Ехо: " + line); // відправити назад</text:p>
      <text:p text:style-name="P474"><text:s text:c="12"/>}</text:p>
      <text:p text:style-name="P475"><text:s text:c="8"/>} catch (IOException e) {</text:p>
      <text:p text:style-name="P476"><text:s text:c="12"/>System.err.println("Помилка клієнта: " + e.getMessage());</text:p>
      <text:p text:style-name="P477"><text:s text:c="8"/>}</text:p>
      <text:p text:style-name="P478"><text:s text:c="4"/>}</text:p>
      <text:p text:style-name="P479">}</text:p>
      <text:h text:style-name="Heading_20_4" text:outline-level="4"><text:bookmark-start text:name="tcp-клієнт-socket"/>TCP-клієнт (<text:span text:style-name="Source_20_Text">Socket</text:span>)<text:bookmark-end text:name="tcp-клієнт-socket"/></text:h>
      <text:p text:style-name="P480">public class EchoClient {</text:p>
      <text:p text:style-name="P481"><text:s text:c="4"/>public static void main(String[] args) throws IOException {</text:p>
      <text:p text:style-name="P482"><text:s text:c="8"/>try (Socket socket = new Socket("localhost", 9000);</text:p>
      <text:p text:style-name="P483"><text:s text:c="13"/>PrintWriter out = new PrintWriter(</text:p>
      <text:p text:style-name="P484"><text:s text:c="17"/>new OutputStreamWriter(socket.getOutputStream(), StandardCharsets.UTF_8), true);</text:p>
      <text:p text:style-name="P485"><text:s text:c="13"/>BufferedReader in = new BufferedReader(</text:p>
      <text:p text:style-name="P486"><text:s text:c="17"/>new InputStreamReader(socket.getInputStream(), StandardCharsets.UTF_8));</text:p>
      <text:p text:style-name="P487"><text:s text:c="13"/>BufferedReader console = new BufferedReader(new InputStreamReader(System.in))) {</text:p>
      <text:p text:style-name="P488"/>
      <text:p text:style-name="P489"><text:s text:c="12"/>String input;</text:p>
      <text:p text:style-name="P490"><text:s text:c="12"/>System.out.println("Підключено до сервера. Введіть повідомлення (exit — вихід):");</text:p>
      <text:p text:style-name="P491"><text:s text:c="12"/>while (!(input = console.readLine()).equals("exit")) {</text:p>
      <text:p text:style-name="P492"><text:s text:c="16"/>out.println(input);</text:p>
      <text:p text:style-name="P493"><text:s text:c="16"/>System.out.println("Сервер відповів: " + in.readLine());</text:p>
      <text:p text:style-name="P494"><text:s text:c="12"/>}</text:p>
      <text:p text:style-name="P495"><text:s text:c="8"/>}</text:p>
      <text:p text:style-name="P496"><text:s text:c="4"/>}</text:p>
      <text:p text:style-name="P497">}</text:p>
      <text:h text:style-name="Heading_20_4" text:outline-level="4"><text:bookmark-start text:name="http-клієнт-java.net.http-java-11"/>HTTP-клієнт (<text:span text:style-name="Source_20_Text">java.net.http</text:span>, Java 11+)<text:bookmark-end text:name="http-клієнт-java.net.http-java-11"/></text:h>
      <text:p text:style-name="P498">import java.net.http.*;</text:p>
      <text:p text:style-name="P499">import java.net.URI;</text:p>
      <text:p text:style-name="P500">import java.time.Duration;</text:p>
      <text:p text:style-name="P501"/>
      <text:p text:style-name="P502">HttpClient client = HttpClient.newBuilder()</text:p>
      <text:p text:style-name="P503"><text:s text:c="4"/>.connectTimeout(Duration.ofSeconds(10))</text:p>
      <text:p text:style-name="P504"><text:s text:c="4"/>.build();</text:p>
      <text:p text:style-name="P505"/>
      <text:p text:style-name="P506">// GET-запит</text:p>
      <text:p text:style-name="P507">HttpRequest request = HttpRequest.newBuilder()</text:p>
      <text:p text:style-name="P508"><text:s text:c="4"/>.uri(URI.create("https://httpbin.org/get"))</text:p>
      <text:p text:style-name="P509"><text:s text:c="4"/>.header("Accept", "application/json")</text:p>
      <text:p text:style-name="P510"><text:s text:c="4"/>.GET()</text:p>
      <text:p text:style-name="P511"><text:s text:c="4"/>.build();</text:p>
      <text:p text:style-name="P512"/>
      <text:p text:style-name="P513">HttpResponse&lt;String&gt; response = client.send(request, HttpResponse.BodyHandlers.ofString());</text:p>
      <text:p text:style-name="P514">System.out.println("Статус: " + response.statusCode());</text:p>
      <text:p text:style-name="P515">System.out.println("Тіло: " + response.body());</text:p>
      <text:p text:style-name="P516"/>
      <text:p text:style-name="P517">// POST-запит</text:p>
      <text:p text:style-name="P518">String json = "{\"sensor\": \"T-01\", \"value\": 23.5}";</text:p>
      <text:p text:style-name="P519">HttpRequest postRequest = HttpRequest.newBuilder()</text:p>
      <text:p text:style-name="P520"><text:s text:c="4"/>.uri(URI.create("https://httpbin.org/post"))</text:p>
      <text:p text:style-name="P521"><text:s text:c="4"/>.header("Content-Type", "application/json")</text:p>
      <text:p text:style-name="P522"><text:s text:c="4"/>.POST(HttpRequest.BodyPublishers.ofString(json))</text:p>
      <text:p text:style-name="P523"><text:s text:c="4"/>.build();</text:p>
      <text:p text:style-name="P524"/>
      <text:p text:style-name="P525">HttpResponse&lt;String&gt; postResponse = client.send(postRequest, HttpResponse.BodyHandlers.ofString());</text:p>
      <text:h text:style-name="Heading_20_4" text:outline-level="4"><text:bookmark-start text:name="асинхронний-http-sendasync"/>Асинхронний HTTP (sendAsync)<text:bookmark-end text:name="асинхронний-http-sendasync"/></text:h>
      <text:p text:style-name="P526">client.sendAsync(request, HttpResponse.BodyHandlers.ofString())</text:p>
      <text:p text:style-name="P527"><text:s text:c="4"/>.thenApply(HttpResponse::body)</text:p>
      <text:p text:style-name="P528"><text:s text:c="4"/>.thenAccept(System.out::println)</text:p>
      <text:p text:style-name="P529"><text:s text:c="4"/>.join(); // дочекатися завершення</text:p>
      <text:h text:style-name="Heading_20_4" text:outline-level="4"><text:bookmark-start text:name="udp-датаграми"/>UDP (датаграми)<text:bookmark-end text:name="udp-датаграми"/></text:h>
      <text:p text:style-name="P530">// Сервер UDP</text:p>
      <text:p text:style-name="P531">DatagramSocket serverSocket = new DatagramSocket(9001);</text:p>
      <text:p text:style-name="P532">byte[] buffer = new byte[1024];</text:p>
      <text:p text:style-name="P533">DatagramPacket packet = new DatagramPacket(buffer, buffer.length);</text:p>
      <text:p text:style-name="P534">serverSocket.receive(packet); // блокування до отримання</text:p>
      <text:p text:style-name="P535">String msg = new String(packet.getData(), 0, packet.getLength(), StandardCharsets.UTF_8);</text:p>
      <text:h text:style-name="Heading_20_4" text:outline-level="4"><text:bookmark-start text:name="приклад-з-репозиторію-java-iot-6"/>Приклад з репозиторію java-iot<text:bookmark-end text:name="приклад-з-репозиторію-java-iot-6"/></text:h>
      <text:p text:style-name="First_20_paragraph">Клас <text:a xlink:type="simple" xlink:href="https://github.com/AndriyLutskiv/java-iot/blob/main/projects/p12-currency-clock/src/main/java/ua/crowpi/projects/p12/NbuApiClient.java" office:name=""><text:span text:style-name="Definition"><text:span text:style-name="Source_20_Text">NbuApiClient.java</text:span></text:span></text:a> визначає інтерфейс для HTTP-клієнта НБУ. Клас <text:a xlink:type="simple" xlink:href="https://github.com/AndriyLutskiv/java-iot/blob/main/projects/p12-currency-clock/src/main/java/ua/crowpi/projects/p12/RealNbuApiClient.java" office:name=""><text:span text:style-name="Definition"><text:span text:style-name="Source_20_Text">RealNbuApiClient.java</text:span></text:span></text:a> реалізує запит до реального REST API. Клас <text:a xlink:type="simple" xlink:href="https://github.com/AndriyLutskiv/java-iot/blob/main/projects/p12-currency-clock/src/main/java/ua/crowpi/projects/p12/MockNbuApiClient.java" office:name=""><text:span text:style-name="Definition"><text:span text:style-name="Source_20_Text">MockNbuApiClient.java</text:span></text:span></text:a> — тестова заглушка. Рекомендується вивчити патерн розділення інтерфейсу та реалізації для тестованого HTTP-клієнта.</text:p>
      <text:p text:style-name="Horizontal_20_Line"/>
      <text:h text:style-name="Heading_20_3" text:outline-level="3"><text:bookmark-start text:name="хід-виконання-роботи-7"/>Хід виконання роботи<text:bookmark-end text:name="хід-виконання-роботи-7"/></text:h>
      <text:list text:style-name="L46">
        <text:list-item>
          <text:p text:style-name="P536">Відкрити та проаналізувати <text:span text:style-name="Source_20_Text">NbuApiClient.java</text:span>, <text:span text:style-name="Source_20_Text">RealNbuApiClient.java</text:span> та <text:span text:style-name="Source_20_Text">MockNbuApiClient.java</text:span> (посилання вище). Визначити: який HTTP-метод використовується, як обробляється JSON-відповідь, як тестується код без реальної мережі.</text:p>
        </text:list-item>
        <text:list-item>
          <text:p text:style-name="P536">Реалізувати простий TCP-луна-сервер (<text:span text:style-name="Source_20_Text">EchoServer</text:span>): приймає підключення, читає рядки та повертає їх назад із префіксом.</text:p>
        </text:list-item>
        <text:list-item>
          <text:p text:style-name="P536">Реалізувати TCP-клієнт (<text:span text:style-name="Source_20_Text">EchoClient</text:span>): підключається до серверу, відправляє введені з консолі рядки та виводить відповідь.</text:p>
        </text:list-item>
        <text:list-item>
          <text:p text:style-name="P536">Запустити сервер та клієнт одночасно (два термінальних вікна або <text:span text:style-name="Source_20_Text">Thread</text:span>). Переконатися у двосторонньому обміні.</text:p>
        </text:list-item>
        <text:list-item>
          <text:p text:style-name="P536">Реалізувати завдання відповідно до свого варіанту.</text:p>
        </text:list-item>
        <text:list-item>
          <text:p text:style-name="P536">Реалізувати HTTP GET-запит за допомогою <text:span text:style-name="Source_20_Text">java.net.http.HttpClient</text:span>. Якщо варіант передбачає публічне API — перевірити реальну відповідь; якщо ні — використати <text:span text:style-name="Source_20_Text">https://httpbin.org</text:span> або <text:span text:style-name="Source_20_Text">https://jsonplaceholder.typicode.com</text:span>.</text:p>
        </text:list-item>
        <text:list-item>
          <text:p text:style-name="P536">Обробити відповідь: розібрати JSON-рядок власноруч (методами <text:span text:style-name="Source_20_Text">String.indexOf</text:span>, <text:span text:style-name="Source_20_Text">substring</text:span>) або використати бібліотеку Gson/Jackson (якщо дозволяє конфігурація проєкту).</text:p>
        </text:list-item>
        <text:list-item>
          <text:p text:style-name="P536">Реалізувати обробку мережевих виключень: <text:span text:style-name="Source_20_Text">ConnectException</text:span>, <text:span text:style-name="Source_20_Text">SocketTimeoutException</text:span>, <text:span text:style-name="Source_20_Text">HttpTimeoutException</text:span>. Вивести інформативне повідомлення.</text:p>
        </text:list-item>
        <text:list-item>
          <text:p text:style-name="P536">Написати тест із <text:span text:style-name="Source_20_Text">MockNbuApiClient</text:span>-підходом: mock-клас, що повертає заготовлену JSON-відповідь, дозволяє тестувати бізнес-логіку без мережі.</text:p>
        </text:list-item>
        <text:list-item>
          <text:p text:style-name="P536">Виміряти час відповіді 5 HTTP-запитів (послідовних та асинхронних через <text:span text:style-name="Source_20_Text">sendAsync</text:span>). Порівняти результати.</text:p>
        </text:list-item>
        <text:list-item>
          <text:p text:style-name="P536">Оформити звіт: вихідний код сервера та клієнта, знімки виводу при роботі, обговорення мережевих виключень.</text:p>
        </text:list-item>
      </text:list>
      <text:p text:style-name="Horizontal_20_Line"/>
      <text:h text:style-name="Heading_20_3" text:outline-level="3"><text:bookmark-start text:name="індивідуальні-завдання-7"/>Індивідуальні завдання<text:bookmark-end text:name="індивідуальні-завдання-7"/></text:h>
      <text:p text:style-name="First_20_paragraph">Розробити мережевий застосунок (3–4 класи). Обсяг: до 250 рядків коду. Обов’язково: обробка виключень, підтримка кирилиці (UTF-8).</text:p>
      <text:p text:style-name="Text_20_body"><text:span text:style-name="T1">Варіант 1.</text:span> Реалізувати «Чат» у CLI: TCP-сервер, що підтримує до 5 одночасних клієнтів. Кожне повідомлення від клієнта транслюється всім іншим із зазначенням імені відправника. Ім’я клієнт надсилає першим рядком при підключенні.</text:p>
      <text:p text:style-name="Text_20_body"><text:span text:style-name="T1">Варіант 2.</text:span> Реалізувати HTTP-клієнт для API НБУ (за зразком <text:a xlink:type="simple" xlink:href="https://github.com/AndriyLutskiv/java-iot/blob/main/projects/p12-currency-clock/src/main/java/ua/crowpi/projects/p12/RealNbuApiClient.java" office:name=""><text:span text:style-name="Definition"><text:span text:style-name="Source_20_Text">RealNbuApiClient.java</text:span></text:span></text:a>): GET-запит до <text:span text:style-name="Source_20_Text">https://bank.gov.ua/NBUStatService/v1/statdatacommon/nbuviewing?fmt=json</text:span>, розбір JSON-відповіді (рядками), вивід курсів USD, EUR, GBP.</text:p>
      <text:p text:style-name="Text_20_body"><text:span text:style-name="T1">Варіант 3.</text:span> Реалізувати HTTP-клієнт для відкритого API <text:span text:style-name="Source_20_Text">https://jsonplaceholder.typicode.com/posts</text:span>: отримати список постів (GET), вивести перші 5. Реалізувати POST-запит для створення нового поста. Вивести статус відповіді та тіло.</text:p>
      <text:p text:style-name="Text_20_body"><text:span text:style-name="T1">Варіант 4.</text:span> Реалізувати TCP-сервер «Вікторина»: при підключенні клієнт отримує питання, надсилає відповідь, сервер перевіряє та відповідає «Правильно!» або «Неправильно. Правильна відповідь: …». Після 5 питань — підсумковий рахунок.</text:p>
      <text:p text:style-name="Text_20_body"><text:span text:style-name="T1">Варіант 5.</text:span> Реалізувати клієнт-серверний «Словник»: TCP-сервер зберігає <text:span text:style-name="Source_20_Text">Map&lt;String, String&gt;</text:span> (слово → переклад). Клієнт надсилає слово, сервер повертає переклад або «Не знайдено». Підтримати команди <text:span text:style-name="Source_20_Text">ADD слово переклад</text:span> та <text:span text:style-name="Source_20_Text">DEL слово</text:span>.</text:p>
      <text:p text:style-name="Text_20_body"><text:span text:style-name="T1">Варіант 6.</text:span> Реалізувати HTTP-клієнт для відкритого прогнозу погоди: API <text:span text:style-name="Source_20_Text">https://wttr.in/&lt;місто&gt;?format=j1</text:span> повертає JSON. Розібрати рядками та вивести температуру, опис погоди, вологість для Тернополя або введеного міста.</text:p>
      <text:p text:style-name="Text_20_body"><text:span text:style-name="T1">Варіант 7.</text:span> Реалізувати TCP «Файловий сервер»: клієнт надсилає ім’я файлу → сервер читає файл і надсилає вміст байт за байтом через <text:span text:style-name="Source_20_Text">InputStream</text:span>. Клієнт зберігає отримані байти у файл. Передбачити обробку відсутнього файлу.</text:p>
      <text:p text:style-name="Text_20_body"><text:span text:style-name="T1">Варіант 8.</text:span> Реалізувати HTTP-клієнт для API GitHub: GET-запит до <text:span text:style-name="Source_20_Text">https://api.github.com/repos/&lt;owner&gt;/&lt;repo&gt;</text:span> (публічний репозиторій). Вивести: назву, опис, кількість зірок, мову. Параметри репо — аргументи <text:span text:style-name="Source_20_Text">main</text:span>.</text:p>
      <text:p text:style-name="Text_20_body"><text:span text:style-name="T1">Варіант 9.</text:span> Реалізувати UDP-застосунок «Датчик — Реєстратор»: клієнт надсилає UDP-датаграму з показанням (рядок <text:span text:style-name="Source_20_Text">"T:23.5 H:65"</text:span>), сервер отримує, зберігає у <text:span text:style-name="Source_20_Text">List</text:span> та виводить на консоль. Після 10 датаграм — вивести статистику.</text:p>
      <text:p text:style-name="Text_20_body"><text:span text:style-name="T1">Варіант 10.</text:span> Реалізувати TCP-сервер «Калькулятор»: клієнт надсилає вираз у рядку (<text:span text:style-name="Source_20_Text">"3 + 4"</text:span>, <text:span text:style-name="Source_20_Text">"10 / 2"</text:span>), сервер обчислює та повертає результат. Підтримати +, -, *, /. Обробити ділення на нуль.</text:p>
      <text:p text:style-name="Text_20_body"><text:span text:style-name="T1">Варіант 11.</text:span> Реалізувати HTTP-клієнт для перевірки IP-геолокації: GET-запит до <text:span text:style-name="Source_20_Text">https://ipinfo.io/{ip}/json</text:span> (публічне API). Розібрати відповідь та вивести: місто, регіон, країну, провайдера. Підтримати введення IP як аргумент <text:span text:style-name="Source_20_Text">main</text:span>.</text:p>
      <text:p text:style-name="Text_20_body"><text:span text:style-name="T1">Варіант 12.</text:span> Реалізувати «Менеджер задач» на TCP: сервер зберігає список <text:span text:style-name="Source_20_Text">Task(id, title, done)</text:span>. Клієнт підтримує команди: <text:span text:style-name="Source_20_Text">LIST</text:span>, <text:span text:style-name="Source_20_Text">ADD назва</text:span>, <text:span text:style-name="Source_20_Text">DONE id</text:span>, <text:span text:style-name="Source_20_Text">DELETE id</text:span>. Відповіді сервера — рядки у форматі CSV.</text:p>
      <text:p text:style-name="Text_20_body"><text:span text:style-name="T1">Варіант 13.</text:span> Реалізувати HTTP-клієнт для <text:span text:style-name="Source_20_Text">https://jsonplaceholder.typicode.com/users</text:span>: завантажити список користувачів (GET), вивести таблицю (id, ім’я, email, місто). Виконати PUT-запит для оновлення першого користувача та перевірити відповідь.</text:p>
      <text:p text:style-name="Text_20_body"><text:span text:style-name="T1">Варіант 14.</text:span> Реалізувати TCP «Нотатки» з трьома паралельними клієнтами: <text:span text:style-name="Source_20_Text">Map&lt;String, String&gt;</text:span> (ключ → нотатка). Команди: <text:span text:style-name="Source_20_Text">PUT key value</text:span>, <text:span text:style-name="Source_20_Text">GET key</text:span>, <text:span text:style-name="Source_20_Text">LIST</text:span>. Захистити <text:span text:style-name="Source_20_Text">Map</text:span> від конкурентного доступу через <text:span text:style-name="Source_20_Text">ConcurrentHashMap</text:span>.</text:p>
      <text:p text:style-name="Text_20_body"><text:span text:style-name="T1">Варіант 15.</text:span> Реалізувати HTTP-клієнт для REST API <text:span text:style-name="Source_20_Text">https://restcountries.com/v3.1/name/{country}</text:span>: запит за назвою країни (аргумент <text:span text:style-name="Source_20_Text">main</text:span>). Вивести: офіційна назва, столиця, населення, регіон. Обробити 404 (країна не знайдена).</text:p>
      <text:p text:style-name="Horizontal_20_Line"/>
      <text:h text:style-name="Heading_20_3" text:outline-level="3"><text:bookmark-start text:name="контрольні-запитання-7"/>Контрольні запитання<text:bookmark-end text:name="контрольні-запитання-7"/></text:h>
      <text:list text:style-name="L47">
        <text:list-item>
          <text:p text:style-name="P537">Яка різниця між TCP та UDP? Наведіть приклад задачі, де доцільний кожен протокол.</text:p>
        </text:list-item>
        <text:list-item>
          <text:p text:style-name="P537">Що таке сокет? Яку пару параметрів однозначно ідентифікує TCP-з’єднання?</text:p>
        </text:list-item>
        <text:list-item>
          <text:p text:style-name="P537">Що таке <text:span text:style-name="Source_20_Text">ServerSocket.accept()</text:span>? Чому цей виклик є блокуючим?</text:p>
        </text:list-item>
        <text:list-item>
          <text:p text:style-name="P537">Навіщо обробляти кожне з’єднання у окремому потоці? Які ризики пов’язані з цим підходом?</text:p>
        </text:list-item>
        <text:list-item>
          <text:p text:style-name="P537">Що таке <text:span text:style-name="Source_20_Text">SocketTimeoutException</text:span>? Як встановити тайм-аут очікування підключення та читання?</text:p>
        </text:list-item>
        <text:list-item>
          <text:p text:style-name="P537">Яке призначення <text:span text:style-name="Source_20_Text">HttpClient</text:span> у <text:span text:style-name="Source_20_Text">java.net.http</text:span>? Чим він кращий за <text:span text:style-name="Source_20_Text">HttpURLConnection</text:span>?</text:p>
        </text:list-item>
        <text:list-item>
          <text:p text:style-name="P537">Яка різниця між синхронним <text:span text:style-name="Source_20_Text">send</text:span> та асинхронним <text:span text:style-name="Source_20_Text">sendAsync</text:span> у <text:span text:style-name="Source_20_Text">HttpClient</text:span>?</text:p>
        </text:list-item>
        <text:list-item>
          <text:p text:style-name="P537">Що таке <text:span text:style-name="Source_20_Text">BodyPublisher</text:span> та <text:span text:style-name="Source_20_Text">BodyHandler</text:span>? Для чого вони потрібні?</text:p>
        </text:list-item>
        <text:list-item>
          <text:p text:style-name="P537">Що таке REST API? Яку роль відіграють HTTP-методи GET, POST, PUT, DELETE?</text:p>
        </text:list-item>
        <text:list-item>
          <text:p text:style-name="P537">Що таке JSON? Наведіть приклад структури JSON-об’єкта та JSON-масиву.</text:p>
        </text:list-item>
        <text:list-item>
          <text:p text:style-name="P537">Що таке <text:span text:style-name="Source_20_Text">ConnectException</text:span> та коли вона виникає?</text:p>
        </text:list-item>
        <text:list-item>
          <text:p text:style-name="P537">Яка різниця між <text:span text:style-name="Source_20_Text">InetAddress</text:span> та <text:span text:style-name="Source_20_Text">URI</text:span>? Для яких задач вони використовуються?</text:p>
        </text:list-item>
        <text:list-item>
          <text:p text:style-name="P537">Що таке <text:span text:style-name="Source_20_Text">DatagramSocket</text:span> та <text:span text:style-name="Source_20_Text">DatagramPacket</text:span>? Як надіслати UDP-повідомлення?</text:p>
        </text:list-item>
        <text:list-item>
          <text:p text:style-name="P537">Що таке <text:span text:style-name="Source_20_Text">localhost</text:span> та <text:span text:style-name="Source_20_Text">loopback</text:span>-адреса? Як пов’язані <text:span text:style-name="Source_20_Text">127.0.0.1</text:span> та <text:span text:style-name="Source_20_Text">::1</text:span>?</text:p>
        </text:list-item>
        <text:list-item>
          <text:p text:style-name="P537">Що таке HTTP-заголовки (headers)? Яку роль відіграють <text:span text:style-name="Source_20_Text">Content-Type</text:span> та <text:span text:style-name="Source_20_Text">Accept</text:span>?</text:p>
        </text:list-item>
      </text:list>
      <text:p text:style-name="Horizontal_20_Line"/>
      <text:h text:style-name="Heading_20_3" text:outline-level="3"><text:bookmark-start text:name="перелік-посилань-7"/>Перелік посилань<text:bookmark-end text:name="перелік-посилань-7"/></text:h>
      <text:list text:style-name="L48">
        <text:list-item>
          <text:p text:style-name="P538">Horstmann, C. S. <text:span text:style-name="T2">Core Java, Volume II — Advanced Features</text:span> (12th ed.). Hoboken : Pearson, 2022. 832 p.</text:p>
        </text:list-item>
        <text:list-item>
          <text:p text:style-name="P538">Schildt, H. <text:span text:style-name="T2">Java: The Complete Reference</text:span> (12th ed.). New York : McGraw-Hill, 2021. 1248 p.</text:p>
        </text:list-item>
        <text:list-item>
          <text:p text:style-name="P538">Oracle Corporation. <text:span text:style-name="T2">Custom Networking — Java Tutorials</text:span> [Електронний ресурс]. URL: https://docs.oracle.com/javase/tutorial/networking/ (дата звернення: 2025-09-01).</text:p>
        </text:list-item>
        <text:list-item>
          <text:p text:style-name="P538">Oracle Corporation. <text:span text:style-name="T2">java.net.http — HTTP Client API</text:span> [Електронний ресурс]. URL: https://docs.oracle.com/en/java/javase/25/docs/api/java.net.http/java/net/http/package-summary.html (дата звернення: 2025-09-01).</text:p>
        </text:list-item>
        <text:list-item>
          <text:p text:style-name="P538">Kurose, J. F., Ross, K. W. <text:span text:style-name="T2">Computer Networking: A Top-Down Approach</text:span> (8th ed.). Hoboken : Pearson, 2021. 856 p.</text:p>
        </text:list-item>
        <text:list-item>
          <text:p text:style-name="P538">Richardson, L., Ruby, S. <text:span text:style-name="T2">RESTful Web Services</text:span>. Sebastopol : O’Reilly Media, 2007. 448 p.</text:p>
        </text:list-item>
        <text:list-item>
          <text:p text:style-name="P538">Tanenbaum, A. S., Wetherall, D. J. <text:span text:style-name="T2">Computer Networks</text:span> (5th ed.). Upper Saddle River : Pearson, 2011. 960 p.</text:p>
        </text:list-item>
      </text:list>
      <text:h text:style-name="Heading_20_1" text:outline-level="1"><text:bookmark-start text:name="лабораторна-робота-9-1"/>Лабораторна робота №9<text:bookmark-end text:name="лабораторна-робота-9-1"/></text:h>
      <text:h text:style-name="Heading_20_2" text:outline-level="2"><text:bookmark-start text:name="створення-програм-з-кількома-підпроцесами"/>Створення програм з кількома підпроцесами<text:bookmark-end text:name="створення-програм-з-кількома-підпроцесами"/></text:h>
      <text:p text:style-name="Horizontal_20_Line"/>
      <text:h text:style-name="Heading_20_3" text:outline-level="3"><text:bookmark-start text:name="тема-8"/>Тема<text:bookmark-end text:name="тема-8"/></text:h>
      <text:p text:style-name="First_20_paragraph">Створення програм з кількома підпроцесами (багатопотокове програмування): потоки, синхронізація та паралельне виконання у Java.</text:p>
      <text:p text:style-name="Horizontal_20_Line"/>
      <text:h text:style-name="Heading_20_3" text:outline-level="3"><text:bookmark-start text:name="мета-8"/>Мета<text:bookmark-end text:name="мета-8"/></text:h>
      <text:p text:style-name="First_20_paragraph">Набути практичних навичок розробки багатопотокових застосунків мовою Java шляхом реалізації потоків виконання, механізмів синхронізації та паралельних обчислень з використанням <text:span text:style-name="Source_20_Text">ExecutorService</text:span>, <text:span text:style-name="Source_20_Text">synchronized</text:span>, <text:span text:style-name="Source_20_Text">volatile</text:span> та <text:span text:style-name="Source_20_Text">CompletableFuture</text:span>.</text:p>
      <text:p text:style-name="Horizontal_20_Line"/>
      <text:h text:style-name="Heading_20_3" text:outline-level="3"><text:bookmark-start text:name="теоретичні-відомості-8"/>Теоретичні відомості<text:bookmark-end text:name="теоретичні-відомості-8"/></text:h>
      <text:h text:style-name="Heading_20_4" text:outline-level="4"><text:bookmark-start text:name="потоки-виконання-threads"/>Потоки виконання (Threads)<text:bookmark-end text:name="потоки-виконання-threads"/></text:h>
      <text:p text:style-name="First_20_paragraph">Потік (<text:span text:style-name="T2">thread</text:span>) — найменша одиниця виконання у межах процесу. У Java кожен потік є екземпляром класу <text:span text:style-name="Source_20_Text">java.lang.Thread</text:span>. Два способи створення потоку:</text:p>
      <text:p text:style-name="P539">// Спосіб 1: успадкування Thread</text:p>
      <text:p text:style-name="P540">class CounterThread extends Thread {</text:p>
      <text:p text:style-name="P541"><text:s text:c="4"/>private final int id;</text:p>
      <text:p text:style-name="P542"><text:s text:c="4"/>public CounterThread(int id) { this.id = id; }</text:p>
      <text:p text:style-name="P543"/>
      <text:p text:style-name="P544"><text:s text:c="4"/>@Override</text:p>
      <text:p text:style-name="P545"><text:s text:c="4"/>public void run() {</text:p>
      <text:p text:style-name="P546"><text:s text:c="8"/>for (int i = 0; i &lt; 5; i++) {</text:p>
      <text:p text:style-name="P547"><text:s text:c="12"/>System.out.println("Потік " + id + ": " + i);</text:p>
      <text:p text:style-name="P548"><text:s text:c="8"/>}</text:p>
      <text:p text:style-name="P549"><text:s text:c="4"/>}</text:p>
      <text:p text:style-name="P550">}</text:p>
      <text:p text:style-name="P551"/>
      <text:p text:style-name="P552">// Спосіб 2: реалізація Runnable (перевагається)</text:p>
      <text:p text:style-name="P553">Thread t = new Thread(() -&gt; System.out.println("Лямбда-потік!"));</text:p>
      <text:p text:style-name="P554">t.start();</text:p>
      <text:p text:style-name="P555"/>
      <text:p text:style-name="P556">// Запуск</text:p>
      <text:p text:style-name="P557">new CounterThread(1).start();</text:p>
      <text:p text:style-name="First_20_paragraph"><text:span text:style-name="T1">Важливо:</text:span> <text:span text:style-name="Source_20_Text">thread.run()</text:span> виконує метод у поточному потоці. <text:span text:style-name="Source_20_Text">thread.start()</text:span> створює новий системний потік і запускає в ньому <text:span text:style-name="Source_20_Text">run()</text:span>.</text:p>
      <text:h text:style-name="Heading_20_4" text:outline-level="4"><text:bookmark-start text:name="стани-потоку"/>Стани потоку<text:bookmark-end text:name="стани-потоку"/></text:h>
      <text:p text:style-name="First_20_paragraph">Потік знаходиться в одному з станів: <text:span text:style-name="Source_20_Text">NEW</text:span> → <text:span text:style-name="Source_20_Text">RUNNABLE</text:span> → (<text:span text:style-name="Source_20_Text">BLOCKED</text:span> | <text:span text:style-name="Source_20_Text">WAITING</text:span> | <text:span text:style-name="Source_20_Text">TIMED_WAITING</text:span>) → <text:span text:style-name="Source_20_Text">TERMINATED</text:span>.</text:p>
      <text:h text:style-name="Heading_20_4" text:outline-level="4"><text:bookmark-start text:name="executorservice-пул-потоків"/><text:span text:style-name="Source_20_Text">ExecutorService</text:span> — пул потоків<text:bookmark-end text:name="executorservice-пул-потоків"/></text:h>
      <text:p text:style-name="First_20_paragraph">Ручне керування потоками ненадійне. Рекомендується використовувати пул:</text:p>
      <text:p text:style-name="P558">import java.util.concurrent.*;</text:p>
      <text:p text:style-name="P559"/>
      <text:p text:style-name="P560">// Фіксований пул з 4 потоками</text:p>
      <text:p text:style-name="P561">ExecutorService executor = Executors.newFixedThreadPool(4);</text:p>
      <text:p text:style-name="P562"/>
      <text:p text:style-name="P563">for (int i = 0; i &lt; 10; i++) {</text:p>
      <text:p text:style-name="P564"><text:s text:c="4"/>final int taskId = i;</text:p>
      <text:p text:style-name="P565"><text:s text:c="4"/>executor.submit(() -&gt; System.out.println("Задача " + taskId));</text:p>
      <text:p text:style-name="P566">}</text:p>
      <text:p text:style-name="P567"/>
      <text:p text:style-name="P568">executor.shutdown(); <text:s text:c="23"/>// зупинка після завершення задач</text:p>
      <text:p text:style-name="P569">executor.awaitTermination(30, TimeUnit.SECONDS);</text:p>
      <text:h text:style-name="Heading_20_4" text:outline-level="4"><text:bookmark-start text:name="callable-та-future"/><text:span text:style-name="Source_20_Text">Callable</text:span> та <text:span text:style-name="Source_20_Text">Future</text:span><text:bookmark-end text:name="callable-та-future"/></text:h>
      <text:p text:style-name="P570">Callable&lt;Double&gt; task = () -&gt; {</text:p>
      <text:p text:style-name="P571"><text:s text:c="4"/>Thread.sleep(1000);</text:p>
      <text:p text:style-name="P572"><text:s text:c="4"/>return Math.PI;</text:p>
      <text:p text:style-name="P573">};</text:p>
      <text:p text:style-name="P574"/>
      <text:p text:style-name="P575">Future&lt;Double&gt; future = executor.submit(task);</text:p>
      <text:p text:style-name="P576">System.out.println("Обчислення... ");</text:p>
      <text:p text:style-name="P577">double result = future.get(); // блокує до отримання результату</text:p>
      <text:p text:style-name="P578">System.out.println("PI ~ " + result);</text:p>
      <text:h text:style-name="Heading_20_4" text:outline-level="4"><text:bookmark-start text:name="completablefuture-java-8"/><text:span text:style-name="Source_20_Text">CompletableFuture</text:span> (Java 8+)<text:bookmark-end text:name="completablefuture-java-8"/></text:h>
      <text:p text:style-name="P579">CompletableFuture.supplyAsync(() -&gt; fetchTemperature())</text:p>
      <text:p text:style-name="P580"><text:s text:c="4"/>.thenApply(temp -&gt; "Температура: " + temp + "°C")</text:p>
      <text:p text:style-name="P581"><text:s text:c="4"/>.thenAccept(System.out::println)</text:p>
      <text:p text:style-name="P582"><text:s text:c="4"/>.exceptionally(ex -&gt; { System.err.println(ex.getMessage()); return null; })</text:p>
      <text:p text:style-name="P583"><text:s text:c="4"/>.join();</text:p>
      <text:h text:style-name="Heading_20_4" text:outline-level="4"><text:bookmark-start text:name="синхронізація-synchronized"/>Синхронізація: <text:span text:style-name="Source_20_Text">synchronized</text:span><text:bookmark-end text:name="синхронізація-synchronized"/></text:h>
      <text:p text:style-name="First_20_paragraph">При одночасному доступі кількох потоків до спільних даних виникають <text:span text:style-name="T1">гонки даних</text:span> (<text:span text:style-name="T2">data races</text:span>). Для захисту використовується <text:span text:style-name="Source_20_Text">synchronized</text:span>:</text:p>
      <text:p text:style-name="P584">public class SafeCounter {</text:p>
      <text:p text:style-name="P585"><text:s text:c="4"/>private int count = 0;</text:p>
      <text:p text:style-name="P586"/>
      <text:p text:style-name="P587"><text:s text:c="4"/>// Синхронізований метод — захищає весь метод</text:p>
      <text:p text:style-name="P588"><text:s text:c="4"/>public synchronized void increment() { count++; }</text:p>
      <text:p text:style-name="P589"/>
      <text:p text:style-name="P590"><text:s text:c="4"/>// Синхронізований блок — мінімальна критична секція</text:p>
      <text:p text:style-name="P591"><text:s text:c="4"/>public void decrement() {</text:p>
      <text:p text:style-name="P592"><text:s text:c="8"/>synchronized (this) { count--; }</text:p>
      <text:p text:style-name="P593"><text:s text:c="4"/>}</text:p>
      <text:p text:style-name="P594"/>
      <text:p text:style-name="P595"><text:s text:c="4"/>public synchronized int get() { return count; }</text:p>
      <text:p text:style-name="P596">}</text:p>
      <text:h text:style-name="Heading_20_4" text:outline-level="4"><text:bookmark-start text:name="volatile"/><text:span text:style-name="Source_20_Text">volatile</text:span><text:bookmark-end text:name="volatile"/></text:h>
      <text:p text:style-name="First_20_paragraph"><text:span text:style-name="Source_20_Text">volatile</text:span> гарантує <text:span text:style-name="T1">видимість</text:span> змін між потоками (але не атомарність складних операцій):</text:p>
      <text:p text:style-name="P597">volatile boolean running = true;</text:p>
      <text:p text:style-name="P598"/>
      <text:p text:style-name="P599">// Потік, що перевіряє прапорець зупинки</text:p>
      <text:p text:style-name="P600">while (running) { /* виконання */ }</text:p>
      <text:p text:style-name="P601"/>
      <text:p text:style-name="P602">// Інший потік</text:p>
      <text:p text:style-name="P603">running = false; // з volatile — гарантовано побачить перший потік</text:p>
      <text:h text:style-name="Heading_20_4" text:outline-level="4"><text:bookmark-start text:name="атомарні-класи"/>Атомарні класи<text:bookmark-end text:name="атомарні-класи"/></text:h>
      <text:p text:style-name="P604">import java.util.concurrent.atomic.*;</text:p>
      <text:p text:style-name="P605"/>
      <text:p text:style-name="P606">AtomicInteger counter = new AtomicInteger(0);</text:p>
      <text:p text:style-name="P607">counter.incrementAndGet(); <text:s text:c="17"/>// атомарний інкремент</text:p>
      <text:p text:style-name="P608">counter.compareAndSet(5, 10); <text:s text:c="14"/>// порівняти і замінити</text:p>
      <text:h text:style-name="Heading_20_4" text:outline-level="4"><text:bookmark-start text:name="блокування-lock-та-reentrantlock"/>Блокування: <text:span text:style-name="Source_20_Text">Lock</text:span> та <text:span text:style-name="Source_20_Text">ReentrantLock</text:span><text:bookmark-end text:name="блокування-lock-та-reentrantlock"/></text:h>
      <text:p text:style-name="P609">import java.util.concurrent.locks.*;</text:p>
      <text:p text:style-name="P610"/>
      <text:p text:style-name="P611">Lock lock = new ReentrantLock();</text:p>
      <text:p text:style-name="P612">lock.lock();</text:p>
      <text:p text:style-name="P613">try {</text:p>
      <text:p text:style-name="P614"><text:s text:c="4"/>// критична секція</text:p>
      <text:p text:style-name="P615">} finally {</text:p>
      <text:p text:style-name="P616"><text:s text:c="4"/>lock.unlock(); // завжди у finally</text:p>
      <text:p text:style-name="P617">}</text:p>
      <text:h text:style-name="Heading_20_4" text:outline-level="4"><text:bookmark-start text:name="віртуальні-потоки-virtual-threads-java-21"/>Віртуальні потоки (Virtual Threads, Java 21+)<text:bookmark-end text:name="віртуальні-потоки-virtual-threads-java-21"/></text:h>
      <text:p text:style-name="P618">// Надлегкі потоки керовані JVM (не ОС)</text:p>
      <text:p text:style-name="P619">Thread vt = Thread.ofVirtual().start(() -&gt; System.out.println("Віртуальний потік"));</text:p>
      <text:p text:style-name="P620">ExecutorService vtExecutor = Executors.newVirtualThreadPerTaskExecutor();</text:p>
      <text:p text:style-name="First_20_paragraph">Віртуальні потоки дозволяють мати мільйони одночасних «потоків» без перевантаження ОС.</text:p>
      <text:h text:style-name="Heading_20_4" text:outline-level="4"><text:bookmark-start text:name="приклад-з-репозиторію-java-iot-7"/>Приклад з репозиторію java-iot<text:bookmark-end text:name="приклад-з-репозиторію-java-iot-7"/></text:h>
      <text:p text:style-name="First_20_paragraph">Клас <text:a xlink:type="simple" xlink:href="https://github.com/AndriyLutskiv/java-iot/blob/main/projects/p06-reaction/src/main/java/ua/crowpi/projects/p06/ReactionEngine.java" office:name=""><text:span text:style-name="Definition"><text:span text:style-name="Source_20_Text">ReactionEngine.java</text:span></text:span></text:a> координує роботу ігрових раундів через час та стимули у кількох потоках. Клас <text:a xlink:type="simple" xlink:href="https://github.com/AndriyLutskiv/java-iot/blob/main/core/src/main/java/ua/crowpi/core/util/GracefulShutdown.java" office:name=""><text:span text:style-name="Definition"><text:span text:style-name="Source_20_Text">GracefulShutdown.java</text:span></text:span></text:a> демонструє коректне завершення роботи через shutdown hook та зупинку потоків. Рекомендується проаналізувати ці класи.</text:p>
      <text:p text:style-name="Horizontal_20_Line"/>
      <text:h text:style-name="Heading_20_3" text:outline-level="3"><text:bookmark-start text:name="хід-виконання-роботи-8"/>Хід виконання роботи<text:bookmark-end text:name="хід-виконання-роботи-8"/></text:h>
      <text:list text:style-name="L49">
        <text:list-item>
          <text:p text:style-name="P621">Відкрити та проаналізувати <text:span text:style-name="Source_20_Text">ReactionEngine.java</text:span> та <text:span text:style-name="Source_20_Text">GracefulShutdown.java</text:span> (посилання вище). Визначити: які механізми синхронізації використано, як керується зупинка потоків.</text:p>
        </text:list-item>
        <text:list-item>
          <text:p text:style-name="P621">Реалізувати два потоки, що паралельно збільшують спільний лічильник (без синхронізації). Запустити 1000 разів та зафіксувати ненульову ймовірність гонки.</text:p>
        </text:list-item>
        <text:list-item>
          <text:p text:style-name="P621">Виправити гонку через <text:span text:style-name="Source_20_Text">synchronized</text:span>, потім через <text:span text:style-name="Source_20_Text">AtomicInteger</text:span>. Порівняти коректність та продуктивність.</text:p>
        </text:list-item>
        <text:list-item>
          <text:p text:style-name="P621">Реалізувати пул потоків для паралельного виконання задач відповідно до варіанту.</text:p>
        </text:list-item>
        <text:list-item>
          <text:p text:style-name="P621">Реалізувати <text:span text:style-name="Source_20_Text">Callable</text:span>-задачу, що повертає результат через <text:span text:style-name="Source_20_Text">Future</text:span>. Виміряти час виконання послідовно та паралельно.</text:p>
        </text:list-item>
        <text:list-item>
          <text:p text:style-name="P621">Продемонструвати <text:span text:style-name="Source_20_Text">volatile</text:span>: запустити потік у циклі з прапорцем зупинки, переконатися, що без <text:span text:style-name="Source_20_Text">volatile</text:span> потік може не зупинитися.</text:p>
        </text:list-item>
        <text:list-item>
          <text:p text:style-name="P621">Реалізувати виробника-споживача (<text:span text:style-name="Source_20_Text">Producer-Consumer</text:span>) через <text:span text:style-name="Source_20_Text">BlockingQueue&lt;String&gt;</text:span>: один потік-виробник, один потік-споживач.</text:p>
        </text:list-item>
        <text:list-item>
          <text:p text:style-name="P621">Реалізувати завдання відповідно до варіанту з використанням <text:span text:style-name="Source_20_Text">CompletableFuture</text:span>.</text:p>
        </text:list-item>
        <text:list-item>
          <text:p text:style-name="P621">Продемонструвати <text:span text:style-name="Source_20_Text">Thread.sleep</text:span>, <text:span text:style-name="Source_20_Text">Thread.join</text:span>, <text:span text:style-name="Source_20_Text">interrupt</text:span>. Обробити <text:span text:style-name="Source_20_Text">InterruptedException</text:span>.</text:p>
        </text:list-item>
        <text:list-item>
          <text:p text:style-name="P621">Написати 3 тести, що перевіряють потокобезпечність (використати <text:span text:style-name="Source_20_Text">CountDownLatch</text:span> або <text:span text:style-name="Source_20_Text">CyclicBarrier</text:span> для синхронізації початку).</text:p>
        </text:list-item>
        <text:list-item>
          <text:p text:style-name="P621">Оформити звіт: вихідний код, діаграма взаємодії потоків, результати порівняльного вимірювання часу.</text:p>
        </text:list-item>
      </text:list>
      <text:p text:style-name="Horizontal_20_Line"/>
      <text:h text:style-name="Heading_20_3" text:outline-level="3"><text:bookmark-start text:name="індивідуальні-завдання-8"/>Індивідуальні завдання<text:bookmark-end text:name="індивідуальні-завдання-8"/></text:h>
      <text:p text:style-name="First_20_paragraph">Розробити багатопотокову програму (2–3 класи). Обсяг: до 150 рядків коду. Обов’язково: коректна синхронізація, відсутність deadlock, коректне завершення потоків.</text:p>
      <text:p text:style-name="Text_20_body"><text:span text:style-name="T1">Варіант 1.</text:span> Реалізувати паралельне завантаження даних: 5 <text:span text:style-name="Source_20_Text">Callable&lt;String&gt;</text:span> симулюють завантаження з різних джерел (через <text:span text:style-name="Source_20_Text">Thread.sleep</text:span> з різними затримками). Зібрати результати через <text:span text:style-name="Source_20_Text">List&lt;Future&lt;String&gt;&gt;</text:span>, вивести у порядку завершення через <text:span text:style-name="Source_20_Text">CompletionService</text:span>.</text:p>
      <text:p text:style-name="Text_20_body"><text:span text:style-name="T1">Варіант 2.</text:span> Реалізувати «Виробник-споживач» для IoT-даних (натхненний <text:span text:style-name="Source_20_Text">ReactionEngine.java</text:span>): один потік-«датчик» кожні 500 мс додає показання у <text:span text:style-name="Source_20_Text">BlockingQueue&lt;Double&gt;</text:span> (ємність 10), потік-«реєстратор» забирає та записує у файл. Завершення через <text:span text:style-name="Source_20_Text">volatile boolean running</text:span>.</text:p>
      <text:p text:style-name="Text_20_body"><text:span text:style-name="T1">Варіант 3.</text:span> Реалізувати паралельне сортування: масив з 10 000 елементів розбити на N частин (N = кількість ядер), відсортувати кожну частину у окремому <text:span text:style-name="Source_20_Text">CompletableFuture</text:span>, потім злити. Порівняти час із <text:span text:style-name="Source_20_Text">Arrays.sort</text:span>.</text:p>
      <text:p text:style-name="Text_20_body"><text:span text:style-name="T1">Варіант 4.</text:span> Реалізувати «Банк» з потокобезпечними рахунками: клас <text:span text:style-name="Source_20_Text">BankAccount</text:span> з <text:span text:style-name="Source_20_Text">ReentrantLock</text:span>. N потоків виконують випадкові перекази між рахунками. Перевірити інваріант: сума всіх рахунків до = сума після всіх переказів.</text:p>
      <text:p text:style-name="Text_20_body"><text:span text:style-name="T1">Варіант 5.</text:span> Реалізувати паралельний пошук у файлах: N потоків шукають рядок у N різних файлах (або частинах одного файлу). Використати <text:span text:style-name="Source_20_Text">ExecutorService</text:span> та <text:span text:style-name="Source_20_Text">Future&lt;Long&gt;</text:span> (кількість збігів). Вивести загальний результат.</text:p>
      <text:p text:style-name="Text_20_body"><text:span text:style-name="T1">Варіант 6.</text:span> Реалізувати «Ліфт»: <text:span text:style-name="Source_20_Text">ElevatorSimulator</text:span> з <text:span text:style-name="Source_20_Text">BlockingQueue&lt;Integer&gt;</text:span> (запити поверхів). Один потік-«ліфт» обробляє запити; кілька потоків-«пасажирів» додають запити. Вивести лог переміщень.</text:p>
      <text:p text:style-name="Text_20_body"><text:span text:style-name="T1">Варіант 7.</text:span> Реалізувати <text:span text:style-name="Source_20_Text">PeriodicTaskRunner</text:span> (натхненний <text:span text:style-name="Source_20_Text">GracefulShutdown.java</text:span>): <text:span text:style-name="Source_20_Text">ScheduledExecutorService</text:span> виконує задачу кожні N секунд. Коректне завершення через shutdown hook (<text:span text:style-name="Source_20_Text">Runtime.getRuntime().addShutdownHook</text:span>). Перевірити: при Ctrl+C — задача завершується чисто.</text:p>
      <text:p text:style-name="Text_20_body"><text:span text:style-name="T1">Варіант 8.</text:span> Реалізувати <text:span text:style-name="Source_20_Text">ParallelWordCount</text:span>: <text:span text:style-name="Source_20_Text">Files.lines(path)</text:span> розбити на частини; кожна частина обробляється у окремому потоці через <text:span text:style-name="Source_20_Text">CompletableFuture.supplyAsync</text:span>; результати (<text:span text:style-name="Source_20_Text">Map&lt;String, Long&gt;</text:span>) об’єднати методом <text:span text:style-name="Source_20_Text">thenCombine</text:span>.</text:p>
      <text:p text:style-name="Text_20_body"><text:span text:style-name="T1">Варіант 9.</text:span> Реалізувати «Семафорна парковка»: <text:span text:style-name="Source_20_Text">Semaphore</text:span> на 3 місця; 10 потоків-«автомобілів» намагаються «припаркуватися» (<text:span text:style-name="Source_20_Text">acquire</text:span>) на випадковий час. Вивести лог: хто зайшов, хто чекає, хто вийшов.</text:p>
      <text:p text:style-name="Text_20_body"><text:span text:style-name="T1">Варіант 10.</text:span> Реалізувати потокобезпечний кеш: <text:span text:style-name="Source_20_Text">Cache&lt;K, V&gt;</text:span> на <text:span text:style-name="Source_20_Text">ConcurrentHashMap</text:span> з TTL (час до застарівання). <text:span text:style-name="Source_20_Text">ScheduledExecutorService</text:span> кожну хвилину видаляє прострочені записи. Методи: <text:span text:style-name="Source_20_Text">put</text:span>, <text:span text:style-name="Source_20_Text">get</text:span>, <text:span text:style-name="Source_20_Text">size</text:span>.</text:p>
      <text:p text:style-name="Text_20_body"><text:span text:style-name="T1">Варіант 11.</text:span> Реалізувати <text:span text:style-name="Source_20_Text">RaceGame</text:span>: N «гравців» (потоки) стартують одночасно через <text:span text:style-name="Source_20_Text">CountDownLatch</text:span>. Кожен «гравець» — цикл з <text:span text:style-name="Source_20_Text">Thread.sleep(random)</text:span>. Перший, хто завершить 10 ітерацій, — переможець. Вивести час кожного гравця.</text:p>
      <text:p text:style-name="Text_20_body"><text:span text:style-name="T1">Варіант 12.</text:span> Реалізувати паралельну обробку зображення (симуляція): 2D-масив <text:span text:style-name="Source_20_Text">int[][]</text:span> пікселів. <text:span text:style-name="Source_20_Text">ForkJoinPool</text:span> рекурсивно ділить масив на рядки, кожен рядок обробляє (<text:span text:style-name="Source_20_Text">pixel * 2</text:span> — підвищення яскравості). Порівняти час з послідовною обробкою.</text:p>
      <text:p text:style-name="Text_20_body"><text:span text:style-name="T1">Варіант 13.</text:span> Реалізувати «Читачі-письменники» (<text:span text:style-name="Source_20_Text">ReadWriteLock</text:span>): клас <text:span text:style-name="Source_20_Text">SharedDocument</text:span> зі спільним рядком, захищеним <text:span text:style-name="Source_20_Text">ReentrantReadWriteLock</text:span>. 5 потоків-«читачів» та 2 потоки-«письменники». Вивести лог конкурентного доступу.</text:p>
      <text:p text:style-name="Text_20_body"><text:span text:style-name="T1">Варіант 14.</text:span> Реалізувати <text:span text:style-name="Source_20_Text">TaskPipeline</text:span> з трьома етапами: <text:span text:style-name="Source_20_Text">Stage1</text:span> читає з джерела → передає у <text:span text:style-name="Source_20_Text">BlockingQueue</text:span>; <text:span text:style-name="Source_20_Text">Stage2</text:span> трансформує → передає у <text:span text:style-name="Source_20_Text">BlockingQueue</text:span>; <text:span text:style-name="Source_20_Text">Stage3</text:span> записує у файл. Кожен етап — окремий потік.</text:p>
      <text:p text:style-name="Text_20_body"><text:span text:style-name="T1">Варіант 15.</text:span> Реалізувати «Аукціон»: клас <text:span text:style-name="Source_20_Text">Auction</text:span> з <text:span text:style-name="Source_20_Text">volatile double currentBid</text:span>. N потоків-«учасників» роблять ставки через <text:span text:style-name="Source_20_Text">compareAndExchange</text:span> (<text:span text:style-name="Source_20_Text">VarHandle</text:span>) або <text:span text:style-name="Source_20_Text">AtomicReference</text:span>. Переможець — найвища ставка після завершення аукціону. Перевірити відсутність гонки.</text:p>
      <text:p text:style-name="Horizontal_20_Line"/>
      <text:h text:style-name="Heading_20_3" text:outline-level="3"><text:bookmark-start text:name="контрольні-запитання-8"/>Контрольні запитання<text:bookmark-end text:name="контрольні-запитання-8"/></text:h>
      <text:list text:style-name="L50">
        <text:list-item>
          <text:p text:style-name="P622">Що таке потік виконання (thread)? Яка різниця між потоком та процесом?</text:p>
        </text:list-item>
        <text:list-item>
          <text:p text:style-name="P622">Чим <text:span text:style-name="Source_20_Text">Thread.start()</text:span> відрізняється від <text:span text:style-name="Source_20_Text">Thread.run()</text:span>? Що відбудеться при виклику <text:span text:style-name="Source_20_Text">run()</text:span> без <text:span text:style-name="Source_20_Text">start()</text:span>?</text:p>
        </text:list-item>
        <text:list-item>
          <text:p text:style-name="P622">Що таке гонка даних (data race)? Наведіть приклад коду, що демонструє гонку.</text:p>
        </text:list-item>
        <text:list-item>
          <text:p text:style-name="P622">Що таке <text:span text:style-name="Source_20_Text">synchronized</text:span>? Яка різниця між синхронізованим методом та синхронізованим блоком?</text:p>
        </text:list-item>
        <text:list-item>
          <text:p text:style-name="P622">Що таке <text:span text:style-name="Source_20_Text">volatile</text:span>? Яку гарантію воно дає і яку — ні?</text:p>
        </text:list-item>
        <text:list-item>
          <text:p text:style-name="P622">Що таке <text:span text:style-name="Source_20_Text">AtomicInteger</text:span>? Як <text:span text:style-name="Source_20_Text">compareAndSet</text:span> дозволяє реалізувати атомарні операції без <text:span text:style-name="Source_20_Text">synchronized</text:span>?</text:p>
        </text:list-item>
        <text:list-item>
          <text:p text:style-name="P622">Що таке <text:span text:style-name="Source_20_Text">ExecutorService</text:span>? Яка різниця між <text:span text:style-name="Source_20_Text">Executors.newFixedThreadPool</text:span> та <text:span text:style-name="Source_20_Text">newCachedThreadPool</text:span>?</text:p>
        </text:list-item>
        <text:list-item>
          <text:p text:style-name="P622">Що таке <text:span text:style-name="Source_20_Text">Future.get()</text:span>? Що відбудеться, якщо задача кинула виключення?</text:p>
        </text:list-item>
        <text:list-item>
          <text:p text:style-name="P622">Що таке <text:span text:style-name="Source_20_Text">CompletableFuture</text:span>? Чим він відрізняється від <text:span text:style-name="Source_20_Text">Future</text:span> з точки зору функціональної композиції?</text:p>
        </text:list-item>
        <text:list-item>
          <text:p text:style-name="P622">Що таке <text:span text:style-name="Source_20_Text">deadlock</text:span>? Опишіть умови його виникнення та способи запобігання.</text:p>
        </text:list-item>
        <text:list-item>
          <text:p text:style-name="P622">Що таке <text:span text:style-name="Source_20_Text">BlockingQueue</text:span>? Для якого паттерну він найчастіше використовується?</text:p>
        </text:list-item>
        <text:list-item>
          <text:p text:style-name="P622">Що таке <text:span text:style-name="Source_20_Text">Semaphore</text:span>? Наведіть приклад задачі, де він є зручним.</text:p>
        </text:list-item>
        <text:list-item>
          <text:p text:style-name="P622">Що таке <text:span text:style-name="Source_20_Text">CountDownLatch</text:span>? Чим він відрізняється від <text:span text:style-name="Source_20_Text">CyclicBarrier</text:span>?</text:p>
        </text:list-item>
        <text:list-item>
          <text:p text:style-name="P622">Що таке віртуальні потоки (Virtual Threads)? У чому їхня перевага над платформними потоками?</text:p>
        </text:list-item>
        <text:list-item>
          <text:p text:style-name="P622">Що таке <text:span text:style-name="Source_20_Text">ThreadLocal</text:span>? Для яких задач він використовується?</text:p>
        </text:list-item>
      </text:list>
      <text:p text:style-name="Horizontal_20_Line"/>
      <text:h text:style-name="Heading_20_3" text:outline-level="3"><text:bookmark-start text:name="перелік-посилань-8"/>Перелік посилань<text:bookmark-end text:name="перелік-посилань-8"/></text:h>
      <text:list text:style-name="L51">
        <text:list-item>
          <text:p text:style-name="P623">Goetz, B., Peierls, T., Bloch, J., Bowbeer, J., Holmes, D., Lea, D. <text:span text:style-name="T2">Java Concurrency in Practice</text:span>. Boston : Addison-Wesley, 2006. 403 p.</text:p>
        </text:list-item>
        <text:list-item>
          <text:p text:style-name="P623">Horstmann, C. S. <text:span text:style-name="T2">Core Java, Volume II — Advanced Features</text:span> (12th ed.). Hoboken : Pearson, 2022. 832 p.</text:p>
        </text:list-item>
        <text:list-item>
          <text:p text:style-name="P623">Bloch, J. <text:span text:style-name="T2">Effective Java</text:span> (3rd ed.). Boston : Addison-Wesley, 2018. 412 p.</text:p>
        </text:list-item>
        <text:list-item>
          <text:p text:style-name="P623">Oracle Corporation. <text:span text:style-name="T2">Concurrency — Java Tutorials</text:span> [Електронний ресурс]. URL: https://docs.oracle.com/javase/tutorial/essential/concurrency/ (дата звернення: 2025-09-01).</text:p>
        </text:list-item>
        <text:list-item>
          <text:p text:style-name="P623">Oracle Corporation. <text:span text:style-name="T2">Virtual Threads — JEP 444</text:span> [Електронний ресурс]. URL: https://openjdk.org/jeps/444 (дата звернення: 2025-09-01).</text:p>
        </text:list-item>
        <text:list-item>
          <text:p text:style-name="P623">Oracle Corporation. <text:span text:style-name="T2">java.util.concurrent Package API</text:span> [Електронний ресурс]. URL: https://docs.oracle.com/en/java/javase/25/docs/api/java.base/java/util/concurrent/package-summary.html (дата звернення: 2025-09-01).</text:p>
        </text:list-item>
        <text:list-item>
          <text:p text:style-name="P623">Schildt, H. <text:span text:style-name="T2">Java: The Complete Reference</text:span> (12th ed.). New York : McGraw-Hill, 2021. 1248 p.</text:p>
        </text:list-item>
      </text:list>
      <text:h text:style-name="Heading_20_1" text:outline-level="1"><text:bookmark-start text:name="лабораторна-робота-10-1"/>Лабораторна робота №10<text:bookmark-end text:name="лабораторна-робота-10-1"/></text:h>
      <text:h text:style-name="Heading_20_2" text:outline-level="2"><text:bookmark-start text:name="робота-з-базами-даних"/>Робота з базами даних<text:bookmark-end text:name="робота-з-базами-даних"/></text:h>
      <text:p text:style-name="Horizontal_20_Line"/>
      <text:h text:style-name="Heading_20_3" text:outline-level="3"><text:bookmark-start text:name="тема-9"/>Тема<text:bookmark-end text:name="тема-9"/></text:h>
      <text:p text:style-name="First_20_paragraph">Робота з реляційними базами даних у Java засобами JDBC: підключення, виконання SQL-запитів, транзакції та патерн репозиторію.</text:p>
      <text:p text:style-name="Horizontal_20_Line"/>
      <text:h text:style-name="Heading_20_3" text:outline-level="3"><text:bookmark-start text:name="мета-9"/>Мета<text:bookmark-end text:name="мета-9"/></text:h>
      <text:p text:style-name="First_20_paragraph">Набути практичних навичок взаємодії з реляційними базами даних у Java шляхом реалізації програм, що використовують JDBC API для виконання SQL-запитів <text:span text:style-name="Source_20_Text">SELECT</text:span>, <text:span text:style-name="Source_20_Text">INSERT</text:span>, <text:span text:style-name="Source_20_Text">UPDATE</text:span>, <text:span text:style-name="Source_20_Text">DELETE</text:span>, керування транзакціями та патерн репозиторію.</text:p>
      <text:p text:style-name="Horizontal_20_Line"/>
      <text:h text:style-name="Heading_20_3" text:outline-level="3"><text:bookmark-start text:name="теоретичні-відомості-9"/>Теоретичні відомості<text:bookmark-end text:name="теоретичні-відомості-9"/></text:h>
      <text:h text:style-name="Heading_20_4" text:outline-level="4"><text:bookmark-start text:name="архітектура-jdbc"/>Архітектура JDBC<text:bookmark-end text:name="архітектура-jdbc"/></text:h>
      <text:p text:style-name="First_20_paragraph"><text:span text:style-name="T1">JDBC (Java Database Connectivity)</text:span> — стандартний API для взаємодії Java-застосунків з реляційними базами даних. Архітектура:</text:p>
      <text:p text:style-name="P624">Застосунок Java</text:p>
      <text:p text:style-name="P625"><text:s text:c="4"/>↓ <text:s text:c="1"/>(JDBC API)</text:p>
      <text:p text:style-name="P626">JDBC Driver Manager</text:p>
      <text:p text:style-name="P627"><text:s text:c="4"/>↓ <text:s text:c="1"/>(JDBC Driver)</text:p>
      <text:p text:style-name="P628">База даних (SQLite / PostgreSQL / MySQL / H2 тощо)</text:p>
      <text:p text:style-name="First_20_paragraph">Ключові класи в пакеті <text:span text:style-name="Source_20_Text">java.sql</text:span>: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Клас/Інтерфейс</text:p>
            </table:table-cell>
            <table:table-cell table:style-name="TableHeaderRowCell" office:value-type="string">
              <text:p text:style-name="Table_20_Heading">Призначення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20_Text">DriverManager</text:span></text:p>
          </table:table-cell>
          <table:table-cell table:style-name="TableRowCell" office:value-type="string">
            <text:p text:style-name="Table_20_Contents">Керування драйверами, отримання з’єднань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Connection</text:span></text:p>
          </table:table-cell>
          <table:table-cell table:style-name="TableRowCell" office:value-type="string">
            <text:p text:style-name="Table_20_Contents">З’єднання з БД; управління транзакціями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Statement</text:span></text:p>
          </table:table-cell>
          <table:table-cell table:style-name="TableRowCell" office:value-type="string">
            <text:p text:style-name="Table_20_Contents">Виконання простих SQL-запитів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PreparedStatement</text:span></text:p>
          </table:table-cell>
          <table:table-cell table:style-name="TableRowCell" office:value-type="string">
            <text:p text:style-name="Table_20_Contents">Параметризовані запити (захист від SQL-ін’єкції)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CallableStatement</text:span></text:p>
          </table:table-cell>
          <table:table-cell table:style-name="TableRowCell" office:value-type="string">
            <text:p text:style-name="Table_20_Contents">Виклик збережених процедур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ResultSet</text:span></text:p>
          </table:table-cell>
          <table:table-cell table:style-name="TableRowCell" office:value-type="string">
            <text:p text:style-name="Table_20_Contents">Набір рядків результату запиту</text:p>
          </table:table-cell>
        </table:table-row>
      </table:table>
      <text:h text:style-name="Heading_20_4" text:outline-level="4"><text:bookmark-start text:name="sqlite-як-навчальна-база-даних"/>SQLite як навчальна база даних<text:bookmark-end text:name="sqlite-як-навчальна-база-даних"/></text:h>
      <text:p text:style-name="First_20_paragraph"><text:span text:style-name="T1">SQLite</text:span> — легковагова вбудована СУБД, що зберігає базу у єдиному файлі. Не потребує окремого серверного процесу. Ідеально для навчального середовища. JDBC-драйвер: <text:span text:style-name="Source_20_Text">org.xerial:sqlite-jdbc</text:span>.</text:p>
      <text:p text:style-name="P629">&lt;!-- Maven --&gt;</text:p>
      <text:p text:style-name="P630">&lt;dependency&gt;</text:p>
      <text:p text:style-name="P631"><text:s text:c="4"/>&lt;groupId&gt;org.xerial&lt;/groupId&gt;</text:p>
      <text:p text:style-name="P632"><text:s text:c="4"/>&lt;artifactId&gt;sqlite-jdbc&lt;/artifactId&gt;</text:p>
      <text:p text:style-name="P633"><text:s text:c="4"/>&lt;version&gt;3.45.3.0&lt;/version&gt;</text:p>
      <text:p text:style-name="P634">&lt;/dependency&gt;</text:p>
      <text:h text:style-name="Heading_20_4" text:outline-level="4"><text:bookmark-start text:name="підключення-та-базові-операції"/>Підключення та базові операції<text:bookmark-end text:name="підключення-та-базові-операції"/></text:h>
      <text:p text:style-name="P635">import java.sql.*;</text:p>
      <text:p text:style-name="P636"/>
      <text:p text:style-name="P637">public class DatabaseExample {</text:p>
      <text:p text:style-name="P638"/>
      <text:p text:style-name="P639"><text:s text:c="4"/>private static final String URL = "jdbc:sqlite:mydata.db";</text:p>
      <text:p text:style-name="P640"/>
      <text:p text:style-name="P641"><text:s text:c="4"/>public static void main(String[] args) throws SQLException {</text:p>
      <text:p text:style-name="P642"><text:s text:c="8"/>// Підключення — автоматично закривається у try-with-resources</text:p>
      <text:p text:style-name="P643"><text:s text:c="8"/>try (Connection conn = DriverManager.getConnection(URL)) {</text:p>
      <text:p text:style-name="P644"/>
      <text:p text:style-name="P645"><text:s text:c="12"/>// Створення таблиці</text:p>
      <text:p text:style-name="P646"><text:s text:c="12"/>try (Statement stmt = conn.createStatement()) {</text:p>
      <text:p text:style-name="P647"><text:s text:c="16"/>stmt.execute("""</text:p>
      <text:p text:style-name="P648"><text:s text:c="20"/>CREATE TABLE IF NOT EXISTS sensors (</text:p>
      <text:p text:style-name="P649"><text:s text:c="24"/>id <text:s text:c="3"/>INTEGER PRIMARY KEY AUTOINCREMENT,</text:p>
      <text:p text:style-name="P650"><text:s text:c="24"/>name <text:s text:c="1"/>TEXT <text:s text:c="3"/>NOT NULL,</text:p>
      <text:p text:style-name="P651"><text:s text:c="24"/>value REAL,</text:p>
      <text:p text:style-name="P652"><text:s text:c="24"/>ts <text:s text:c="3"/>INTEGER NOT NULL</text:p>
      <text:p text:style-name="P653"><text:s text:c="20"/>)</text:p>
      <text:p text:style-name="P654"><text:s text:c="16"/>""");</text:p>
      <text:p text:style-name="P655"><text:s text:c="12"/>}</text:p>
      <text:p text:style-name="P656"/>
      <text:p text:style-name="P657"><text:s text:c="12"/>// Вставка (НІКОЛИ не конкатенувати значення у SQL — SQL-ін'єкція!)</text:p>
      <text:p text:style-name="P658"><text:s text:c="12"/>String sql = "INSERT INTO sensors (name, value, ts) VALUES (?, ?, ?)";</text:p>
      <text:p text:style-name="P659"><text:s text:c="12"/>try (PreparedStatement ps = conn.prepareStatement(sql)) {</text:p>
      <text:p text:style-name="P660"><text:s text:c="16"/>ps.setString(1, "DHT11");</text:p>
      <text:p text:style-name="P661"><text:s text:c="16"/>ps.setDouble(2, 23.5);</text:p>
      <text:p text:style-name="P662"><text:s text:c="16"/>ps.setLong(3, System.currentTimeMillis());</text:p>
      <text:p text:style-name="P663"><text:s text:c="16"/>ps.executeUpdate();</text:p>
      <text:p text:style-name="P664"><text:s text:c="12"/>}</text:p>
      <text:p text:style-name="P665"/>
      <text:p text:style-name="P666"><text:s text:c="12"/>// Запит</text:p>
      <text:p text:style-name="P667"><text:s text:c="12"/>try (PreparedStatement ps = conn.prepareStatement(</text:p>
      <text:p text:style-name="P668"><text:s text:c="20"/>"SELECT id, name, value, ts FROM sensors WHERE name = ?")) {</text:p>
      <text:p text:style-name="P669"><text:s text:c="16"/>ps.setString(1, "DHT11");</text:p>
      <text:p text:style-name="P670"><text:s text:c="16"/>try (ResultSet rs = ps.executeQuery()) {</text:p>
      <text:p text:style-name="P671"><text:s text:c="20"/>while (rs.next()) {</text:p>
      <text:p text:style-name="P672"><text:s text:c="24"/>System.out.printf("ID=%d <text:s text:c="1"/>name=%s <text:s text:c="1"/>value=%.1f%n",</text:p>
      <text:p text:style-name="P673"><text:s text:c="28"/>rs.getInt("id"),</text:p>
      <text:p text:style-name="P674"><text:s text:c="28"/>rs.getString("name"),</text:p>
      <text:p text:style-name="P675"><text:s text:c="28"/>rs.getDouble("value"));</text:p>
      <text:p text:style-name="P676"><text:s text:c="20"/>}</text:p>
      <text:p text:style-name="P677"><text:s text:c="16"/>}</text:p>
      <text:p text:style-name="P678"><text:s text:c="12"/>}</text:p>
      <text:p text:style-name="P679"><text:s text:c="8"/>}</text:p>
      <text:p text:style-name="P680"><text:s text:c="4"/>}</text:p>
      <text:p text:style-name="P681">}</text:p>
      <text:h text:style-name="Heading_20_4" text:outline-level="4"><text:bookmark-start text:name="транзакції"/>Транзакції<text:bookmark-end text:name="транзакції"/></text:h>
      <text:p text:style-name="First_20_paragraph">За замовчуванням JDBC увімкнено режим <text:span text:style-name="Source_20_Text">autoCommit=true</text:span> — кожен оператор фіксується одразу. Для атомарного виконання кількох операцій:</text:p>
      <text:p text:style-name="P682">conn.setAutoCommit(false);</text:p>
      <text:p text:style-name="P683">try {</text:p>
      <text:p text:style-name="P684"><text:s text:c="4"/>debit(conn, fromAccount, amount);</text:p>
      <text:p text:style-name="P685"><text:s text:c="4"/>credit(conn, toAccount, amount);</text:p>
      <text:p text:style-name="P686"><text:s text:c="4"/>conn.commit(); <text:s text:c="13"/>// зафіксувати обидві операції разом</text:p>
      <text:p text:style-name="P687">} catch (SQLException e) {</text:p>
      <text:p text:style-name="P688"><text:s text:c="4"/>conn.rollback(); <text:s text:c="11"/>// відкотити обидві при помилці</text:p>
      <text:p text:style-name="P689"><text:s text:c="4"/>throw e;</text:p>
      <text:p text:style-name="P690">} finally {</text:p>
      <text:p text:style-name="P691"><text:s text:c="4"/>conn.setAutoCommit(true);</text:p>
      <text:p text:style-name="P692">}</text:p>
      <text:h text:style-name="Heading_20_4" text:outline-level="4"><text:bookmark-start text:name="патерн-репозиторію-repository-pattern"/>Патерн репозиторію (Repository Pattern)<text:bookmark-end text:name="патерн-репозиторію-repository-pattern"/></text:h>
      <text:p text:style-name="First_20_paragraph">Відокремлення логіки доступу до бази від бізнес-логіки:</text:p>
      <text:p text:style-name="P693">// Модель даних</text:p>
      <text:p text:style-name="P694">public record SensorReading(long id, String name, double value, long timestamp) {}</text:p>
      <text:p text:style-name="P695"/>
      <text:p text:style-name="P696">// Інтерфейс репозиторію</text:p>
      <text:p text:style-name="P697">public interface SensorReadingRepository {</text:p>
      <text:p text:style-name="P698"><text:s text:c="4"/>void save(SensorReading reading) throws SQLException;</text:p>
      <text:p text:style-name="P699"><text:s text:c="4"/>List&lt;SensorReading&gt; findAll() throws SQLException;</text:p>
      <text:p text:style-name="P700"><text:s text:c="4"/>List&lt;SensorReading&gt; findByName(String name) throws SQLException;</text:p>
      <text:p text:style-name="P701"><text:s text:c="4"/>void deleteById(long id) throws SQLException;</text:p>
      <text:p text:style-name="P702">}</text:p>
      <text:p text:style-name="P703"/>
      <text:p text:style-name="P704">// Реалізація</text:p>
      <text:p text:style-name="P705">public class SqliteSensorReadingRepository implements SensorReadingRepository {</text:p>
      <text:p text:style-name="P706"><text:s text:c="4"/>private final Connection conn;</text:p>
      <text:p text:style-name="P707"/>
      <text:p text:style-name="P708"><text:s text:c="4"/>public SqliteSensorReadingRepository(Connection conn) { this.conn = conn; }</text:p>
      <text:p text:style-name="P709"/>
      <text:p text:style-name="P710"><text:s text:c="4"/>@Override</text:p>
      <text:p text:style-name="P711"><text:s text:c="4"/>public void save(SensorReading r) throws SQLException {</text:p>
      <text:p text:style-name="P712"><text:s text:c="8"/>try (PreparedStatement ps = conn.prepareStatement(</text:p>
      <text:p text:style-name="P713"><text:s text:c="16"/>"INSERT INTO sensors(name, value, ts) VALUES(?,?,?)")) {</text:p>
      <text:p text:style-name="P714"><text:s text:c="12"/>ps.setString(1, r.name());</text:p>
      <text:p text:style-name="P715"><text:s text:c="12"/>ps.setDouble(2, r.value());</text:p>
      <text:p text:style-name="P716"><text:s text:c="12"/>ps.setLong(3, r.timestamp());</text:p>
      <text:p text:style-name="P717"><text:s text:c="12"/>ps.executeUpdate();</text:p>
      <text:p text:style-name="P718"><text:s text:c="8"/>}</text:p>
      <text:p text:style-name="P719"><text:s text:c="4"/>}</text:p>
      <text:p text:style-name="P720"><text:s text:c="4"/>// ... інші методи</text:p>
      <text:p text:style-name="P721">}</text:p>
      <text:h text:style-name="Heading_20_4" text:outline-level="4"><text:bookmark-start text:name="запобігання-sql-інєкціям"/>Запобігання SQL-ін’єкціям<text:bookmark-end text:name="запобігання-sql-інєкціям"/></text:h>
      <text:p text:style-name="First_20_paragraph"><text:span text:style-name="T1">Ніколи</text:span> не будувати SQL-рядки конкатенацією з користувацьким введенням:</text:p>
      <text:p text:style-name="P722">// НЕБЕЗПЕЧНО!</text:p>
      <text:p text:style-name="P723">String badSql = "SELECT * FROM users WHERE name = '" + userInput + "'";</text:p>
      <text:p text:style-name="P724"/>
      <text:p text:style-name="P725">// ПРАВИЛЬНО — PreparedStatement</text:p>
      <text:p text:style-name="P726">PreparedStatement ps = conn.prepareStatement("SELECT * FROM users WHERE name = ?");</text:p>
      <text:p text:style-name="P727">ps.setString(1, userInput);</text:p>
      <text:h text:style-name="Heading_20_4" text:outline-level="4"><text:bookmark-start text:name="приклад-з-репозиторію-java-iot-8"/>Приклад з репозиторію java-iot<text:bookmark-end text:name="приклад-з-репозиторію-java-iot-8"/></text:h>
      <text:p text:style-name="First_20_paragraph">Клас <text:a xlink:type="simple" xlink:href="https://github.com/AndriyLutskiv/java-iot/blob/main/projects/p09-smart-home/src/main/java/ua/crowpi/projects/p09/DatabaseManager.java" office:name=""><text:span text:style-name="Definition"><text:span text:style-name="Source_20_Text">DatabaseManager.java</text:span></text:span></text:a> ініціалізує SQLite-базу та виконує DDL (CREATE TABLE). Клас <text:a xlink:type="simple" xlink:href="https://github.com/AndriyLutskiv/java-iot/blob/main/projects/p09-smart-home/src/main/java/ua/crowpi/projects/p09/DeviceEventRepository.java" office:name=""><text:span text:style-name="Definition"><text:span text:style-name="Source_20_Text">DeviceEventRepository.java</text:span></text:span></text:a> реалізує CRUD-операції для подій пристроїв. Клас <text:a xlink:type="simple" xlink:href="https://github.com/AndriyLutskiv/java-iot/blob/main/projects/p09-smart-home/src/main/java/ua/crowpi/projects/p09/ProfileRepository.java" office:name=""><text:span text:style-name="Definition"><text:span text:style-name="Source_20_Text">ProfileRepository.java</text:span></text:span></text:a> зберігає профілі налаштувань. Рекомендується вивчити ці класи як зразок промислового використання JDBC.</text:p>
      <text:p text:style-name="Horizontal_20_Line"/>
      <text:h text:style-name="Heading_20_3" text:outline-level="3"><text:bookmark-start text:name="хід-виконання-роботи-9"/>Хід виконання роботи<text:bookmark-end text:name="хід-виконання-роботи-9"/></text:h>
      <text:list text:style-name="L52">
        <text:list-item>
          <text:p text:style-name="P728">Відкрити та проаналізувати <text:span text:style-name="Source_20_Text">DatabaseManager.java</text:span>, <text:span text:style-name="Source_20_Text">DeviceEventRepository.java</text:span> та <text:span text:style-name="Source_20_Text">ProfileRepository.java</text:span> (посилання вище). Визначити: як встановлюється з’єднання, які SQL-запити виконуються, як закриваються ресурси.</text:p>
        </text:list-item>
        <text:list-item>
          <text:p text:style-name="P728">Підключити JDBC-драйвер SQLite до проєкту (Gradle або Maven-залежність). Переконатися у можливості підключення командою <text:span text:style-name="Source_20_Text">DriverManager.getConnection("jdbc:sqlite:test.db")</text:span>.</text:p>
        </text:list-item>
        <text:list-item>
          <text:p text:style-name="P728">Створити схему бази даних (таблиці) відповідно до варіанту. Використати <text:span text:style-name="Source_20_Text">CREATE TABLE IF NOT EXISTS</text:span> у методі ініціалізації.</text:p>
        </text:list-item>
        <text:list-item>
          <text:p text:style-name="P728">Реалізувати клас репозиторію з методами <text:span text:style-name="Source_20_Text">save</text:span>, <text:span text:style-name="Source_20_Text">findAll</text:span>, <text:span text:style-name="Source_20_Text">findById</text:span>, <text:span text:style-name="Source_20_Text">update</text:span>, <text:span text:style-name="Source_20_Text">deleteById</text:span>. Усі методи — через <text:span text:style-name="Source_20_Text">PreparedStatement</text:span>.</text:p>
        </text:list-item>
        <text:list-item>
          <text:p text:style-name="P728">Реалізувати <text:span text:style-name="Source_20_Text">main</text:span>-метод, що демонструє повний CRUD-цикл: вставка 5+ записів, читання всіх, оновлення одного, видалення одного, повторне читання.</text:p>
        </text:list-item>
        <text:list-item>
          <text:p text:style-name="P728">Реалізувати транзакцію для операції, що вимагає атомарності (залежно від варіанту): вимкнути <text:span text:style-name="Source_20_Text">autoCommit</text:span>, виконати кілька операцій, <text:span text:style-name="Source_20_Text">commit</text:span>/<text:span text:style-name="Source_20_Text">rollback</text:span>.</text:p>
        </text:list-item>
        <text:list-item>
          <text:p text:style-name="P728">Реалізувати запит з <text:span text:style-name="Source_20_Text">WHERE</text:span>, <text:span text:style-name="Source_20_Text">ORDER BY</text:span> та <text:span text:style-name="Source_20_Text">LIMIT</text:span>. Вивести результати у форматованій таблиці.</text:p>
        </text:list-item>
        <text:list-item>
          <text:p text:style-name="P728">Реалізувати пошук за декількома параметрами з <text:span text:style-name="Source_20_Text">AND</text:span>/<text:span text:style-name="Source_20_Text">OR</text:span>.</text:p>
        </text:list-item>
        <text:list-item>
          <text:p text:style-name="P728">Написати 5 JUnit 5 тестів з <text:span text:style-name="Source_20_Text">@BeforeEach</text:span> (створення in-memory SQLite <text:span text:style-name="Source_20_Text">jdbc:sqlite::memory:</text:span>) та <text:span text:style-name="Source_20_Text">@AfterEach</text:span> (закриття з’єднання).</text:p>
        </text:list-item>
        <text:list-item>
          <text:p text:style-name="P728">Оформити звіт: схема бази даних (у вигляді SQL CREATE TABLE або таблиць), вихідний код репозиторію, результати CRUD-демонстрації, результати тестів.</text:p>
        </text:list-item>
      </text:list>
      <text:p text:style-name="Horizontal_20_Line"/>
      <text:h text:style-name="Heading_20_3" text:outline-level="3"><text:bookmark-start text:name="індивідуальні-завдання-9"/>Індивідуальні завдання<text:bookmark-end text:name="індивідуальні-завдання-9"/></text:h>
      <text:p text:style-name="First_20_paragraph">Розробити програму (3–4 класи: схема БД, репозиторій, модель, демонстрація). Обсяг: до 150 рядків коду. СУБД: SQLite (in-file або in-memory для тестів).</text:p>
      <text:p text:style-name="Text_20_body"><text:span text:style-name="T1">Варіант 1.</text:span> База даних студентів: таблиці <text:span text:style-name="Source_20_Text">students(id, name, group_name, year)</text:span> та <text:span text:style-name="Source_20_Text">grades(id, student_id, subject, grade)</text:span>. Репозиторій: <text:span text:style-name="Source_20_Text">addStudent</text:span>, <text:span text:style-name="Source_20_Text">addGrade</text:span>, <text:span text:style-name="Source_20_Text">getAverageGrade(int studentId)</text:span>, <text:span text:style-name="Source_20_Text">getTopStudents(int n)</text:span>. Тести: порожня БД, топ-список.</text:p>
      <text:p text:style-name="Text_20_body"><text:span text:style-name="T1">Варіант 2.</text:span> База даних бібліотеки: таблиці <text:span text:style-name="Source_20_Text">books(id, title, author, year, available)</text:span> та <text:span text:style-name="Source_20_Text">loans(id, book_id, reader_name, loan_date, return_date)</text:span>. Репозиторій: <text:span text:style-name="Source_20_Text">borrowBook</text:span> (транзакція: позначити <text:span text:style-name="Source_20_Text">available=false</text:span> + додати запис у loans), <text:span text:style-name="Source_20_Text">returnBook</text:span>.</text:p>
      <text:p text:style-name="Text_20_body"><text:span text:style-name="T1">Варіант 3.</text:span> База даних IoT-датчиків (натхненний <text:a xlink:type="simple" xlink:href="https://github.com/AndriyLutskiv/java-iot/blob/main/projects/p09-smart-home/src/main/java/ua/crowpi/projects/p09/DeviceEventRepository.java" office:name=""><text:span text:style-name="Definition"><text:span text:style-name="Source_20_Text">DeviceEventRepository.java</text:span></text:span></text:a>): таблиця <text:span text:style-name="Source_20_Text">events(id, device_id, event_type, timestamp, payload TEXT)</text:span>. Методи: <text:span text:style-name="Source_20_Text">logEvent</text:span>, <text:span text:style-name="Source_20_Text">getLastN(int n)</text:span>, <text:span text:style-name="Source_20_Text">getByDevice(String id)</text:span>, <text:span text:style-name="Source_20_Text">cleanup(long olderThanMs)</text:span>.</text:p>
      <text:p text:style-name="Text_20_body"><text:span text:style-name="T1">Варіант 4.</text:span> Інтернет-магазин: таблиці <text:span text:style-name="Source_20_Text">products(id, name, price, stock)</text:span> та <text:span text:style-name="Source_20_Text">orders(id, product_id, quantity, total, created_at)</text:span>. Репозиторій: <text:span text:style-name="Source_20_Text">placeOrder</text:span> (транзакція: перевірити наявність → зменшити <text:span text:style-name="Source_20_Text">stock</text:span> → додати замовлення). Тест на недостатній залишок.</text:p>
      <text:p text:style-name="Text_20_body"><text:span text:style-name="T1">Варіант 5.</text:span> Контакт-книга: таблиця <text:span text:style-name="Source_20_Text">contacts(id, name, email, phone, notes)</text:span>. Репозиторій: <text:span text:style-name="Source_20_Text">add</text:span>, <text:span text:style-name="Source_20_Text">findByName(String)</text:span> (LIKE-пошук), <text:span text:style-name="Source_20_Text">findByPhone</text:span>, <text:span text:style-name="Source_20_Text">update</text:span>, <text:span text:style-name="Source_20_Text">delete</text:span>. Всі методи — <text:span text:style-name="Source_20_Text">PreparedStatement</text:span>. Тести: пошук з кирилицею.</text:p>
      <text:p text:style-name="Text_20_body"><text:span text:style-name="T1">Варіант 6.</text:span> Менеджер задач: таблиця <text:span text:style-name="Source_20_Text">tasks(id, title, description, status, priority, created_at, due_date)</text:span>. Статус: <text:span text:style-name="Source_20_Text">TODO</text:span>, <text:span text:style-name="Source_20_Text">IN_PROGRESS</text:span>, <text:span text:style-name="Source_20_Text">DONE</text:span>. Методи: <text:span text:style-name="Source_20_Text">create</text:span>, <text:span text:style-name="Source_20_Text">updateStatus</text:span>, <text:span text:style-name="Source_20_Text">getByStatus</text:span>, <text:span text:style-name="Source_20_Text">getOverdue(long now)</text:span>. Тест транзакції оновлення.</text:p>
      <text:p text:style-name="Text_20_body"><text:span text:style-name="T1">Варіант 7.</text:span> Профілі розумного будинку (натхненний <text:a xlink:type="simple" xlink:href="https://github.com/AndriyLutskiv/java-iot/blob/main/projects/p09-smart-home/src/main/java/ua/crowpi/projects/p09/ProfileRepository.java" office:name=""><text:span text:style-name="Definition"><text:span text:style-name="Source_20_Text">ProfileRepository.java</text:span></text:span></text:a>): таблиця <text:span text:style-name="Source_20_Text">profiles(id, name, settings_json)</text:span>. Зберігати налаштування як JSON-рядок. Методи: <text:span text:style-name="Source_20_Text">saveProfile</text:span>, <text:span text:style-name="Source_20_Text">loadProfile(String name)</text:span>, <text:span text:style-name="Source_20_Text">listProfiles</text:span>, <text:span text:style-name="Source_20_Text">deleteProfile</text:span>. Тест завантаження відсутнього профілю.</text:p>
      <text:p text:style-name="Text_20_body"><text:span text:style-name="T1">Варіант 8.</text:span> Журнал вимірювань: таблиця <text:span text:style-name="Source_20_Text">measurements(id, sensor_name, value, unit, timestamp)</text:span>. Методи: <text:span text:style-name="Source_20_Text">record</text:span>, <text:span text:style-name="Source_20_Text">getAverage(String sensor, long from, long to)</text:span>, <text:span text:style-name="Source_20_Text">getMin</text:span>, <text:span text:style-name="Source_20_Text">getMax</text:span>, <text:span text:style-name="Source_20_Text">getCount</text:span>. Всі агрегати — через SQL-функції, не Java. Тести на правильність агрегатів.</text:p>
      <text:p text:style-name="Text_20_body"><text:span text:style-name="T1">Варіант 9.</text:span> Банківська система: таблиці <text:span text:style-name="Source_20_Text">accounts(id, owner, balance)</text:span> та <text:span text:style-name="Source_20_Text">transfers(id, from_id, to_id, amount, ts)</text:span>. Метод <text:span text:style-name="Source_20_Text">transfer(long fromId, long toId, double amount)</text:span> — транзакція. Тест: паралельні перекази без втрати балансу (через <text:span text:style-name="Source_20_Text">SERIALIZABLE</text:span> ізоляцію).</text:p>
      <text:p text:style-name="Text_20_body"><text:span text:style-name="T1">Варіант 10.</text:span> Каталог фільмів: таблиці <text:span text:style-name="Source_20_Text">movies(id, title, year, genre, rating)</text:span> та <text:span text:style-name="Source_20_Text">reviews(id, movie_id, reviewer, score, comment)</text:span>. Методи: <text:span text:style-name="Source_20_Text">addMovie</text:span>, <text:span text:style-name="Source_20_Text">addReview</text:span>, <text:span text:style-name="Source_20_Text">getAverageRating(int movieId)</text:span>, <text:span text:style-name="Source_20_Text">getTopByGenre(String genre, int n)</text:span>. Тести на порядок сортування.</text:p>
      <text:p text:style-name="Text_20_body"><text:span text:style-name="T1">Варіант 11.</text:span> Реєстр транспортних засобів: таблиця <text:span text:style-name="Source_20_Text">vehicles(id, plate, owner, brand, model, year, insured)</text:span>. Методи: <text:span text:style-name="Source_20_Text">register</text:span>, <text:span text:style-name="Source_20_Text">findByPlate</text:span>, <text:span text:style-name="Source_20_Text">findByOwner</text:span>, <text:span text:style-name="Source_20_Text">updateInsurance(String plate, boolean insured)</text:span>, <text:span text:style-name="Source_20_Text">getExpiredInsurance()</text:span>. Тести: пошук за точним та частковим номером.</text:p>
      <text:p text:style-name="Text_20_body"><text:span text:style-name="T1">Варіант 12.</text:span> Система бронювання: таблиці <text:span text:style-name="Source_20_Text">rooms(id, number, type, price_per_night)</text:span> та <text:span text:style-name="Source_20_Text">reservations(id, room_id, guest_name, check_in, check_out)</text:span>. Метод <text:span text:style-name="Source_20_Text">reserve</text:span> — транзакція з перевіркою перетину дат. Тести: спроба подвійного бронювання.</text:p>
      <text:p text:style-name="Text_20_body"><text:span text:style-name="T1">Варіант 13.</text:span> Словник: таблиця <text:span text:style-name="Source_20_Text">words(id, original, translation, language_from, language_to, added_at)</text:span>. Методи: <text:span text:style-name="Source_20_Text">addWord</text:span>, <text:span text:style-name="Source_20_Text">findTranslation(String word, String langFrom, String langTo)</text:span>, <text:span text:style-name="Source_20_Text">randomWord(String langFrom)</text:span>, <text:span text:style-name="Source_20_Text">deleteWord</text:span>. Тест з кирилицею.</text:p>
      <text:p text:style-name="Text_20_body"><text:span text:style-name="T1">Варіант 14.</text:span> Система оцінювання (LMS): таблиці <text:span text:style-name="Source_20_Text">courses(id, name, description)</text:span>, <text:span text:style-name="Source_20_Text">enrollments(id, student_name, course_id, enrolled_at)</text:span>, <text:span text:style-name="Source_20_Text">submissions(id, enrollment_id, score, submitted_at)</text:span>. Метод <text:span text:style-name="Source_20_Text">getFinalScore(String student, String course)</text:span> — середнє балів. Тест пустого курсу.</text:p>
      <text:p text:style-name="Text_20_body"><text:span text:style-name="T1">Варіант 15.</text:span> Кімнатні рослини: таблиця <text:span text:style-name="Source_20_Text">plants(id, name, species, last_watered, last_fertilized, location)</text:span>. Методи: <text:span text:style-name="Source_20_Text">add</text:span>, <text:span text:style-name="Source_20_Text">water(int id)</text:span>, <text:span text:style-name="Source_20_Text">fertilize(int id)</text:span>, <text:span text:style-name="Source_20_Text">getNeedingWater(long maxAgeMs)</text:span>, <text:span text:style-name="Source_20_Text">getNeedingFertilizer</text:span>. Тест на правильне визначення потребуючих догляду.</text:p>
      <text:p text:style-name="Horizontal_20_Line"/>
      <text:h text:style-name="Heading_20_3" text:outline-level="3"><text:bookmark-start text:name="контрольні-запитання-9"/>Контрольні запитання<text:bookmark-end text:name="контрольні-запитання-9"/></text:h>
      <text:list text:style-name="L53">
        <text:list-item>
          <text:p text:style-name="P729">Що таке JDBC? Яку роль відіграє JDBC-драйвер?</text:p>
        </text:list-item>
        <text:list-item>
          <text:p text:style-name="P729">Яка різниця між <text:span text:style-name="Source_20_Text">Statement</text:span> та <text:span text:style-name="Source_20_Text">PreparedStatement</text:span>? Чому завжди слід надавати перевагу <text:span text:style-name="Source_20_Text">PreparedStatement</text:span>?</text:p>
        </text:list-item>
        <text:list-item>
          <text:p text:style-name="P729">Що таке SQL-ін’єкція? Наведіть приклад уразливого коду та його безпечний аналог.</text:p>
        </text:list-item>
        <text:list-item>
          <text:p text:style-name="P729">Що таке транзакція? Які властивості описує акронім ACID?</text:p>
        </text:list-item>
        <text:list-item>
          <text:p text:style-name="P729">Що означає <text:span text:style-name="Source_20_Text">autoCommit=true</text:span> за замовчуванням? Коли потрібно вимикати цей режим?</text:p>
        </text:list-item>
        <text:list-item>
          <text:p text:style-name="P729">Що таке <text:span text:style-name="Source_20_Text">rollback</text:span>? Коли він викликається автоматично, а коли — вручну?</text:p>
        </text:list-item>
        <text:list-item>
          <text:p text:style-name="P729">Що таке <text:span text:style-name="Source_20_Text">ResultSet</text:span>? Як читати значення стовпців за ім’ям та за індексом?</text:p>
        </text:list-item>
        <text:list-item>
          <text:p text:style-name="P729">Що відбудеться, якщо <text:span text:style-name="Source_20_Text">Connection</text:span>, <text:span text:style-name="Source_20_Text">Statement</text:span> або <text:span text:style-name="Source_20_Text">ResultSet</text:span> не закрити? Яку конструкцію Java використовувати для гарантованого закриття?</text:p>
        </text:list-item>
        <text:list-item>
          <text:p text:style-name="P729">Що таке SQL DDL та DML? Наведіть по одному прикладу операторів кожного типу.</text:p>
        </text:list-item>
        <text:list-item>
          <text:p text:style-name="P729">Що таке JOIN в SQL? Поясніть різницю між <text:span text:style-name="Source_20_Text">INNER JOIN</text:span>, <text:span text:style-name="Source_20_Text">LEFT JOIN</text:span> та <text:span text:style-name="Source_20_Text">RIGHT JOIN</text:span>.</text:p>
        </text:list-item>
        <text:list-item>
          <text:p text:style-name="P729">Що таке <text:span text:style-name="Source_20_Text">LIKE</text:span> в SQL? Як шукати рядки, що містять підрядок?</text:p>
        </text:list-item>
        <text:list-item>
          <text:p text:style-name="P729">Що таке <text:span text:style-name="Source_20_Text">ORDER BY</text:span> та <text:span text:style-name="Source_20_Text">LIMIT</text:span>? Як вибрати перші 10 записів, відсортованих за датою?</text:p>
        </text:list-item>
        <text:list-item>
          <text:p text:style-name="P729">Що таке індекс у базі даних? Коли його варто створювати?</text:p>
        </text:list-item>
        <text:list-item>
          <text:p text:style-name="P729">Що таке in-memory база даних SQLite (<text:span text:style-name="Source_20_Text">jdbc:sqlite::memory:</text:span>)? Чому вона зручна для тестування?</text:p>
        </text:list-item>
        <text:list-item>
          <text:p text:style-name="P729">Що таке патерн «Репозиторій» (Repository)? Яку проблему він вирішує в архітектурі застосунку?</text:p>
        </text:list-item>
      </text:list>
      <text:p text:style-name="Horizontal_20_Line"/>
      <text:h text:style-name="Heading_20_3" text:outline-level="3"><text:bookmark-start text:name="перелік-посилань-9"/>Перелік посилань<text:bookmark-end text:name="перелік-посилань-9"/></text:h>
      <text:list text:style-name="L54">
        <text:list-item>
          <text:p text:style-name="P730">Horstmann, C. S. <text:span text:style-name="T2">Core Java, Volume II — Advanced Features</text:span> (12th ed.). Hoboken : Pearson, 2022. 832 p.</text:p>
        </text:list-item>
        <text:list-item>
          <text:p text:style-name="P730">Schildt, H. <text:span text:style-name="T2">Java: The Complete Reference</text:span> (12th ed.). New York : McGraw-Hill, 2021. 1248 p.</text:p>
        </text:list-item>
        <text:list-item>
          <text:p text:style-name="P730">Oracle Corporation. <text:span text:style-name="T2">JDBC Database Access — Java Tutorials</text:span> [Електронний ресурс]. URL: https://docs.oracle.com/javase/tutorial/jdbc/ (дата звернення: 2025-09-01).</text:p>
        </text:list-item>
        <text:list-item>
          <text:p text:style-name="P730">Oracle Corporation. <text:span text:style-name="T2">java.sql Package API</text:span> [Електронний ресурс]. URL: https://docs.oracle.com/en/java/javase/25/docs/api/java.sql/java/sql/package-summary.html (дата звернення: 2025-09-01).</text:p>
        </text:list-item>
        <text:list-item>
          <text:p text:style-name="P730">SQLite Consortium. <text:span text:style-name="T2">SQLite Documentation</text:span> [Електронний ресурс]. URL: https://www.sqlite.org/docs.html (дата звернення: 2025-09-01).</text:p>
        </text:list-item>
        <text:list-item>
          <text:p text:style-name="P730">Bloch, J. <text:span text:style-name="T2">Effective Java</text:span> (3rd ed.). Boston : Addison-Wesley, 2018. 412 p.</text:p>
        </text:list-item>
        <text:list-item>
          <text:p text:style-name="P730">Fowler, M. <text:span text:style-name="T2">Patterns of Enterprise Application Architecture</text:span>. Boston : Addison-Wesley, 2002. 560 p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uk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uk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uk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uk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>������������������ ���������������� ���� ������������������ ������������������������ ���������� �� �������������������� ���������������������������� ���������� Java��</dc:title>
    <dc:description/>
    <dc:subject/>
    <meta:keyword/>
    <dc:language>uk</dc:language>
    <meta:initial-creator>������������ ��. ��., �������������������� ��.��.</meta:initial-creator>
    <dc:creator>������������ ��. ��., �������������������� ��.��.</dc:creator>
    <meta:creation-date>2026-05-05T13:37:54Z</meta:creation-date>
    <dc:date>2026-05-05T13:37:54Z</dc:date>
    <meta:user-defined meta:name="date" meta:value-type="string">2025</meta:user-defined>
  </office:meta>
</office:document-meta>
</file>